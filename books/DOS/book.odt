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9">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Text_20_body" style:list-style-name="L10">
      <style:paragraph-properties fo:margin-top="0in" fo:margin-bottom="0in"/>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11">
      <style:paragraph-properties fo:margin-top="0in" fo:margin-bottom="0in"/>
    </style:style>
    <style:style style:name="P24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give and explain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X,CX,DX when writing my programs. If I need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in this book depends on different functions of interrupt 21h.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which can be used either as a function name or used to create the equivalent loops you would normally create with the “while” or “for” loop in the C Programming Language.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The stack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bits</text:p>
      <text:p text:style-name="P704">call putint</text:p>
      <text:p text:style-name="P705">call putspace</text:p>
      <text:p text:style-name="P706">mov word[radix],16 <text:s text:c="10"/>;set radix to hexadecimal</text:p>
      <text:p text:style-name="P707">mov word[int_width],2 <text:s text:c="7"/>;width of 2 hex digits</text:p>
      <text:p text:style-name="P708">call putint</text:p>
      <text:p text:style-name="P709">call putspace</text:p>
      <text:p text:style-name="P710">mov word[radix],10 <text:s text:c="10"/>;set radix to decimal (what humans read)</text:p>
      <text:p text:style-name="P711">mov word[int_width],3 <text:s text:c="7"/>;width of 3 decimal digits</text:p>
      <text:p text:style-name="P712">call putint</text:p>
      <text:p text:style-name="P713"/>
      <text:p text:style-name="P714">cmp al,0x20 ;check if al is in printable range</text:p>
      <text:p text:style-name="P715">jb not_char ;if not then jump to not_char label</text:p>
      <text:p text:style-name="P716">cmp al,0x7E </text:p>
      <text:p text:style-name="P717">ja not_char</text:p>
      <text:p text:style-name="P718"/>
      <text:p text:style-name="P719">call putspace</text:p>
      <text:p text:style-name="P720">call putchar ;print the character if it is in the range 0x20 to 0x7E</text:p>
      <text:p text:style-name="P721"/>
      <text:p text:style-name="P722">not_char: <text:s text:c="3"/>;jump here if character is outside range to print</text:p>
      <text:p text:style-name="P723"/>
      <text:p text:style-name="P724">call putline ;print newline before the next loop</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Official test suite for the C version of chastelib.\n");</text:p>
      <text:p text:style-name="P1281"/>
      <text:p text:style-name="P1282"><text:s text:c="1"/>b=strint("100"); /*convert string to an integer*/</text:p>
      <text:p text:style-name="P1283"><text:s text:c="1"/>if(strint_errors) /*if there are errors, print some messages and exit the program*/</text:p>
      <text:p text:style-name="P1284"><text:s text:c="1"/>{</text:p>
      <text:p text:style-name="P1285"><text:s text:c="2"/>putstr("Input string passed to strint function contains errors.\n");</text:p>
      <text:p text:style-name="P1286"><text:s text:c="2"/>putstr("Please fix the invalid characters/radix and try again.\n");</text:p>
      <text:p text:style-name="P1287"><text:s text:c="2"/>return 0;</text:p>
      <text:p text:style-name="P1288"><text:s text:c="1"/>}</text:p>
      <text:p text:style-name="P1289"><text:s text:c="1"/></text:p>
      <text:p text:style-name="P1290"><text:s text:c="1"/>while(a&lt;b)</text:p>
      <text:p text:style-name="P1291"><text:s text:c="1"/>{</text:p>
      <text:p text:style-name="P1292"><text:s text:c="2"/>radix=2;</text:p>
      <text:p text:style-name="P1293"><text:s text:c="2"/>int_width=8;</text:p>
      <text:p text:style-name="P1294"><text:s text:c="2"/>putint(a);</text:p>
      <text:p text:style-name="P1295"><text:s text:c="2"/>putstr(" ");</text:p>
      <text:p text:style-name="P1296"><text:s text:c="2"/>radix=16;</text:p>
      <text:p text:style-name="P1297"><text:s text:c="2"/>int_width=2;</text:p>
      <text:p text:style-name="P1298"><text:s text:c="2"/>putint(a);</text:p>
      <text:p text:style-name="P1299"><text:s text:c="2"/>putstr(" ");</text:p>
      <text:p text:style-name="P1300"><text:s text:c="2"/>radix=10;</text:p>
      <text:p text:style-name="P1301"><text:s text:c="2"/>int_width=3;</text:p>
      <text:p text:style-name="P1302"><text:s text:c="2"/>putint(a);</text:p>
      <text:p text:style-name="P1303"/>
      <text:p text:style-name="P1304"><text:s text:c="2"/>if(a&gt;=0x20 &amp;&amp; a&lt;=0x7E)</text:p>
      <text:p text:style-name="P1305"><text:s text:c="2"/>{</text:p>
      <text:p text:style-name="P1306"><text:s text:c="3"/>putstr(" ");</text:p>
      <text:p text:style-name="P1307"><text:s text:c="3"/>putchar(a);</text:p>
      <text:p text:style-name="P1308"><text:s text:c="2"/>}</text:p>
      <text:p text:style-name="P1309"/>
      <text:p text:style-name="P1310"><text:s text:c="2"/>putstr("\n");</text:p>
      <text:p text:style-name="P1311"><text:s text:c="2"/>a+=1;</text:p>
      <text:p text:style-name="P1312"><text:s text:c="1"/>}</text:p>
      <text:p text:style-name="P1313"><text:s text:c="4"/></text:p>
      <text:p text:style-name="P1314"><text:s text:c="1"/>return 0;</text:p>
      <text:p text:style-name="P1315">}</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16">/*</text:p>
      <text:p text:style-name="P1317"><text:s text:c="1"/>This file is a C library of functions written by Chastity White Rose. The functions are for converting strings into integers and integers into strings.</text:p>
      <text:p text:style-name="P1318"><text:s text:c="1"/>I did it partly for future programming plans and also because it helped me learn a lot in the process about how pointers work</text:p>
      <text:p text:style-name="P1319"><text:s text:c="1"/>as well as which features the standard library provides, and which things I need to write my own functions for.</text:p>
      <text:p text:style-name="P1320"/>
      <text:p text:style-name="P1321"><text:s text:c="1"/>As it turns out, the integer output routines for C are too limited for my tastes. This library corrects this problem.</text:p>
      <text:p text:style-name="P1322"><text:s text:c="1"/>Using the global variables and functions in this file, integers can be output in bases/radixes 2 to 36.</text:p>
      <text:p text:style-name="P1323"><text:s text:c="1"/></text:p>
      <text:p text:style-name="P1324"><text:s text:c="1"/>Although this code is commented, I have also written a readme.md file designed to explain the usage of these functions and the philosophy behind them.</text:p>
      <text:p text:style-name="P1325">*/</text:p>
      <text:p text:style-name="P1326"/>
      <text:p text:style-name="P1327">/*</text:p>
      <text:p text:style-name="P1328"><text:s text:c="1"/>These following lines define a static array with a size big enough to store the digits of an integer, including padding it with extra zeroes.</text:p>
      <text:p text:style-name="P1329"><text:s text:c="1"/>The integer conversion function (intstr) always references a pointer to this global string, and this allows other C standard library functions</text:p>
      <text:p text:style-name="P1330"><text:s text:c="1"/>such as printf to display the integers to standard output or even possibly to files.</text:p>
      <text:p text:style-name="P1331"><text:s text:c="1"/>This string can be repurposed for absolutely anything I desire.</text:p>
      <text:p text:style-name="P1332">*/</text:p>
      <text:p text:style-name="P1333"/>
      <text:p text:style-name="P1334"/>
      <text:p text:style-name="P1335">#define usl 0x100 /*usl stands for Unsigned or Universal String Length.*/</text:p>
      <text:p text:style-name="P1336">char int_string[usl+1]; /*global string which will be used to store string of integers. Size is usl+1 for terminating zero*/</text:p>
      <text:p text:style-name="P1337"/>
      <text:p text:style-name="P1338">/*radix or base for integer output. 2=binary, 8=octal, 10=decimal, 16=hexadecimal*/</text:p>
      <text:p text:style-name="P1339">int radix=2;</text:p>
      <text:p text:style-name="P1340">/*default minimum digits for printing integers*/</text:p>
      <text:p text:style-name="P1341">int int_width=1;</text:p>
      <text:p text:style-name="P1342"/>
      <text:p text:style-name="P1343">/*</text:p>
      <text:p text:style-name="P1344">The intstr function is one that I wrote because the standard library can display integers as decimal, octal, or hexadecimal, but not any other bases(including binary, which is my favorite).</text:p>
      <text:p text:style-name="P1345"/>
      <text:p text:style-name="P1346">My function corrects this, and in my opinion, such a function should have been part of the standard library, but I'm not complaining because now I have my own, which I can use forever!</text:p>
      <text:p text:style-name="P1347">More importantly, it can be adapted for any programming language in the world if I learn the basics of that language. That being said, C is the best language and I will use it forever.</text:p>
      <text:p text:style-name="P1348">*/</text:p>
      <text:p text:style-name="P1349"/>
      <text:p text:style-name="P1350">char *intstr(unsigned int i) <text:s text:c="3"/>/*Chastity's supreme integer to string conversion function*/</text:p>
      <text:p text:style-name="P1351">{</text:p>
      <text:p text:style-name="P1352"><text:s text:c="1"/>int width=0; <text:s text:c="18"/>/*the width or how many digits including prefixed zeros are printed*/</text:p>
      <text:p text:style-name="P1353"><text:s text:c="1"/>char *s=int_string+usl; <text:s text:c="7"/>/*a pointer starting to the place where we will end the string with zero*/</text:p>
      <text:p text:style-name="P1354"><text:s text:c="1"/>*s=0; <text:s text:c="25"/>/*set the zero that terminates the string in the C language*/</text:p>
      <text:p text:style-name="P1355"><text:s text:c="1"/>while(i!=0 || width&lt;int_width) /*loop to fill the string with every required digit plus prefixed zeros*/</text:p>
      <text:p text:style-name="P1356"><text:s text:c="1"/>{</text:p>
      <text:p text:style-name="P1357"><text:s text:c="2"/>s--; <text:s text:c="25"/>/*decrement the pointer to go left for corrent digit placing*/</text:p>
      <text:p text:style-name="P1358"><text:s text:c="2"/>*s=i%radix; <text:s text:c="18"/>/*get the remainder of division by the radix or base*/</text:p>
      <text:p text:style-name="P1359"><text:s text:c="2"/>i/=radix; <text:s text:c="20"/>/*divide the input by radix*/</text:p>
      <text:p text:style-name="P1360"><text:s text:c="2"/>if(*s&lt;10){*s+='0';} <text:s text:c="10"/>/*fconvert digits 0 to 9 to the ASCII character for that digit*/</text:p>
      <text:p text:style-name="P1361"><text:s text:c="2"/>else{*s=*s+'A'-10;} <text:s text:c="10"/>/*for digits higher than 9, convert to letters starting at A*/</text:p>
      <text:p text:style-name="P1362"><text:s text:c="2"/>width++; <text:s text:c="21"/>/*increment the width so we know when enough digits are saved*/</text:p>
      <text:p text:style-name="P1363"><text:s text:c="1"/>}</text:p>
      <text:p text:style-name="P1364"><text:s text:c="1"/>return s; <text:s text:c="21"/>/*return this string to be used by putstr,printf,std::cout or whatever*/</text:p>
      <text:p text:style-name="P1365">}</text:p>
      <text:p text:style-name="P1366"/>
      <text:p text:style-name="P1367">/*</text:p>
      <text:p text:style-name="P1368">The strint_errors variable is used to keep track of how many errors happened in the strint function.</text:p>
      <text:p text:style-name="P1369">The following errors can occur:</text:p>
      <text:p text:style-name="P1370"/>
      <text:p text:style-name="P1371">Radix is not in range 2 to 36</text:p>
      <text:p text:style-name="P1372">Character is not a number 0 to 9 or alphabet A to Z (in either case)</text:p>
      <text:p text:style-name="P1373">Character is alphanumeric but is not valid for current radix</text:p>
      <text:p text:style-name="P1374"/>
      <text:p text:style-name="P1375">If any of these errors happen, error messages are printed to let the programmer or user know what went wrong in the string that was passed to the function.</text:p>
      <text:p text:style-name="P1376">If getting input from the keyboard, the strint_errors variable can be used in a conditional statement to tell them to try again and recall the code that grabs user input.</text:p>
      <text:p text:style-name="P1377">*/</text:p>
      <text:p text:style-name="P1378"/>
      <text:p text:style-name="P1379">int strint_errors = 0; </text:p>
      <text:p text:style-name="P1380"/>
      <text:p text:style-name="P1381">/*</text:p>
      <text:p text:style-name="P1382"><text:s text:c="1"/>The strint function is my own replacement for the strtol function from the C standard library.</text:p>
      <text:p text:style-name="P1383"><text:s text:c="1"/>I didn't technically need to make this function because the functions from stdlib.h can already convert strings from bases 2 to 36 into integers.</text:p>
      <text:p text:style-name="P1384"><text:s text:c="1"/>However, my function is simpler because it only requires 2 arguments instead of three, and it also does not handle negative numbers.</text:p>
      <text:p text:style-name="P1385">I have never needed negative integers, but if I ever do, I can use the standard functions or write my own in the future.</text:p>
      <text:p text:style-name="P1386">*/</text:p>
      <text:p text:style-name="P1387"/>
      <text:p text:style-name="P1388">int strint(const char *s)</text:p>
      <text:p text:style-name="P1389">{</text:p>
      <text:p text:style-name="P1390"><text:s text:c="1"/>int i=0;</text:p>
      <text:p text:style-name="P1391"><text:s text:c="1"/>char c;</text:p>
      <text:p text:style-name="P1392"><text:s text:c="1"/>strint_errors = 0; /*set zero errors before we parse the string*/</text:p>
      <text:p text:style-name="P1393"><text:s text:c="1"/>if( radix&lt;2 || radix&gt;36 ){ strint_errors++; printf("Error: radix %i is out of range!\n",radix);}</text:p>
      <text:p text:style-name="P1394"><text:s text:c="1"/>while( *s == ' ' || *s == '\n' || *s == '\t' ){s++;} /*skip whitespace at beginning*/</text:p>
      <text:p text:style-name="P1395"><text:s text:c="1"/>while(*s!=0)</text:p>
      <text:p text:style-name="P1396"><text:s text:c="1"/>{</text:p>
      <text:p text:style-name="P1397"><text:s text:c="2"/>c=*s;</text:p>
      <text:p text:style-name="P1398"><text:s text:c="2"/>if( c &gt;= '0' &amp;&amp; c &lt;= '9' ){c-='0';}</text:p>
      <text:p text:style-name="P1399"><text:s text:c="2"/>else if( c &gt;= 'A' &amp;&amp; c &lt;= 'Z' ){c-='A';c+=10;}</text:p>
      <text:p text:style-name="P1400"><text:s text:c="2"/>else if( c &gt;= 'a' &amp;&amp; c &lt;= 'z' ){c-='a';c+=10;}</text:p>
      <text:p text:style-name="P1401"><text:s text:c="2"/>else if( c == ' ' || c == '\n' || c == '\t' ){break;}</text:p>
      <text:p text:style-name="P1402"><text:s text:c="2"/>else{ strint_errors++; printf("Error: %c is not an alphanumeric character!\n",c);break;}</text:p>
      <text:p text:style-name="P1403"><text:s text:c="2"/>if(c&gt;=radix){ strint_errors++; printf("Error: %c is not a valid character for radix %i\n",*s,radix);break;}</text:p>
      <text:p text:style-name="P1404"><text:s text:c="2"/>i*=radix;</text:p>
      <text:p text:style-name="P1405"><text:s text:c="2"/>i+=c;</text:p>
      <text:p text:style-name="P1406"><text:s text:c="2"/>s++;</text:p>
      <text:p text:style-name="P1407"><text:s text:c="1"/>}</text:p>
      <text:p text:style-name="P1408"><text:s text:c="1"/>return i;</text:p>
      <text:p text:style-name="P1409">}</text:p>
      <text:p text:style-name="P1410"/>
      <text:p text:style-name="P1411">/*</text:p>
      <text:p text:style-name="P1412"><text:s text:c="1"/>This function prints a string using fwrite.</text:p>
      <text:p text:style-name="P1413"><text:s text:c="1"/>This algorithm is the best C representation of how my Assembly programs also work.</text:p>
      <text:p text:style-name="P1414"><text:s text:c="1"/>Its true purpose is to be used in the putint function for conveniently printing integers, </text:p>
      <text:p text:style-name="P1415"><text:s text:c="1"/>but it can print any valid string.</text:p>
      <text:p text:style-name="P1416">*/</text:p>
      <text:p text:style-name="P1417"/>
      <text:p text:style-name="P1418">int putstring(const char *s)</text:p>
      <text:p text:style-name="P1419">{</text:p>
      <text:p text:style-name="P1420"><text:s text:c="1"/>int count=0; <text:s text:c="13"/>/*used to calcular how many bytes will be written*/</text:p>
      <text:p text:style-name="P1421"><text:s text:c="1"/>const char *p=s; <text:s text:c="9"/>/*pointer used to find terminating zero of string*/</text:p>
      <text:p text:style-name="P1422"><text:s text:c="1"/>while(*p){p++;} <text:s text:c="10"/>/*loop until zero found and immediately exit*/</text:p>
      <text:p text:style-name="P1423"><text:s text:c="1"/>count=p-s; <text:s text:c="15"/>/*count is the difference of pointers p and s*/</text:p>
      <text:p text:style-name="P1424"><text:s text:c="1"/>fwrite(s,1,count,stdout); /*https://cppreference.com/w/c/io/fwrite.html*/</text:p>
      <text:p text:style-name="P1425"><text:s text:c="1"/>return count; <text:s text:c="12"/>/*return how many bytes were written*/</text:p>
      <text:p text:style-name="P1426">}</text:p>
      <text:p text:style-name="P1427"/>
      <text:p text:style-name="P1428">/*</text:p>
      <text:p text:style-name="P1429"><text:s text:c="1"/>A function pointer named putstr which is a shorter name for calling putstring</text:p>
      <text:p text:style-name="P1430"><text:s text:c="1"/>But this doesn't exist just to save bytes of source files. Otherwise I wouldn't have these huge comments!</text:p>
      <text:p text:style-name="P1431"><text:s text:c="1"/>This exists so that all strings can be redirected to another function for output.</text:p>
      <text:p text:style-name="P1432"><text:s text:c="1"/>For example, if the strings were written to a log file during a game which didn't use a terminal.</text:p>
      <text:p text:style-name="P1433"><text:s text:c="1"/></text:p>
      <text:p text:style-name="P1434"><text:s text:c="1"/>But the most common use case is "putstr=addstr" when using the ncurses library to manage</text:p>
      <text:p text:style-name="P1435"><text:s text:c="1"/>terminal control functions for a text based game. Having the putstr pointer allows me to </text:p>
      <text:p text:style-name="P1436"><text:s text:c="1"/>include this same source file and use it for ncurses based projects.</text:p>
      <text:p text:style-name="P1437">*/</text:p>
      <text:p text:style-name="P1438">int (*putstr)(const char *)=putstring;</text:p>
      <text:p text:style-name="P1439"/>
      <text:p text:style-name="P1440">/*</text:p>
      <text:p text:style-name="P1441"><text:s text:c="1"/>This function uses both intstr and putstring to print an integer in the currently selected radix and width.</text:p>
      <text:p text:style-name="P1442">*/</text:p>
      <text:p text:style-name="P1443"/>
      <text:p text:style-name="P1444">void putint(unsigned int i)</text:p>
      <text:p text:style-name="P1445">{</text:p>
      <text:p text:style-name="P1446"><text:s text:c="1"/>putstr(intstr(i));</text:p>
      <text:p text:style-name="P1447">}</text:p>
      <text:p text:style-name="P1448"/>
      <text:p text:style-name="P1449">/*</text:p>
      <text:p text:style-name="P1450"><text:s text:c="1"/>Those four functions above are the core of chastelib.</text:p>
      <text:p text:style-name="P1451"><text:s text:c="1"/>While there may be extensions written for specific programs, these functions are essential for absolutely every program I write.</text:p>
      <text:p text:style-name="P1452"><text:s text:c="1"/></text:p>
      <text:p text:style-name="P1453"><text:s text:c="1"/>The only reason you would not need them is if you only output numbers in decimal or hexadecimal, because printf in C can do all that just fine.</text:p>
      <text:p text:style-name="P1454"><text:s text:c="1"/>However, the reason my core functions are superior to printf is that printf and its family of functions require the user to memorize all the arcane symbols for format specifiers.</text:p>
      <text:p text:style-name="P1455"><text:s text:c="1"/></text:p>
      <text:p text:style-name="P1456"><text:s text:c="1"/>The core functions are primarily concerned with standard output and the conversion of strings and integers. They do not deal with input from the keyboard or files. A separate extension will be written for my programs that need these features.</text:p>
      <text:p text:style-name="P1457">*/</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58"><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58"><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58"><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58"><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al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459">format ELF executable</text:p>
      <text:p text:style-name="P1460">entry main</text:p>
      <text:p text:style-name="P1461"/>
      <text:p text:style-name="P1462">main:</text:p>
      <text:p text:style-name="P1463"/>
      <text:p text:style-name="P1464">mov eax,main_string</text:p>
      <text:p text:style-name="P1465">call putstring</text:p>
      <text:p text:style-name="P1466"/>
      <text:p text:style-name="P1467">mov eax, 1 <text:s text:c="1"/>; invoke SYS_EXIT (kernel opcode 1)</text:p>
      <text:p text:style-name="P1468">mov ebx, 0 <text:s text:c="1"/>; return 0 status on exit - 'No Errors'</text:p>
      <text:p text:style-name="P1469">int 80h</text:p>
      <text:p text:style-name="P1470"/>
      <text:p text:style-name="P1471">;A string to test if output works</text:p>
      <text:p text:style-name="P1472">main_string db 'This program runs in Linux!',0Ah,0</text:p>
      <text:p text:style-name="P1473"/>
      <text:p text:style-name="P1474">putstring:</text:p>
      <text:p text:style-name="P1475"/>
      <text:p text:style-name="P1476">push eax</text:p>
      <text:p text:style-name="P1477">push ebx</text:p>
      <text:p text:style-name="P1478">push ecx</text:p>
      <text:p text:style-name="P1479">push edx</text:p>
      <text:p text:style-name="P1480"/>
      <text:p text:style-name="P1481">mov ebx,eax ; copy eax to ebx. ebx will be used as index to the string</text:p>
      <text:p text:style-name="P1482"/>
      <text:p text:style-name="P1483">putstring_strlen_start: ; this loop finds the length of the string as part of the putstring function</text:p>
      <text:p text:style-name="P1484"/>
      <text:p text:style-name="P1485">cmp [ebx],byte 0 ; compare byte at address ebx with 0</text:p>
      <text:p text:style-name="P1486">jz putstring_strlen_end ; if comparison was zero, jump to loop end because we have found the length</text:p>
      <text:p text:style-name="P1487">inc ebx</text:p>
      <text:p text:style-name="P1488">jmp putstring_strlen_start</text:p>
      <text:p text:style-name="P1489"/>
      <text:p text:style-name="P1490">putstring_strlen_end:</text:p>
      <text:p text:style-name="P1491">sub ebx,eax ;By subtracting the start of the string with the current address, we have the length of the string.</text:p>
      <text:p text:style-name="P1492"/>
      <text:p text:style-name="P1493">; Write string using Linux Write system call. Reference for 32 bit x86 syscalls is below.</text:p>
      <text:p text:style-name="P1494">; https://www.chromium.org/chromium-os/developer-library/reference/linux-constants/syscalls/#x86-32-bit</text:p>
      <text:p text:style-name="P1495"/>
      <text:p text:style-name="P1496">mov edx,ebx <text:s text:c="5"/>;number of bytes to write</text:p>
      <text:p text:style-name="P1497">mov ecx,eax <text:s text:c="5"/>;pointer/address of string to write</text:p>
      <text:p text:style-name="P1498">mov ebx,1 <text:s text:c="7"/>;write to the STDOUT file</text:p>
      <text:p text:style-name="P1499">mov eax,4 <text:s text:c="7"/>;invoke SYS_WRITE (kernel opcode 4 on 32 bit systems)</text:p>
      <text:p text:style-name="P1500">int 80h <text:s text:c="9"/>;system call to write the message</text:p>
      <text:p text:style-name="P1501"/>
      <text:p text:style-name="P1502">pop edx</text:p>
      <text:p text:style-name="P1503">pop ecx</text:p>
      <text:p text:style-name="P1504">pop ebx</text:p>
      <text:p text:style-name="P1505">pop eax</text:p>
      <text:p text:style-name="P1506"/>
      <text:p text:style-name="P1507">ret ; this is the end of the putstring function return to calling location</text:p>
      <text:p text:style-name="P1508"/>
      <text:p text:style-name="P1509">; This Assembly source file has been formatted for the FASM assembler.</text:p>
      <text:p text:style-name="P1510">; The following 3 commands assemble, give executable permissions, and run the program</text:p>
      <text:p text:style-name="P1511">;</text:p>
      <text:p text:style-name="P1512">; <text:s text:c="2"/>fasm main.asm</text:p>
      <text:p text:style-name="P1513">; <text:s text:c="2"/>chmod +x main</text:p>
      <text:p text:style-name="P1514">;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15">format ELF64 executable</text:p>
      <text:p text:style-name="P1516">entry main</text:p>
      <text:p text:style-name="P1517"/>
      <text:p text:style-name="P1518">main: ; the main function of our assembly function, just as if I were writing C.</text:p>
      <text:p text:style-name="P1519"/>
      <text:p text:style-name="P1520">mov rax,main_string ; move the address of main_string into rax register</text:p>
      <text:p text:style-name="P1521">call putstring</text:p>
      <text:p text:style-name="P1522"/>
      <text:p text:style-name="P1523">mov rax, 60 ; invoke SYS_EXIT (kernel opcode 60 on 64 bit systems)</text:p>
      <text:p text:style-name="P1524">mov rdi,0 <text:s text:c="2"/>; return 0 status on exit - 'No Errors'</text:p>
      <text:p text:style-name="P1525">syscall</text:p>
      <text:p text:style-name="P1526"/>
      <text:p text:style-name="P1527">;A string to test if output works</text:p>
      <text:p text:style-name="P1528">main_string db 'This program runs in Linux!',0Ah,0</text:p>
      <text:p text:style-name="P1529"/>
      <text:p text:style-name="P1530">putstring:</text:p>
      <text:p text:style-name="P1531"/>
      <text:p text:style-name="P1532">push rax</text:p>
      <text:p text:style-name="P1533">push rbx</text:p>
      <text:p text:style-name="P1534">push rcx</text:p>
      <text:p text:style-name="P1535">push rdx</text:p>
      <text:p text:style-name="P1536"/>
      <text:p text:style-name="P1537">mov rbx,rax ; copy rax to rbx as well. Now both registers have the address of the main_string</text:p>
      <text:p text:style-name="P1538"/>
      <text:p text:style-name="P1539">putstring_strlen_start: ; this loop finds the lenge of the string as part of the putstring function</text:p>
      <text:p text:style-name="P1540"/>
      <text:p text:style-name="P1541">cmp [rbx],byte 0 ; compare byte at address rdx with 0</text:p>
      <text:p text:style-name="P1542">jz putstring_strlen_end ; if comparison was zero, jump to loop end because we have found the length</text:p>
      <text:p text:style-name="P1543">inc rbx</text:p>
      <text:p text:style-name="P1544">jmp putstring_strlen_start</text:p>
      <text:p text:style-name="P1545"/>
      <text:p text:style-name="P1546">putstring_strlen_end:</text:p>
      <text:p text:style-name="P1547">sub rbx,rax ;rbx will now have correct number of bytes</text:p>
      <text:p text:style-name="P1548"/>
      <text:p text:style-name="P1549">;write string using Linux Write system call</text:p>
      <text:p text:style-name="P1550">;https://www.chromium.org/chromium-os/developer-library/reference/linux-constants/syscalls/#x86_64-64-bit</text:p>
      <text:p text:style-name="P1551"/>
      <text:p text:style-name="P1552">mov rdx,rbx <text:s text:c="5"/>;number of bytes to write</text:p>
      <text:p text:style-name="P1553">mov rsi,rax <text:s text:c="5"/>;pointer/address of string to write</text:p>
      <text:p text:style-name="P1554">mov rdi,1 <text:s text:c="7"/>;write to the STDOUT file</text:p>
      <text:p text:style-name="P1555">mov rax,1 <text:s text:c="7"/>;invoke SYS_WRITE (kernel opcode 1 on 64 bit systems)</text:p>
      <text:p text:style-name="P1556">syscall <text:s text:c="9"/>;system call to write the message</text:p>
      <text:p text:style-name="P1557"/>
      <text:p text:style-name="P1558">pop rdx</text:p>
      <text:p text:style-name="P1559">pop rcx</text:p>
      <text:p text:style-name="P1560">pop rbx</text:p>
      <text:p text:style-name="P1561">pop rax</text:p>
      <text:p text:style-name="P1562"/>
      <text:p text:style-name="P1563">ret ; this is the end of the putstring function return to calling location</text:p>
      <text:p text:style-name="P1564"/>
      <text:p text:style-name="P1565"/>
      <text:p text:style-name="P1566">; This Assembly source file has been formatted for the FASM assembler.</text:p>
      <text:p text:style-name="P1567">; The following 3 commands assemble, give executable permissions, and run the program</text:p>
      <text:p text:style-name="P1568">;</text:p>
      <text:p text:style-name="P1569">; <text:s text:c="2"/>fasm main.asm</text:p>
      <text:p text:style-name="P1570">; <text:s text:c="2"/>chmod +x main</text:p>
      <text:p text:style-name="P1571">;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572"># Using Linux System calls for 64-bit</text:p>
      <text:p text:style-name="P1573"># Tested with GNU Assembler on Debian 12 (bookworm)</text:p>
      <text:p text:style-name="P1574"># It uses Chastity's putstring function for output</text:p>
      <text:p text:style-name="P1575"/>
      <text:p text:style-name="P1576">.global _start</text:p>
      <text:p text:style-name="P1577"/>
      <text:p text:style-name="P1578">.text</text:p>
      <text:p text:style-name="P1579"/>
      <text:p text:style-name="P1580">_start:</text:p>
      <text:p text:style-name="P1581"/>
      <text:p text:style-name="P1582">mov $main_string,%rax # move address of string into rax register</text:p>
      <text:p text:style-name="P1583">call <text:s text:c="2"/>putstring <text:s text:c="5"/># call the putstring function Chastity wrote</text:p>
      <text:p text:style-name="P1584">mov <text:s text:c="3"/>$0x3c,%eax <text:s text:c="4"/># system call 60 is exit</text:p>
      <text:p text:style-name="P1585">mov <text:s text:c="3"/>$0x0,%edi <text:s text:c="5"/># we want to return code 0</text:p>
      <text:p text:style-name="P1586">syscall <text:s text:c="14"/># end program with system call</text:p>
      <text:p text:style-name="P1587"/>
      <text:p text:style-name="P1588">main_string:</text:p>
      <text:p text:style-name="P1589">.string "This program runs in Linux!\n"</text:p>
      <text:p text:style-name="P1590"/>
      <text:p text:style-name="P1591">putstring: <text:s text:c="11"/># the start of the putstring function</text:p>
      <text:p text:style-name="P1592">push <text:s text:c="2"/>%rax</text:p>
      <text:p text:style-name="P1593">push <text:s text:c="2"/>%rbx</text:p>
      <text:p text:style-name="P1594">push <text:s text:c="2"/>%rcx</text:p>
      <text:p text:style-name="P1595">push <text:s text:c="2"/>%rdx</text:p>
      <text:p text:style-name="P1596">mov <text:s text:c="3"/>%rax,%rbx</text:p>
      <text:p text:style-name="P1597"/>
      <text:p text:style-name="P1598">putstring_strlen_start:</text:p>
      <text:p text:style-name="P1599">cmpb <text:s text:c="2"/>$0x0,(%rbx)</text:p>
      <text:p text:style-name="P1600">je <text:s text:c="4"/>putstring_strlen_end</text:p>
      <text:p text:style-name="P1601">inc <text:s text:c="3"/>%rbx</text:p>
      <text:p text:style-name="P1602">jmp <text:s text:c="3"/>putstring_strlen_start</text:p>
      <text:p text:style-name="P1603"/>
      <text:p text:style-name="P1604">putstring_strlen_end:</text:p>
      <text:p text:style-name="P1605">sub <text:s text:c="3"/>%rax,%rbx # subtract rax from rbx for number of bytes to write</text:p>
      <text:p text:style-name="P1606">mov <text:s text:c="3"/>%rbx,%rdx # copy number of bytes from rbx to rdx</text:p>
      <text:p text:style-name="P1607">mov <text:s text:c="3"/>%rax,%rsi # address of string to output</text:p>
      <text:p text:style-name="P1608">mov <text:s text:c="3"/>$0x1,%edi # file handler 1 is stdout</text:p>
      <text:p text:style-name="P1609">mov <text:s text:c="3"/>$0x1,%rax # system call 1 is write</text:p>
      <text:p text:style-name="P1610">syscall</text:p>
      <text:p text:style-name="P1611">pop <text:s text:c="3"/>%rdx</text:p>
      <text:p text:style-name="P1612">pop <text:s text:c="3"/>%rcx</text:p>
      <text:p text:style-name="P1613">pop <text:s text:c="3"/>%rbx</text:p>
      <text:p text:style-name="P1614">pop <text:s text:c="3"/>%rax</text:p>
      <text:p text:style-name="P1615">ret</text:p>
      <text:p text:style-name="P1616"/>
      <text:p text:style-name="P1617"># This Assembly source file has been formatted for the GNU assembler.</text:p>
      <text:p text:style-name="P1618"># The following makefile rule has commands to assemble, link, and run the program</text:p>
      <text:p text:style-name="P1619">#</text:p>
      <text:p text:style-name="P1620">#main-gas:</text:p>
      <text:p text:style-name="P1621"># <text:s text:c="2"/>gcc -nostdlib -nostartfiles -nodefaultlibs -static main.s -o main</text:p>
      <text:p text:style-name="P1622"># <text:s text:c="2"/>strip main</text:p>
      <text:p text:style-name="P1623">#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24">0 AND 0 == 0</text:p>
      <text:p text:style-name="P1625">0 AND 1 == 0 <text:s text:c="3"/></text:p>
      <text:p text:style-name="P1626">1 AND 0 == 0</text:p>
      <text:p text:style-name="P1627">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28">0 OR 0 == 0</text:p>
      <text:p text:style-name="P1629">0 OR 1 == 1 </text:p>
      <text:p text:style-name="P1630">1 OR 0 == 1</text:p>
      <text:p text:style-name="P1631">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32">0 XOR 0 == 0</text:p>
      <text:p text:style-name="P1633">0 XOR 1 == 1 <text:s text:c="3"/></text:p>
      <text:p text:style-name="P1634">1 XOR 0 == 1</text:p>
      <text:p text:style-name="P1635">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36">00001000 == <text:s text:c="1"/>8 : is the original byte</text:p>
      <text:p text:style-name="P1637"/>
      <text:p text:style-name="P1638">00010000 == 16 : original left shift 1</text:p>
      <text:p text:style-name="P1639">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40">org 100h</text:p>
      <text:p text:style-name="P1641"/>
      <text:p text:style-name="P1642">main:</text:p>
      <text:p text:style-name="P1643"/>
      <text:p text:style-name="P1644">mov word [radix],10 ; choose radix for integer input/output</text:p>
      <text:p text:style-name="P1645">mov word [int_width],1</text:p>
      <text:p text:style-name="P1646"/>
      <text:p text:style-name="P1647">mov di,1987</text:p>
      <text:p text:style-name="P1648">mov si,38</text:p>
      <text:p text:style-name="P1649"/>
      <text:p text:style-name="P1650">mov ax,di</text:p>
      <text:p text:style-name="P1651">call putint</text:p>
      <text:p text:style-name="P1652">mov ax,si</text:p>
      <text:p text:style-name="P1653">call putint</text:p>
      <text:p text:style-name="P1654">call putline</text:p>
      <text:p text:style-name="P1655"/>
      <text:p text:style-name="P1656">fake_add:</text:p>
      <text:p text:style-name="P1657">mov ax,di</text:p>
      <text:p text:style-name="P1658">xor di,si</text:p>
      <text:p text:style-name="P1659">and si,ax</text:p>
      <text:p text:style-name="P1660">shl si,1</text:p>
      <text:p text:style-name="P1661">jnz fake_add</text:p>
      <text:p text:style-name="P1662"/>
      <text:p text:style-name="P1663">mov ax,di</text:p>
      <text:p text:style-name="P1664">call putint</text:p>
      <text:p text:style-name="P1665">mov ax,si</text:p>
      <text:p text:style-name="P1666">call putint</text:p>
      <text:p text:style-name="P1667"/>
      <text:p text:style-name="P1668">mov ax,4C00h</text:p>
      <text:p text:style-name="P1669">int 21h</text:p>
      <text:p text:style-name="P1670"/>
      <text:p text:style-name="P1671">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672">org 100h</text:p>
      <text:p text:style-name="P1673"/>
      <text:p text:style-name="P1674">main:</text:p>
      <text:p text:style-name="P1675"/>
      <text:p text:style-name="P1676">mov word [radix],10 ; choose radix for integer input/output</text:p>
      <text:p text:style-name="P1677">mov word [int_width],1</text:p>
      <text:p text:style-name="P1678"/>
      <text:p text:style-name="P1679">mov di,2025</text:p>
      <text:p text:style-name="P1680">mov si,38</text:p>
      <text:p text:style-name="P1681"/>
      <text:p text:style-name="P1682">mov ax,di</text:p>
      <text:p text:style-name="P1683">call putint</text:p>
      <text:p text:style-name="P1684">mov ax,si</text:p>
      <text:p text:style-name="P1685">call putint</text:p>
      <text:p text:style-name="P1686">call putline</text:p>
      <text:p text:style-name="P1687"/>
      <text:p text:style-name="P1688">fake_sub:</text:p>
      <text:p text:style-name="P1689">xor di,si</text:p>
      <text:p text:style-name="P1690">and si,di</text:p>
      <text:p text:style-name="P1691">shl si,1</text:p>
      <text:p text:style-name="P1692">jnz fake_sub</text:p>
      <text:p text:style-name="P1693"/>
      <text:p text:style-name="P1694">mov ax,di</text:p>
      <text:p text:style-name="P1695">call putint</text:p>
      <text:p text:style-name="P1696">mov ax,si</text:p>
      <text:p text:style-name="P1697">call putint</text:p>
      <text:p text:style-name="P1698"/>
      <text:p text:style-name="P1699">mov ax,4C00h</text:p>
      <text:p text:style-name="P1700">int 21h</text:p>
      <text:p text:style-name="P1701"/>
      <text:p text:style-name="P1702">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e final program in this book, I have prepared something special. It is a command-line hex editor written entirely in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echo brillient &gt; company.txt’</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03">company.txt</text:p>
      <text:p text:style-name="P1704">00000000 62 72 69 6C 6C 69 65 6E 74 0D 0A <text:s text:c="15"/>brillient..</text:p>
      <text:p text:style-name="P1705">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06">company.txt</text:p>
      <text:p text:style-name="P1707">00000000 62 72 69 6C 6C 69 61 6E 74 0D 0A <text:s text:c="15"/>brilliant..</text:p>
      <text:p text:style-name="P1708">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09">chastehex:</text:p>
      <text:p text:style-name="P1710">hexdump a file:</text:p>
      <text:p text:style-name="P1711"><text:s text:c="4"/>chex file</text:p>
      <text:p text:style-name="P1712">read a byte:</text:p>
      <text:p text:style-name="P1713"><text:s text:c="4"/>chex file address</text:p>
      <text:p text:style-name="P1714">write a byte:</text:p>
      <text:p text:style-name="P1715"><text:s text:c="4"/>chex file address value</text:p>
      <text:p text:style-name="P1716">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17">org 100h <text:s text:c="4"/>;DOS programs start at this address</text:p>
      <text:p text:style-name="P1718"/>
      <text:p text:style-name="P1719">mov word [radix],16 ; can choose radix for integer output!</text:p>
      <text:p text:style-name="P1720"/>
      <text:p text:style-name="P1721">mov ch,0 <text:s text:c="4"/>;zero ch (upper half of cx)</text:p>
      <text:p text:style-name="P1722">mov cl,[80h] ;load length in bytes of the command string</text:p>
      <text:p text:style-name="P1723">cmp cx,0</text:p>
      <text:p text:style-name="P1724">jnz args_exist</text:p>
      <text:p text:style-name="P1725"/>
      <text:p text:style-name="P1726">mov ax,help <text:s text:c="3"/>;if not arguments were given, show a help message</text:p>
      <text:p text:style-name="P1727">call putstring</text:p>
      <text:p text:style-name="P1728">jmp ending <text:s text:c="4"/>;and end the program because there is nothing to do</text:p>
      <text:p text:style-name="P1729"/>
      <text:p text:style-name="P1730">args_exist:</text:p>
      <text:p text:style-name="P1731"/>
      <text:p text:style-name="P1732">mov dx,81h <text:s text:c="8"/>;Point dx to the beginning of string</text:p>
      <text:p text:style-name="P1733">inc dx <text:s text:c="12"/>;go to next char</text:p>
      <text:p text:style-name="P1734">dec cx <text:s text:c="12"/>;but subtract 1 from count</text:p>
      <text:p text:style-name="P1735">mov [arg_index],dx ;save index to variable so dx is free to change as needed</text:p>
      <text:p text:style-name="P1736"/>
      <text:p text:style-name="P1737">;find the end of the string based on length</text:p>
      <text:p text:style-name="P1738">mov ax,dx</text:p>
      <text:p text:style-name="P1739">add ax,cx</text:p>
      <text:p text:style-name="P1740">;now we know where the string ends.</text:p>
      <text:p text:style-name="P1741">mov [arg_string_end],ax ;this is the end of the arg string. important for later</text:p>
      <text:p text:style-name="P1742">;call putint ; print address where entire arg string ends</text:p>
      <text:p text:style-name="P1743"/>
      <text:p text:style-name="P1744">;this routine replaces all non printable characters with zero in the arg string</text:p>
      <text:p text:style-name="P1745">mov bx,dx</text:p>
      <text:p text:style-name="P1746">filter:</text:p>
      <text:p text:style-name="P1747">cmp byte [bx],' '</text:p>
      <text:p text:style-name="P1748">ja notspace ; if char is above space, leave it alone</text:p>
      <text:p text:style-name="P1749">mov byte [bx],0 ;otherwise it counts as a space, change it to a zero</text:p>
      <text:p text:style-name="P1750">notspace:</text:p>
      <text:p text:style-name="P1751">inc bx</text:p>
      <text:p text:style-name="P1752">cmp bx,[arg_string_end] ;are we at the end of the arg string?</text:p>
      <text:p text:style-name="P1753">jnz filter ;if not at end, continue the filter</text:p>
      <text:p text:style-name="P1754"/>
      <text:p text:style-name="P1755">filter_end:</text:p>
      <text:p text:style-name="P1756">mov byte [bx],0 ;terminate the ending with a zero for safety</text:p>
      <text:p text:style-name="P1757"/>
      <text:p text:style-name="P1758">;now that the argument string is prepared, we will try to use the first argument as a filename to open</text:p>
      <text:p text:style-name="P1759"/>
      <text:p text:style-name="P1760">mov ah,3Dh <text:s text:c="8"/>;call number for DOS open existing file</text:p>
      <text:p text:style-name="P1761">mov al,2 <text:s text:c="10"/>;file access: 0=read,1=write,2=read+write</text:p>
      <text:p text:style-name="P1762">mov dx,[arg_index] ;string address to interpret as filename</text:p>
      <text:p text:style-name="P1763">int 21h <text:s text:c="11"/>;DOS call to finalize open function</text:p>
      <text:p text:style-name="P1764"/>
      <text:p text:style-name="P1765">mov [file_handle],ax ;save the file handle</text:p>
      <text:p text:style-name="P1766"/>
      <text:p text:style-name="P1767">jc file_error ;if carry flag is set, we have an error, otherwise, file is open</text:p>
      <text:p text:style-name="P1768"/>
      <text:p text:style-name="P1769">file_opened:</text:p>
      <text:p text:style-name="P1770"/>
      <text:p text:style-name="P1771">mov ax,dx</text:p>
      <text:p text:style-name="P1772">call putstring</text:p>
      <text:p text:style-name="P1773">call putline</text:p>
      <text:p text:style-name="P1774">jmp use_file ;skip past error message and start using the file</text:p>
      <text:p text:style-name="P1775"/>
      <text:p text:style-name="P1776">;this section prints error message and then ends the program if file error found</text:p>
      <text:p text:style-name="P1777"/>
      <text:p text:style-name="P1778">file_error: ;prints error code2=file not found</text:p>
      <text:p text:style-name="P1779">mov ax,dx</text:p>
      <text:p text:style-name="P1780">call putstring</text:p>
      <text:p text:style-name="P1781">call putline</text:p>
      <text:p text:style-name="P1782">mov ax,file_error_message</text:p>
      <text:p text:style-name="P1783">call putstring</text:p>
      <text:p text:style-name="P1784">mov ax,[file_handle]</text:p>
      <text:p text:style-name="P1785">call putint</text:p>
      <text:p text:style-name="P1786">jmp arg_loop_end</text:p>
      <text:p text:style-name="P1787"/>
      <text:p text:style-name="P1788">;how we use the file depends on the number of arguments given</text:p>
      <text:p text:style-name="P1789">;if no arguments other than the filename exist, we do a regular hex dump</text:p>
      <text:p text:style-name="P1790"/>
      <text:p text:style-name="P1791">use_file:</text:p>
      <text:p text:style-name="P1792"/>
      <text:p text:style-name="P1793">mov bp,0 ;set bp to zero because it represents upper 16 bits of file address</text:p>
      <text:p text:style-name="P1794">call get_next_arg ;get address of next arg and return into ax register</text:p>
      <text:p text:style-name="P1795">cmp ax,[arg_string_end] ;this time, if ax equals end of string, we hex dump and then end the program later</text:p>
      <text:p text:style-name="P1796">jz hexdump ;jump to hexdump section</text:p>
      <text:p text:style-name="P1797"/>
      <text:p text:style-name="P1798">;otherwise, if there are more args, ax contains next argument</text:p>
      <text:p text:style-name="P1799">;we will next extra the address from this argument for future operations</text:p>
      <text:p text:style-name="P1800"/>
      <text:p text:style-name="P1801">;first call the strint_32 function to get 32 bit integer from a hex string</text:p>
      <text:p text:style-name="P1802">;the lower 16 bits are stored in ax just like regular strint</text:p>
      <text:p text:style-name="P1803">;upper 16 bits are stored in the "extra_word" memory location</text:p>
      <text:p text:style-name="P1804">;but then I copy them to the bp register to use for the rest of the program</text:p>
      <text:p text:style-name="P1805">call strint_32 </text:p>
      <text:p text:style-name="P1806">mov bp,[extra_word] ;store the upper 16 bits in the bp register</text:p>
      <text:p text:style-name="P1807"/>
      <text:p text:style-name="P1808">;this number will be out new offset to seek to</text:p>
      <text:p text:style-name="P1809">mov [file_offset],ax</text:p>
      <text:p text:style-name="P1810"/>
      <text:p text:style-name="P1811">mov ah,42h <text:s text:c="10"/>;lseek call number</text:p>
      <text:p text:style-name="P1812">mov al,0 <text:s text:c="12"/>;seek origin 00h start of file,01h current file position,02h end of file</text:p>
      <text:p text:style-name="P1813">mov bx,[file_handle]</text:p>
      <text:p text:style-name="P1814">mov cx,bp <text:s text:c="11"/>;upper word of offset</text:p>
      <text:p text:style-name="P1815">mov dx,[file_offset] ;lower word of offset</text:p>
      <text:p text:style-name="P1816">int 21h</text:p>
      <text:p text:style-name="P1817"/>
      <text:p text:style-name="P1818">jc arg_loop_end ;end program if seek error (though I can't imagine how it would fail)</text:p>
      <text:p text:style-name="P1819"/>
      <text:p text:style-name="P1820">;check if there are any more args</text:p>
      <text:p text:style-name="P1821">call get_next_arg</text:p>
      <text:p text:style-name="P1822">cmp ax,[arg_string_end]</text:p>
      <text:p text:style-name="P1823">jz dump_byte ;jump to dump_byte section and continue with read mode</text:p>
      <text:p text:style-name="P1824"/>
      <text:p text:style-name="P1825">jmp arg_loop ;otherwise we jump to the arg loop and write the values as bytes starting at offset</text:p>
      <text:p text:style-name="P1826"/>
      <text:p text:style-name="P1827">;this next section is the reading mode that reads one byte. It only executes if we have not provided bytes to write to the new address</text:p>
      <text:p text:style-name="P1828">;because we have an argument for an address we will read only this byte and display it</text:p>
      <text:p text:style-name="P1829">dump_byte:</text:p>
      <text:p text:style-name="P1830"/>
      <text:p text:style-name="P1831">mov ah,3Fh <text:s text:c="10"/>;call number for read function</text:p>
      <text:p text:style-name="P1832">mov bx,[file_handle] ;store file handle to read from in bx</text:p>
      <text:p text:style-name="P1833">mov cx,1 <text:s text:c="12"/>;we are reading only 1 byte</text:p>
      <text:p text:style-name="P1834">mov dx,byte_array <text:s text:c="3"/>;store the bytes here</text:p>
      <text:p text:style-name="P1835">int 21h</text:p>
      <text:p text:style-name="P1836"/>
      <text:p text:style-name="P1837">mov cx,ax ;number of bytes read</text:p>
      <text:p text:style-name="P1838"/>
      <text:p text:style-name="P1839">;set width to 4 and display extra:offset</text:p>
      <text:p text:style-name="P1840">mov word[int_width],4</text:p>
      <text:p text:style-name="P1841">mov ax,bp</text:p>
      <text:p text:style-name="P1842">call putint</text:p>
      <text:p text:style-name="P1843">mov ax,[file_offset]</text:p>
      <text:p text:style-name="P1844">call putint_and_space</text:p>
      <text:p text:style-name="P1845"/>
      <text:p text:style-name="P1846">cmp cx,1</text:p>
      <text:p text:style-name="P1847">jz not_eof ;skip past here as long as one byte was read otherwise show EOF</text:p>
      <text:p text:style-name="P1848">mov ax,end_of_file</text:p>
      <text:p text:style-name="P1849">call putstring</text:p>
      <text:p text:style-name="P1850">jmp arg_loop_end</text:p>
      <text:p text:style-name="P1851">not_eof:</text:p>
      <text:p text:style-name="P1852"/>
      <text:p text:style-name="P1853">mov ah,0 ;zero upper half of ax</text:p>
      <text:p text:style-name="P1854">mov al,[byte_array]</text:p>
      <text:p text:style-name="P1855"/>
      <text:p text:style-name="P1856">mov word[int_width],2</text:p>
      <text:p text:style-name="P1857">call putint</text:p>
      <text:p text:style-name="P1858">call putline</text:p>
      <text:p text:style-name="P1859"/>
      <text:p text:style-name="P1860"/>
      <text:p text:style-name="P1861">jmp arg_loop_end ;we are done so we end the program</text:p>
      <text:p text:style-name="P1862"/>
      <text:p text:style-name="P1863">hexdump:</text:p>
      <text:p text:style-name="P1864"/>
      <text:p text:style-name="P1865">;we start the loop with a call to read exactly 16 bytes</text:p>
      <text:p text:style-name="P1866"/>
      <text:p text:style-name="P1867">mov ah,3Fh <text:s text:c="10"/>;call number for read function</text:p>
      <text:p text:style-name="P1868">mov bx,[file_handle] ;store file handle to read from in bx</text:p>
      <text:p text:style-name="P1869">mov cx,16 <text:s text:c="11"/>;we are reading sixteen bytes</text:p>
      <text:p text:style-name="P1870">mov dx,byte_array <text:s text:c="3"/>;store the bytes here</text:p>
      <text:p text:style-name="P1871">int 21h</text:p>
      <text:p text:style-name="P1872"/>
      <text:p text:style-name="P1873">;call putint ;check the number of bytes read</text:p>
      <text:p text:style-name="P1874"/>
      <text:p text:style-name="P1875">;important note: the number of bytes read should be 16 or less and this is not an error</text:p>
      <text:p text:style-name="P1876">;zero is expected if we are at the end of the file.</text:p>
      <text:p text:style-name="P1877">;however, if it is zero, we print an EOF message and exit</text:p>
      <text:p text:style-name="P1878"/>
      <text:p text:style-name="P1879">cmp ax,0</text:p>
      <text:p text:style-name="P1880">jnz hexdump_print_row</text:p>
      <text:p text:style-name="P1881">mov ax,end_of_file</text:p>
      <text:p text:style-name="P1882">call putstring</text:p>
      <text:p text:style-name="P1883">jmp arg_loop_end</text:p>
      <text:p text:style-name="P1884"/>
      <text:p text:style-name="P1885">hexdump_print_row:</text:p>
      <text:p text:style-name="P1886"/>
      <text:p text:style-name="P1887">mov [bytes_read],ax</text:p>
      <text:p text:style-name="P1888"/>
      <text:p text:style-name="P1889">call print_bytes_row</text:p>
      <text:p text:style-name="P1890"/>
      <text:p text:style-name="P1891">jmp hexdump ;jump back to hexdump and attempt another read of a row</text:p>
      <text:p text:style-name="P1892"/>
      <text:p text:style-name="P1893">;this loop processes the rest of the arguments</text:p>
      <text:p text:style-name="P1894">;it interprets each one as a byte to write to the current offset</text:p>
      <text:p text:style-name="P1895">;this loop should only execute if a file name and address have already been given</text:p>
      <text:p text:style-name="P1896">arg_loop:</text:p>
      <text:p text:style-name="P1897">mov ax,[arg_index] ;get address of current arg</text:p>
      <text:p text:style-name="P1898">;call putstring</text:p>
      <text:p text:style-name="P1899"/>
      <text:p text:style-name="P1900">call strint_32 ;turn string at address ax into a number returned in ax</text:p>
      <text:p text:style-name="P1901"/>
      <text:p text:style-name="P1902">mov [byte_array],al</text:p>
      <text:p text:style-name="P1903"/>
      <text:p text:style-name="P1904">mov ah,40h <text:s text:c="10"/>; select DOS function 40h write </text:p>
      <text:p text:style-name="P1905">mov bx,[file_handle] ;store file handle to write to in bx</text:p>
      <text:p text:style-name="P1906">mov cx,1 <text:s text:c="12"/>;write 1 byte to this file</text:p>
      <text:p text:style-name="P1907">mov dx,byte_array <text:s text:c="3"/>;write from this address</text:p>
      <text:p text:style-name="P1908">int 21h</text:p>
      <text:p text:style-name="P1909"/>
      <text:p text:style-name="P1910">;set width to 4 and display extra:offset</text:p>
      <text:p text:style-name="P1911">mov word[int_width],4</text:p>
      <text:p text:style-name="P1912">mov ax,bp</text:p>
      <text:p text:style-name="P1913">call putint</text:p>
      <text:p text:style-name="P1914">mov ax,[file_offset]</text:p>
      <text:p text:style-name="P1915">call putint_and_space</text:p>
      <text:p text:style-name="P1916"/>
      <text:p text:style-name="P1917">add word[file_offset],1</text:p>
      <text:p text:style-name="P1918">adc bp,0</text:p>
      <text:p text:style-name="P1919"/>
      <text:p text:style-name="P1920"/>
      <text:p text:style-name="P1921">mov word[int_width],2</text:p>
      <text:p text:style-name="P1922">mov ah,0</text:p>
      <text:p text:style-name="P1923">mov al,[byte_array]</text:p>
      <text:p text:style-name="P1924">call putint</text:p>
      <text:p text:style-name="P1925">call putline</text:p>
      <text:p text:style-name="P1926"/>
      <text:p text:style-name="P1927">call get_next_arg ;get address of next arg and return into ax register</text:p>
      <text:p text:style-name="P1928"/>
      <text:p text:style-name="P1929">cmp ax,[arg_string_end] ;if the ax register contains address of the end of args string, end program to avoid failure</text:p>
      <text:p text:style-name="P1930">jz arg_loop_end</text:p>
      <text:p text:style-name="P1931">jmp arg_loop</text:p>
      <text:p text:style-name="P1932"/>
      <text:p text:style-name="P1933">arg_loop_end: ;this is the correct end of the program</text:p>
      <text:p text:style-name="P1934"/>
      <text:p text:style-name="P1935">;close the file if it is open</text:p>
      <text:p text:style-name="P1936">mov ah,3Eh</text:p>
      <text:p text:style-name="P1937">mov bx,[file_handle]</text:p>
      <text:p text:style-name="P1938">int 21h</text:p>
      <text:p text:style-name="P1939"/>
      <text:p text:style-name="P1940">ending:</text:p>
      <text:p text:style-name="P1941">mov ax,4C00h ; Exit program</text:p>
      <text:p text:style-name="P1942">int 21h</text:p>
      <text:p text:style-name="P1943"/>
      <text:p text:style-name="P1944">arg_string_end dw 0</text:p>
      <text:p text:style-name="P1945">arg_index dw 0</text:p>
      <text:p text:style-name="P1946">file_error_message db 'Could not open the file! Error number: ',0</text:p>
      <text:p text:style-name="P1947">file_handle dw 0</text:p>
      <text:p text:style-name="P1948">read_error_message db 'Failure during reading of file. Error number: ',0</text:p>
      <text:p text:style-name="P1949">end_of_file db 'EOF',0</text:p>
      <text:p text:style-name="P1950"/>
      <text:p text:style-name="P1951">;where we will store data from the file</text:p>
      <text:p text:style-name="P1952">byte_array db 16 dup '?',0</text:p>
      <text:p text:style-name="P1953">file_offset dw 0,0</text:p>
      <text:p text:style-name="P1954">bytes_read dw 0</text:p>
      <text:p text:style-name="P1955"/>
      <text:p text:style-name="P1956"/>
      <text:p text:style-name="P1957">;function to move ahead to the next art</text:p>
      <text:p text:style-name="P1958">;only works after the filter has been applied to turn all spaces into zeroes</text:p>
      <text:p text:style-name="P1959"/>
      <text:p text:style-name="P1960">get_next_arg:</text:p>
      <text:p text:style-name="P1961">mov bx,[arg_index] ;dx has address of current arg</text:p>
      <text:p text:style-name="P1962">find_zero:</text:p>
      <text:p text:style-name="P1963">cmp byte [bx],0</text:p>
      <text:p text:style-name="P1964">jz found_zero</text:p>
      <text:p text:style-name="P1965">inc bx</text:p>
      <text:p text:style-name="P1966">jmp find_zero ; this char is not zero, go to the next char</text:p>
      <text:p text:style-name="P1967">found_zero:</text:p>
      <text:p text:style-name="P1968"/>
      <text:p text:style-name="P1969">find_non_zero:</text:p>
      <text:p text:style-name="P1970">cmp bx,[arg_string_end]</text:p>
      <text:p text:style-name="P1971">jz arg_finish ;if bx is already at end, nothing left to find</text:p>
      <text:p text:style-name="P1972">cmp byte [bx],0</text:p>
      <text:p text:style-name="P1973">jnz arg_finish ;if this char is not zero we have found the next string!</text:p>
      <text:p text:style-name="P1974">inc bx</text:p>
      <text:p text:style-name="P1975">jmp find_non_zero ;otherwise, keep looking</text:p>
      <text:p text:style-name="P1976"/>
      <text:p text:style-name="P1977">arg_finish:</text:p>
      <text:p text:style-name="P1978">mov [arg_index],bx ; save this index to variable</text:p>
      <text:p text:style-name="P1979">mov ax,bx ;but also save it to ax register for use</text:p>
      <text:p text:style-name="P1980">ret</text:p>
      <text:p text:style-name="P1981"/>
      <text:p text:style-name="P1982">;this function prints a row of hex bytes</text:p>
      <text:p text:style-name="P1983">;each row is 16 bytes</text:p>
      <text:p text:style-name="P1984">print_bytes_row:</text:p>
      <text:p text:style-name="P1985">mov cx,[bytes_read] ;number of bytes read</text:p>
      <text:p text:style-name="P1986"/>
      <text:p text:style-name="P1987">;set width to 4 and display extra:offset</text:p>
      <text:p text:style-name="P1988">mov word[int_width],4</text:p>
      <text:p text:style-name="P1989">mov ax,bp</text:p>
      <text:p text:style-name="P1990">call putint</text:p>
      <text:p text:style-name="P1991">mov ax,[file_offset]</text:p>
      <text:p text:style-name="P1992">call putint_and_space</text:p>
      <text:p text:style-name="P1993"/>
      <text:p text:style-name="P1994">add [file_offset],cx</text:p>
      <text:p text:style-name="P1995">adc bp,0</text:p>
      <text:p text:style-name="P1996"/>
      <text:p text:style-name="P1997">mov ah,0 ;zero upper half of ax</text:p>
      <text:p text:style-name="P1998">mov bx,byte_array</text:p>
      <text:p text:style-name="P1999"/>
      <text:p text:style-name="P2000">mov word[int_width],2</text:p>
      <text:p text:style-name="P2001"/>
      <text:p text:style-name="P2002">print_byte:</text:p>
      <text:p text:style-name="P2003">mov al,[bx]</text:p>
      <text:p text:style-name="P2004">call putint_and_space</text:p>
      <text:p text:style-name="P2005">inc bx</text:p>
      <text:p text:style-name="P2006">dec cx</text:p>
      <text:p text:style-name="P2007">cmp cx,0</text:p>
      <text:p text:style-name="P2008">jnz print_byte</text:p>
      <text:p text:style-name="P2009"/>
      <text:p text:style-name="P2010">;optionally, print chars after hex bytes</text:p>
      <text:p text:style-name="P2011">call print_bytes_row_text</text:p>
      <text:p text:style-name="P2012">call putline</text:p>
      <text:p text:style-name="P2013"/>
      <text:p text:style-name="P2014">ret</text:p>
      <text:p text:style-name="P2015"/>
      <text:p text:style-name="P2016">space_three db ' <text:s text:c="2"/>',0</text:p>
      <text:p text:style-name="P2017"/>
      <text:p text:style-name="P2018">print_bytes_row_text:</text:p>
      <text:p text:style-name="P2019"/>
      <text:p text:style-name="P2020">mov cx,[bytes_read]</text:p>
      <text:p text:style-name="P2021">pad_spaces:</text:p>
      <text:p text:style-name="P2022">cmp cx,0x10</text:p>
      <text:p text:style-name="P2023">jz pad_spaces_end</text:p>
      <text:p text:style-name="P2024">mov ax,space_three</text:p>
      <text:p text:style-name="P2025">call putstring</text:p>
      <text:p text:style-name="P2026">inc cx</text:p>
      <text:p text:style-name="P2027">jmp pad_spaces</text:p>
      <text:p text:style-name="P2028">pad_spaces_end:</text:p>
      <text:p text:style-name="P2029"/>
      <text:p text:style-name="P2030">mov bx,byte_array</text:p>
      <text:p text:style-name="P2031">mov cx,[bytes_read]</text:p>
      <text:p text:style-name="P2032">next_char:</text:p>
      <text:p text:style-name="P2033">mov ax,0</text:p>
      <text:p text:style-name="P2034">mov al,[bx]</text:p>
      <text:p text:style-name="P2035"/>
      <text:p text:style-name="P2036">;if char is below '0' or above '9', it is outside the range of these and is not a digit</text:p>
      <text:p text:style-name="P2037">cmp al,0x20</text:p>
      <text:p text:style-name="P2038">jb not_printable</text:p>
      <text:p text:style-name="P2039">cmp al,0x7E</text:p>
      <text:p text:style-name="P2040">ja not_printable</text:p>
      <text:p text:style-name="P2041"/>
      <text:p text:style-name="P2042">printable:</text:p>
      <text:p text:style-name="P2043">;if char is in printable range,copy as is and proceed to next index</text:p>
      <text:p text:style-name="P2044">jmp next_index</text:p>
      <text:p text:style-name="P2045"/>
      <text:p text:style-name="P2046">not_printable:</text:p>
      <text:p text:style-name="P2047">mov al,'.' ;otherwise replace with placeholder value</text:p>
      <text:p text:style-name="P2048"/>
      <text:p text:style-name="P2049">next_index:</text:p>
      <text:p text:style-name="P2050">mov [bx],al</text:p>
      <text:p text:style-name="P2051">inc bx</text:p>
      <text:p text:style-name="P2052">dec cx</text:p>
      <text:p text:style-name="P2053">cmp cx,0</text:p>
      <text:p text:style-name="P2054">jnz next_char</text:p>
      <text:p text:style-name="P2055">mov [bx],byte 0 ;make sure string is zero terminated</text:p>
      <text:p text:style-name="P2056"/>
      <text:p text:style-name="P2057">mov ax,byte_array</text:p>
      <text:p text:style-name="P2058">call putstring</text:p>
      <text:p text:style-name="P2059"/>
      <text:p text:style-name="P2060">ret</text:p>
      <text:p text:style-name="P2061"/>
      <text:p text:style-name="P2062">help db 'chastehex:',0Dh,0Ah</text:p>
      <text:p text:style-name="P2063">db 'hexdump a file:',0Dh,0Ah,9,'chex file',0Dh,0Ah</text:p>
      <text:p text:style-name="P2064">db 'read a byte:',0Dh,0Ah,9,'chex file address',0Dh,0Ah</text:p>
      <text:p text:style-name="P2065">db 'write bytes:',0Dh,0Ah,9,'chex file address byte1 byte2 etc.',0Dh,0Ah</text:p>
      <text:p text:style-name="P2066">db 4 dup 0</text:p>
      <text:p text:style-name="P2067"/>
      <text:p text:style-name="P2068">; About the chastelib variant</text:p>
      <text:p text:style-name="P2069"/>
      <text:p text:style-name="P2070">;instead of including chastelib16.asm as a header file</text:p>
      <text:p text:style-name="P2071">;I copy pasted it except that I excluded functions that were not used.</text:p>
      <text:p text:style-name="P2072">;Notably, the strint function is excluded because strint_32 is used instead</text:p>
      <text:p text:style-name="P2073">;This was to squeeze chastehex for DOS down to 1024 bytes.</text:p>
      <text:p text:style-name="P2074"/>
      <text:p text:style-name="P2075">;start of chastelib</text:p>
      <text:p text:style-name="P2076"/>
      <text:p text:style-name="P2077">; This file is where I keep my function definitions.</text:p>
      <text:p text:style-name="P2078">; These are usually my string and integer output routines.</text:p>
      <text:p text:style-name="P2079"/>
      <text:p text:style-name="P2080">;this is my best putstring function for DOS because it uses call 40h of interrupt 21h</text:p>
      <text:p text:style-name="P2081">;this means that it works in a similar way to my Linux Assembly code</text:p>
      <text:p text:style-name="P2082">;the plan is to make both my DOS and Linux functions identical except for the size of registers involved</text:p>
      <text:p text:style-name="P2083"/>
      <text:p text:style-name="P2084">putstring:</text:p>
      <text:p text:style-name="P2085"/>
      <text:p text:style-name="P2086">push ax</text:p>
      <text:p text:style-name="P2087">push bx</text:p>
      <text:p text:style-name="P2088">push cx</text:p>
      <text:p text:style-name="P2089">push dx</text:p>
      <text:p text:style-name="P2090"/>
      <text:p text:style-name="P2091">mov bx,ax <text:s text:c="17"/>;copy ax to bx for use as index register</text:p>
      <text:p text:style-name="P2092"/>
      <text:p text:style-name="P2093">putstring_strlen_start: <text:s text:c="3"/>;this loop finds the length of the string as part of the putstring function</text:p>
      <text:p text:style-name="P2094"/>
      <text:p text:style-name="P2095">cmp [bx], byte 0 <text:s text:c="10"/>;compare this byte with 0</text:p>
      <text:p text:style-name="P2096">jz putstring_strlen_end <text:s text:c="3"/>;if comparison was zero, jump to loop end because we have found the length</text:p>
      <text:p text:style-name="P2097">inc bx <text:s text:c="20"/>;increment bx (add 1)</text:p>
      <text:p text:style-name="P2098">jmp putstring_strlen_start ;jump to the start of the loop and keep trying until we find a zero</text:p>
      <text:p text:style-name="P2099"/>
      <text:p text:style-name="P2100">putstring_strlen_end:</text:p>
      <text:p text:style-name="P2101"/>
      <text:p text:style-name="P2102">sub bx,ax <text:s text:c="17"/>; sub ax from bx to get the difference for number of bytes</text:p>
      <text:p text:style-name="P2103">mov cx,bx <text:s text:c="17"/>; mov bx to cx</text:p>
      <text:p text:style-name="P2104">mov dx,ax <text:s text:c="17"/>; dx will have address of string to write</text:p>
      <text:p text:style-name="P2105"/>
      <text:p text:style-name="P2106">mov ah,40h <text:s text:c="16"/>; select DOS function 40h write </text:p>
      <text:p text:style-name="P2107">mov bx,1 <text:s text:c="18"/>; file handle 1=stdout</text:p>
      <text:p text:style-name="P2108">int 21h <text:s text:c="19"/>; call the DOS kernel</text:p>
      <text:p text:style-name="P2109"/>
      <text:p text:style-name="P2110">pop dx</text:p>
      <text:p text:style-name="P2111">pop cx</text:p>
      <text:p text:style-name="P2112">pop bx</text:p>
      <text:p text:style-name="P2113">pop ax</text:p>
      <text:p text:style-name="P2114"/>
      <text:p text:style-name="P2115">ret</text:p>
      <text:p text:style-name="P2116"/>
      <text:p text:style-name="P2117">;this is the location in memory where digits are written to by the intstr function</text:p>
      <text:p text:style-name="P2118">int_string db 16 dup '?' ;enough bytes to hold maximum size 16-bit binary integer</text:p>
      <text:p text:style-name="P2119">int_string_end db 0 ;zero byte terminator for the integer string</text:p>
      <text:p text:style-name="P2120"/>
      <text:p text:style-name="P2121">radix dw 2 ;radix or base for integer output. 2=binary, 8=octal, 10=decimal, 16=hexadecimal</text:p>
      <text:p text:style-name="P2122">int_width dw 8</text:p>
      <text:p text:style-name="P2123"/>
      <text:p text:style-name="P2124">intstr:</text:p>
      <text:p text:style-name="P2125"/>
      <text:p text:style-name="P2126">mov bx,int_string_end-1 ;find address of lowest digit(just before the newline 0Ah)</text:p>
      <text:p text:style-name="P2127">mov cx,1</text:p>
      <text:p text:style-name="P2128"/>
      <text:p text:style-name="P2129">digits_start:</text:p>
      <text:p text:style-name="P2130"/>
      <text:p text:style-name="P2131">mov dx,0;</text:p>
      <text:p text:style-name="P2132">div word [radix]</text:p>
      <text:p text:style-name="P2133">cmp dx,10</text:p>
      <text:p text:style-name="P2134">jb decimal_digit</text:p>
      <text:p text:style-name="P2135">jge hexadecimal_digit</text:p>
      <text:p text:style-name="P2136"/>
      <text:p text:style-name="P2137">decimal_digit: ;we go here if it is only a digit 0 to 9</text:p>
      <text:p text:style-name="P2138">add dx,'0'</text:p>
      <text:p text:style-name="P2139">jmp save_digit</text:p>
      <text:p text:style-name="P2140"/>
      <text:p text:style-name="P2141">hexadecimal_digit:</text:p>
      <text:p text:style-name="P2142">sub dx,10</text:p>
      <text:p text:style-name="P2143">add dx,'A'</text:p>
      <text:p text:style-name="P2144"/>
      <text:p text:style-name="P2145">save_digit:</text:p>
      <text:p text:style-name="P2146"/>
      <text:p text:style-name="P2147">mov [bx],dl</text:p>
      <text:p text:style-name="P2148">cmp ax,0</text:p>
      <text:p text:style-name="P2149">jz intstr_end</text:p>
      <text:p text:style-name="P2150">dec bx</text:p>
      <text:p text:style-name="P2151">inc cx</text:p>
      <text:p text:style-name="P2152">jmp digits_start</text:p>
      <text:p text:style-name="P2153"/>
      <text:p text:style-name="P2154">intstr_end:</text:p>
      <text:p text:style-name="P2155"/>
      <text:p text:style-name="P2156">prefix_zeros:</text:p>
      <text:p text:style-name="P2157">cmp cx,[int_width]</text:p>
      <text:p text:style-name="P2158">jnb end_zeros</text:p>
      <text:p text:style-name="P2159">dec bx</text:p>
      <text:p text:style-name="P2160">mov [bx],byte '0'</text:p>
      <text:p text:style-name="P2161">inc cx</text:p>
      <text:p text:style-name="P2162">jmp prefix_zeros</text:p>
      <text:p text:style-name="P2163">end_zeros:</text:p>
      <text:p text:style-name="P2164"/>
      <text:p text:style-name="P2165">mov ax,bx ; store string in ax for display later</text:p>
      <text:p text:style-name="P2166"/>
      <text:p text:style-name="P2167">ret</text:p>
      <text:p text:style-name="P2168"/>
      <text:p text:style-name="P2169">;function to print string form of whatever integer is in ax</text:p>
      <text:p text:style-name="P2170">;The radix determines which number base the string form takes.</text:p>
      <text:p text:style-name="P2171">;Anything from 2 to 36 is a valid radix</text:p>
      <text:p text:style-name="P2172">;in practice though, only bases 2,8,10,and 16 will make sense to other programmers</text:p>
      <text:p text:style-name="P2173">;this function does not process anything by itself but calls the combination of my other</text:p>
      <text:p text:style-name="P2174">;functions in the order I intended them to be used.</text:p>
      <text:p text:style-name="P2175"/>
      <text:p text:style-name="P2176">putint: </text:p>
      <text:p text:style-name="P2177"/>
      <text:p text:style-name="P2178">push ax</text:p>
      <text:p text:style-name="P2179">push bx</text:p>
      <text:p text:style-name="P2180">push cx</text:p>
      <text:p text:style-name="P2181">push dx</text:p>
      <text:p text:style-name="P2182"/>
      <text:p text:style-name="P2183">call intstr</text:p>
      <text:p text:style-name="P2184">call putstring</text:p>
      <text:p text:style-name="P2185"/>
      <text:p text:style-name="P2186">pop dx</text:p>
      <text:p text:style-name="P2187">pop cx</text:p>
      <text:p text:style-name="P2188">pop bx</text:p>
      <text:p text:style-name="P2189">pop ax</text:p>
      <text:p text:style-name="P2190"/>
      <text:p text:style-name="P2191">ret</text:p>
      <text:p text:style-name="P2192"/>
      <text:p text:style-name="P2193">;the next utility functions simply print a space or a newline</text:p>
      <text:p text:style-name="P2194">;these help me save code when printing lots of things for debugging</text:p>
      <text:p text:style-name="P2195"/>
      <text:p text:style-name="P2196">space db ' ',0</text:p>
      <text:p text:style-name="P2197">line db 0Dh,0Ah,0</text:p>
      <text:p text:style-name="P2198"/>
      <text:p text:style-name="P2199">putspace:</text:p>
      <text:p text:style-name="P2200">push ax</text:p>
      <text:p text:style-name="P2201">mov ax,space</text:p>
      <text:p text:style-name="P2202">call putstring</text:p>
      <text:p text:style-name="P2203">pop ax</text:p>
      <text:p text:style-name="P2204">ret</text:p>
      <text:p text:style-name="P2205"/>
      <text:p text:style-name="P2206">putline:</text:p>
      <text:p text:style-name="P2207">push ax</text:p>
      <text:p text:style-name="P2208">mov ax,line</text:p>
      <text:p text:style-name="P2209">call putstring</text:p>
      <text:p text:style-name="P2210">pop ax</text:p>
      <text:p text:style-name="P2211">ret</text:p>
      <text:p text:style-name="P2212"/>
      <text:p text:style-name="P2213">;a small function just for the common operation</text:p>
      <text:p text:style-name="P2214">;printing an integer followed by a space</text:p>
      <text:p text:style-name="P2215">;this saves a few bytes in the assembled code</text:p>
      <text:p text:style-name="P2216"/>
      <text:p text:style-name="P2217">putint_and_space:</text:p>
      <text:p text:style-name="P2218">call putint</text:p>
      <text:p text:style-name="P2219">call putspace</text:p>
      <text:p text:style-name="P2220">ret</text:p>
      <text:p text:style-name="P2221"/>
      <text:p text:style-name="P2222">;end of chastelib</text:p>
      <text:p text:style-name="P2223"/>
      <text:p text:style-name="P2224">; About the strint_32 function</text:p>
      <text:p text:style-name="P2225"/>
      <text:p text:style-name="P2226">;this function converts a string pointed to by ax into an integer returned in eax instead</text:p>
      <text:p text:style-name="P2227">;it is a little complicated because it has to account for whether the character in</text:p>
      <text:p text:style-name="P2228">;a string is a decimal digit 0 to 9, or an alphabet character for bases higher than ten</text:p>
      <text:p text:style-name="P2229">;it also checks for both uppercase and lowercase letters for bases 11 to 36</text:p>
      <text:p text:style-name="P2230">;finally, it checks if that letter makes sense for the base.</text:p>
      <text:p text:style-name="P2231">;For example, G to Z cannot be used in hexadecimal, only A to F can</text:p>
      <text:p text:style-name="P2232">;The purpose of writing this function was to be able to accept user input as integers</text:p>
      <text:p text:style-name="P2233"/>
      <text:p text:style-name="P2234">;this version of the strint function has been modified from its original version.</text:p>
      <text:p text:style-name="P2235">;it has been formatted to extract up to 32 bits of data using memory despite using</text:p>
      <text:p text:style-name="P2236">;only 16 bit registers.</text:p>
      <text:p text:style-name="P2237">;It uses the same [radix] and [int_width] variables as the regular 16 bit strint</text:p>
      <text:p text:style-name="P2238"/>
      <text:p text:style-name="P2239">;However, it uses an extra word variable in memory which is designed to store the upper 16 bits of</text:p>
      <text:p text:style-name="P2240">;a 32 bit offset for file seeking. Apparently the DOS system calls support this based on Ralf Browns interrupt list.</text:p>
      <text:p text:style-name="P2241">;I confirmed that it works by writing to higher addresses and reading them</text:p>
      <text:p text:style-name="P2242"/>
      <text:p text:style-name="P2243">;You might wonder why I made a 32 bit variant of this function rather than replacing the original. These are my reasons</text:p>
      <text:p text:style-name="P2244"/>
      <text:p text:style-name="P2245">;1. It only works with hexadecimal in the context of the chastehex program.</text:p>
      <text:p text:style-name="P2246">;2. This function stores extra data every loop and is therefore slower.</text:p>
      <text:p text:style-name="P2247">;3. Most of the time 32 bit data isn't needed as 16 bit DOS can't use 32 bit memory.</text:p>
      <text:p text:style-name="P2248"/>
      <text:p text:style-name="P2249">;This function was a specific case only meant for adding 32 bit support for the DOS version of chastehex.</text:p>
      <text:p text:style-name="P2250">;I also kept the original which only contains support for files less than 64 kilobytes.</text:p>
      <text:p text:style-name="P2251"/>
      <text:p text:style-name="P2252">extra_word dw 0 ;define an extra word(16 bits). The initial value doesn't matter.</text:p>
      <text:p text:style-name="P2253"/>
      <text:p text:style-name="P2254">strint_32:</text:p>
      <text:p text:style-name="P2255"/>
      <text:p text:style-name="P2256">;initialize new variables added to this function</text:p>
      <text:p text:style-name="P2257">mov word[extra_word],0</text:p>
      <text:p text:style-name="P2258"/>
      <text:p text:style-name="P2259">mov bx,ax ;copy string address from ax to bx because eax will be replaced soon!</text:p>
      <text:p text:style-name="P2260">mov ax,0</text:p>
      <text:p text:style-name="P2261"/>
      <text:p text:style-name="P2262">read_strint_32:</text:p>
      <text:p text:style-name="P2263">mov cx,0 ; zero ecx so only lower 8 bits are used</text:p>
      <text:p text:style-name="P2264">mov cl,[bx]</text:p>
      <text:p text:style-name="P2265">inc bx</text:p>
      <text:p text:style-name="P2266">cmp cl,0 ; compare byte at address edx with 0</text:p>
      <text:p text:style-name="P2267">jz strint_end_32 ; if comparison was zero, this is the end of string</text:p>
      <text:p text:style-name="P2268"/>
      <text:p text:style-name="P2269">;if char is below '0' or above '9', it is outside the range of these and is not a digit</text:p>
      <text:p text:style-name="P2270">cmp cl,'0'</text:p>
      <text:p text:style-name="P2271">jb not_digit_32</text:p>
      <text:p text:style-name="P2272">cmp cl,'9'</text:p>
      <text:p text:style-name="P2273">ja not_digit_32</text:p>
      <text:p text:style-name="P2274"/>
      <text:p text:style-name="P2275">;but if it is a digit, then correct and process the character</text:p>
      <text:p text:style-name="P2276">is_digit_32:</text:p>
      <text:p text:style-name="P2277">sub cl,'0'</text:p>
      <text:p text:style-name="P2278">jmp process_char_32</text:p>
      <text:p text:style-name="P2279"/>
      <text:p text:style-name="P2280">not_digit_32:</text:p>
      <text:p text:style-name="P2281">;it isn't a digit, but it could be perhaps and alphabet character</text:p>
      <text:p text:style-name="P2282">;which is a digit in a higher base</text:p>
      <text:p text:style-name="P2283"/>
      <text:p text:style-name="P2284">;if char is below 'A' or above 'Z', it is outside the range of these and is not capital letter</text:p>
      <text:p text:style-name="P2285">cmp cl,'A'</text:p>
      <text:p text:style-name="P2286">jb not_upper_32</text:p>
      <text:p text:style-name="P2287">cmp cl,'Z'</text:p>
      <text:p text:style-name="P2288">ja not_upper_32</text:p>
      <text:p text:style-name="P2289"/>
      <text:p text:style-name="P2290">is_upper_32:</text:p>
      <text:p text:style-name="P2291">sub cl,'A'</text:p>
      <text:p text:style-name="P2292">add cl,10</text:p>
      <text:p text:style-name="P2293">jmp process_char_32</text:p>
      <text:p text:style-name="P2294"/>
      <text:p text:style-name="P2295">not_upper_32:</text:p>
      <text:p text:style-name="P2296"/>
      <text:p text:style-name="P2297">;if char is below 'a' or above 'z', it is outside the range of these and is not lowercase letter</text:p>
      <text:p text:style-name="P2298">cmp cl,'a'</text:p>
      <text:p text:style-name="P2299">jb not_lower_32</text:p>
      <text:p text:style-name="P2300">cmp cl,'z'</text:p>
      <text:p text:style-name="P2301">ja not_lower_32</text:p>
      <text:p text:style-name="P2302"/>
      <text:p text:style-name="P2303">is_lower_32:</text:p>
      <text:p text:style-name="P2304">sub cl,'a'</text:p>
      <text:p text:style-name="P2305">add cl,10</text:p>
      <text:p text:style-name="P2306">jmp process_char_32</text:p>
      <text:p text:style-name="P2307"/>
      <text:p text:style-name="P2308">not_lower_32:</text:p>
      <text:p text:style-name="P2309"/>
      <text:p text:style-name="P2310">;if we have reached this point, result invalid and end function</text:p>
      <text:p text:style-name="P2311">jmp strint_end_32</text:p>
      <text:p text:style-name="P2312"/>
      <text:p text:style-name="P2313">process_char_32:</text:p>
      <text:p text:style-name="P2314"/>
      <text:p text:style-name="P2315">cmp cx,[radix] ;compare char with radix</text:p>
      <text:p text:style-name="P2316">jae strint_end_32 ;if this value is above or equal to radix, it is too high despite being a valid digit/alpha</text:p>
      <text:p text:style-name="P2317"/>
      <text:p text:style-name="P2318">;before we process the character, to avoid data loss, we shift bits into the [extra_word]</text:p>
      <text:p text:style-name="P2319">push ax</text:p>
      <text:p text:style-name="P2320">shr ax,12 ;shift exactly 12 bits to keep the lowest hex digit of ax</text:p>
      <text:p text:style-name="P2321">shl word[extra_word],4 ;shift the [extra_word] 4 bits to make room for the hex digit </text:p>
      <text:p text:style-name="P2322">add [extra_word],ax</text:p>
      <text:p text:style-name="P2323">pop ax</text:p>
      <text:p text:style-name="P2324"/>
      <text:p text:style-name="P2325">mov dx,0 ;zero edx because it is used in mul sometimes</text:p>
      <text:p text:style-name="P2326">mul word [radix] <text:s text:c="3"/>;mul eax with radix</text:p>
      <text:p text:style-name="P2327">add ax,cx</text:p>
      <text:p text:style-name="P2328"/>
      <text:p text:style-name="P2329">jmp read_strint_32 ;jump back and continue the loop if nothing has exited it</text:p>
      <text:p text:style-name="P2330"/>
      <text:p text:style-name="P2331">strint_end_32:</text:p>
      <text:p text:style-name="P2332"/>
      <text:p text:style-name="P2333">ret</text:p>
      <text:p text:style-name="First_20_paragraph">But perhaps most impressive is that the assembled binary is only 1024 bytes. Here it is:</text:p>
      <text:h text:style-name="Heading_20_2" text:outline-level="2"><text:bookmark-start text:name="chex.com"/>chex.com<text:bookmark-end text:name="chex.com"/></text:h>
      <text:p text:style-name="P2334">chex.com</text:p>
      <text:p text:style-name="P2335">00000000 C7 06 28 04 10 00 B5 00 8A 0E 80 00 83 F9 00 75 ..(............u</text:p>
      <text:p text:style-name="P2336">00000010 09 B8 75 03 E8 E0 02 E9 42 01 BA 81 00 42 49 89 ..u.....B....BI.</text:p>
      <text:p text:style-name="P2337">00000020 16 63 02 89 D0 01 C8 A3 61 02 89 D3 80 3F 20 77 .c......a....? w</text:p>
      <text:p text:style-name="P2338">00000030 03 C6 07 00 43 3B 1E 61 02 75 F1 C6 07 00 B4 3D ....C;.a.u.....=</text:p>
      <text:p text:style-name="P2339">00000040 B0 02 8B 16 63 02 CD 21 A3 8D 02 72 0A 89 D0 E8 ....c..!...r....</text:p>
      <text:p text:style-name="P2340">00000050 A5 02 E8 2E 03 EB 17 89 D0 E8 9B 02 E8 24 03 B8 .............$..</text:p>
      <text:p text:style-name="P2341">00000060 65 02 E8 92 02 A1 8D 02 E8 FB 02 E9 E6 00 BD 00 e...............</text:p>
      <text:p text:style-name="P2342">00000070 00 E8 65 01 3B 06 61 02 74 6B E8 18 03 8B 2E 93 ..e.;.a.tk......</text:p>
      <text:p text:style-name="P2343">00000080 04 A3 D3 02 B4 42 B0 00 8B 1E 8D 02 89 E9 8B 16 .....B..........</text:p>
      <text:p text:style-name="P2344">00000090 D3 02 CD 21 0F 82 BC 00 E8 3E 01 3B 06 61 02 74 ...!.....&gt;.;.a.t</text:p>
      <text:p text:style-name="P2345">000000A0 02 EB 65 B4 3F 8B 1E 8D 02 B9 01 00 BA C2 02 CD ..e.?...........</text:p>
      <text:p text:style-name="P2346">000000B0 21 89 C1 C7 06 2A 04 04 00 89 E8 E8 A8 02 A1 D3 !....*..........</text:p>
      <text:p text:style-name="P2347">000000C0 02 E8 C8 02 83 F9 01 74 09 B8 BE 02 E8 28 02 E9 .......t.....(..</text:p>
      <text:p text:style-name="P2348">000000D0 82 00 B4 00 A0 C2 02 C7 06 2A 04 02 00 E8 86 02 .........*......</text:p>
      <text:p text:style-name="P2349">000000E0 E8 A0 02 EB 6F B4 3F 8B 1E 8D 02 B9 10 00 BA C2 ....o.?.........</text:p>
      <text:p text:style-name="P2350">000000F0 02 CD 21 83 F8 00 75 08 B8 BE 02 E8 F9 01 EB 54 ..!...u........T</text:p>
      <text:p text:style-name="P2351">00000100 A3 D7 02 E8 F4 00 EB DD A1 63 02 E8 87 02 A2 C2 .........c......</text:p>
      <text:p text:style-name="P2352">00000110 02 B4 40 8B 1E 8D 02 B9 01 00 BA C2 02 CD 21 C7 ..@...........!.</text:p>
      <text:p text:style-name="P2353">00000120 06 2A 04 04 00 89 E8 E8 3C 02 A1 D3 02 E8 5C 02 .*......&lt;.....\.</text:p>
      <text:p text:style-name="P2354">00000130 83 06 D3 02 01 83 D5 00 C7 06 2A 04 02 00 B4 00 ..........*.....</text:p>
      <text:p text:style-name="P2355">00000140 A0 C2 02 E8 20 02 E8 3A 02 E8 8D 00 3B 06 61 02 .... ..:....;.a.</text:p>
      <text:p text:style-name="P2356">00000150 74 02 EB B4 B4 3E 8B 1E 8D 02 CD 21 B8 00 4C CD t....&gt;.....!..L.</text:p>
      <text:p text:style-name="P2357">00000160 21 00 00 00 00 43 6F 75 6C 64 20 6E 6F 74 20 6F !....Could not o</text:p>
      <text:p text:style-name="P2358">00000170 70 65 6E 20 74 68 65 20 66 69 6C 65 21 20 45 72 pen the file! Er</text:p>
      <text:p text:style-name="P2359">00000180 72 6F 72 20 6E 75 6D 62 65 72 3A 20 00 00 00 46 ror number: ...F</text:p>
      <text:p text:style-name="P2360">00000190 61 69 6C 75 72 65 20 64 75 72 69 6E 67 20 72 65 ailure during re</text:p>
      <text:p text:style-name="P2361">000001A0 61 64 69 6E 67 20 6F 66 20 66 69 6C 65 2E 20 45 ading of file. E</text:p>
      <text:p text:style-name="P2362">000001B0 72 72 6F 72 20 6E 75 6D 62 65 72 3A 20 00 45 4F rror number: .EO</text:p>
      <text:p text:style-name="P2363">000001C0 46 00 3F 3F 3F 3F 3F 3F 3F 3F 3F 3F 3F 3F 3F 3F F.??????????????</text:p>
      <text:p text:style-name="P2364">000001D0 3F 3F 00 00 00 00 00 00 00 8B 1E 63 02 80 3F 00 ??.........c..?.</text:p>
      <text:p text:style-name="P2365">000001E0 74 03 43 EB F8 3B 1E 61 02 74 08 80 3F 00 75 03 t.C..;.a.t..?.u.</text:p>
      <text:p text:style-name="P2366">000001F0 43 EB F2 89 1E 63 02 89 D8 C3 8B 0E D7 02 C7 06 C....c..........</text:p>
      <text:p text:style-name="P2367">00000200 2A 04 04 00 89 E8 E8 5D 01 A1 D3 02 E8 7D 01 01 *......].....}..</text:p>
      <text:p text:style-name="P2368">00000210 0E D3 02 83 D5 00 B4 00 BB C2 02 C7 06 2A 04 02 .............*..</text:p>
      <text:p text:style-name="P2369">00000220 00 8A 07 E8 66 01 43 49 83 F9 00 75 F4 E8 08 00 ....f.CI...u....</text:p>
      <text:p text:style-name="P2370">00000230 E8 50 01 C3 20 20 20 00 8B 0E D7 02 83 F9 10 74 .P.. <text:s text:c="2"/>........t</text:p>
      <text:p text:style-name="P2371">00000240 09 B8 34 03 E8 B0 00 41 EB F2 BB C2 02 8B 0E D7 ..4....A........</text:p>
      <text:p text:style-name="P2372">00000250 02 B8 00 00 8A 07 3C 20 72 06 3C 7E 77 02 EB 02 ......&lt; r.&lt;~w...</text:p>
      <text:p text:style-name="P2373">00000260 B0 2E 88 07 43 49 83 F9 00 75 E6 C6 07 00 B8 C2 ....CI...u......</text:p>
      <text:p text:style-name="P2374">00000270 02 E8 83 00 C3 63 68 61 73 74 65 68 65 78 3A 0D .....chastehex:.</text:p>
      <text:p text:style-name="P2375">00000280 0A 68 65 78 64 75 6D 70 20 61 20 66 69 6C 65 3A .hexdump a file:</text:p>
      <text:p text:style-name="P2376">00000290 0D 0A 09 63 68 65 78 20 66 69 6C 65 0D 0A 72 65 ...chex file..re</text:p>
      <text:p text:style-name="P2377">000002A0 61 64 20 61 20 62 79 74 65 3A 0D 0A 09 63 68 65 ad a byte:...che</text:p>
      <text:p text:style-name="P2378">000002B0 78 20 66 69 6C 65 20 61 64 64 72 65 73 73 0D 0A x file address..</text:p>
      <text:p text:style-name="P2379">000002C0 77 72 69 74 65 20 62 79 74 65 73 3A 0D 0A 09 63 write bytes:...c</text:p>
      <text:p text:style-name="P2380">000002D0 68 65 78 20 66 69 6C 65 20 61 64 64 72 65 73 73 hex file address</text:p>
      <text:p text:style-name="P2381">000002E0 20 62 79 74 65 31 20 62 79 74 65 32 20 65 74 63 <text:s text:c="1"/>byte1 byte2 etc</text:p>
      <text:p text:style-name="P2382">000002F0 2E 0D 0A 00 00 00 00 50 53 51 52 89 C3 80 3F 00 .......PSQR...?.</text:p>
      <text:p text:style-name="P2383">00000300 74 03 43 EB F8 29 C3 89 D9 89 C2 B4 40 BB 01 00 t.C..)......@...</text:p>
      <text:p text:style-name="P2384">00000310 CD 21 5A 59 5B 58 C3 3F 3F 3F 3F 3F 3F 3F 3F 3F .!ZY[X.?????????</text:p>
      <text:p text:style-name="P2385">00000320 3F 3F 3F 3F 3F 3F 3F 00 02 00 08 00 BB 26 04 B9 ???????......&amp;..</text:p>
      <text:p text:style-name="P2386">00000330 01 00 BA 00 00 F7 36 28 04 83 FA 0A 72 02 7D 05 ......6(....r.}.</text:p>
      <text:p text:style-name="P2387">00000340 83 C2 30 EB 06 83 EA 0A 83 C2 41 88 17 83 F8 00 ..0.......A.....</text:p>
      <text:p text:style-name="P2388">00000350 74 04 4B 41 EB DC 3B 0E 2A 04 73 07 4B C6 07 30 t.KA..;.*.s.K..0</text:p>
      <text:p text:style-name="P2389">00000360 41 EB F3 89 D8 C3 50 53 51 52 E8 BF FF E8 87 FF A.....PSQR......</text:p>
      <text:p text:style-name="P2390">00000370 5A 59 5B 58 C3 20 00 0D 0A 00 50 B8 75 04 E8 76 ZY[X. ....P.u..v</text:p>
      <text:p text:style-name="P2391">00000380 FF 58 C3 50 B8 77 04 E8 6D FF 58 C3 E8 D7 FF E8 .X.P.w..m.X.....</text:p>
      <text:p text:style-name="P2392">00000390 E8 FF C3 00 00 C7 06 93 04 00 00 89 C3 B8 00 00 ................</text:p>
      <text:p text:style-name="P2393">000003A0 B9 00 00 8A 0F 43 80 F9 00 74 54 80 F9 30 72 0A .....C...tT..0r.</text:p>
      <text:p text:style-name="P2394">000003B0 80 F9 39 77 05 80 E9 30 EB 26 80 F9 41 72 0D 80 ..9w...0.&amp;..Ar..</text:p>
      <text:p text:style-name="P2395">000003C0 F9 5A 77 08 80 E9 41 80 C1 0A EB 14 80 F9 61 72 .Zw...A.......ar</text:p>
      <text:p text:style-name="P2396">000003D0 0D 80 F9 7A 77 08 80 E9 61 80 C1 0A EB 02 EB 1F ...zw...a.......</text:p>
      <text:p text:style-name="P2397">000003E0 3B 0E 28 04 73 19 50 C1 E8 0C C1 26 93 04 04 01 ;.(.s.P....&amp;....</text:p>
      <text:p text:style-name="P2398">000003F0 06 93 04 58 BA 00 00 F7 26 28 04 01 C8 EB A1 C3 ...X....&amp;(......</text:p>
      <text:p text:style-name="P2399">EOF</text:p>
      <text:p text:style-name="First_20_paragraph">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I have written this same program for Linux in both Assembly and C forms but the DOS version remains the one that I am most proud of because it is my highest achievement on the first operating system I ever used.</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These were originally copied from the files “INTERRUP.F” in Ralf Brown’s Interrupt List. However, the formatting was not compatible with Markdown and so I have made some effort to make it readable on modern devices that certainly didn’t exist when Ralf Brown was alive and DOS was in common usage. This information is essential for knowing which numbers to put in which registers.</text:p>
      <text:h text:style-name="Heading_20_2" text:outline-level="2"><text:bookmark-start text:name="d-2100-terminate-program"/>D-2100-TERMINATE PROGRAM<text:bookmark-end text:name="d-2100-terminate-program"/></text:h>
      <text:p text:style-name="First_20_paragraph">INT 21 - DOS 1+ - TERMINATE PROGRAM AH = 00h CS = PSP segment</text:p>
      <text:p text:style-name="P2400">Although this call will often end the program, it does not return a value back to the operating system like <text:s text:c="1"/>INT 21/AH=4Ch does. However, it can save a few bytes when trying to make the smallest .com files, so it is worth mentioning.</text:p>
      <text:h text:style-name="Heading_20_2" text:outline-level="2"><text:bookmark-start text:name="d-2101-read-character"/>D-2101-READ CHARACTER<text:bookmark-end text:name="d-2101-read-character"/></text:h>
      <text:p text:style-name="First_20_paragraph">INT 21 - DOS 1+ - READ CHARACTER FROM STANDARD INPUT, WITH ECHO</text:p>
      <text:p text:style-name="P2401">AH = 01h</text:p>
      <text:p text:style-name="First_20_paragraph">Return: AL = character read</text:p>
      <text:p text:style-name="Text_20_body">This could be used to read characters one at a time for reading a string.</text:p>
      <text:h text:style-name="Heading_20_2" text:outline-level="2"><text:bookmark-start text:name="d-2102-write-character"/>D-2102-WRITE CHARACTER<text:bookmark-end text:name="d-2102-write-character"/></text:h>
      <text:p text:style-name="First_20_paragraph">INT 21 - DOS 1+ - WRITE CHARACTER TO STANDARD OUTPUT</text:p>
      <text:p text:style-name="P2402">AH = 02h</text:p>
      <text:p text:style-name="P2403">DL = character to write</text:p>
      <text:p text:style-name="First_20_paragraph">Return: AL = last character output</text:p>
      <text:p text:style-name="Text_20_body">As used at the beginning of this book, it prints a single character represented by the number in DL. It can be seen as the equivalent of C’s “putchar”.</text:p>
      <text:h text:style-name="Heading_20_2" text:outline-level="2"><text:bookmark-start text:name="d-2109-write-string"/>D-2109-WRITE STRING<text:bookmark-end text:name="d-2109-write-string"/></text:h>
      <text:p text:style-name="First_20_paragraph">INT 21 - DOS 1+ - WRITE STRING TO STANDARD OUTPUT</text:p>
      <text:p text:style-name="P2404">AH = 09h</text:p>
      <text:p text:style-name="P2405">DS:DX -&gt; '$'-terminated string</text:p>
      <text:p text:style-name="First_20_paragraph">Return: AL = 24h (the ‘$’ terminating the string</text:p>
      <text:p text:style-name="Text_20_body">This function is weird. It prints a string until it finds a dollar sign. This was a way that strings were terminated before the convention of zero terminators like in C or C++ became common. You can save a few bytes by terminating your strings with $ instead of zero. My putstring method expects zero because I follow the modern convention.</text:p>
      <text:h text:style-name="Heading_20_2" text:outline-level="2"><text:bookmark-start text:name="d-2139-mkdir"/>D-2139-MKDIR<text:bookmark-end text:name="d-2139-mkdir"/></text:h>
      <text:p text:style-name="First_20_paragraph">INT 21 - DOS 2+ - “MKDIR” - CREATE SUBDIRECTORY</text:p>
      <text:p text:style-name="P2406">AH = 39h</text:p>
      <text:p text:style-name="P2407">DS:DX -&gt; ASCIZ pathname</text:p>
      <text:p text:style-name="First_20_paragraph">Return: CF clear if successful AX destroyed CF set on error AX = error code (03h,05h) (see #01680 at AH=59h/BX=0000h)</text:p>
      <text:p text:style-name="Text_20_body">I am not sure why someone would create a directory inside an assembly program since it could be done before the program is run and also included in a zip file if someone distributes their programs to other people, but this system call is most likely how DOS’s mkdir command is implemented because it is an important thing to do!</text:p>
      <text:h text:style-name="Heading_20_2" text:outline-level="2"><text:bookmark-start text:name="d-213a-rmdir"/>D-213A-RMDIR<text:bookmark-end text:name="d-213a-rmdir"/></text:h>
      <text:p text:style-name="First_20_paragraph">INT 21 - DOS 2+ - “RMDIR” - REMOVE SUBDIRECTORY</text:p>
      <text:p text:style-name="P2408">AH = 3Ah</text:p>
      <text:p text:style-name="P2409">DS:DX -&gt; ASCIZ pathname of directory to be removed</text:p>
      <text:p text:style-name="First_20_paragraph">Return: CF clear if successful AX destroyed CF set on error AX = error code (03h,05h,06h,10h) (see #01680 at AH=59h/BX=0000h)</text:p>
      <text:p text:style-name="Text_20_body">Notes: directory must be empty (contain only ‘.’ and ‘..’ entries)</text:p>
      <text:h text:style-name="Heading_20_2" text:outline-level="2"><text:bookmark-start text:name="d-213b-chdir"/>D-213B-CHDIR<text:bookmark-end text:name="d-213b-chdir"/></text:h>
      <text:p text:style-name="First_20_paragraph">INT 21 - DOS 2+ - “CHDIR” - SET CURRENT DIRECTORY</text:p>
      <text:p text:style-name="P2410">AH = 3Bh</text:p>
      <text:p text:style-name="P2411">DS:DX -&gt; ASCIZ pathname to become current directory</text:p>
      <text:p text:style-name="P2412"><text:s text:c="1"/>(max 64 bytes)</text:p>
      <text:p text:style-name="P2413"><text:s text:c="1"/></text:p>
      <text:p text:style-name="First_20_paragraph">Return: CF clear if successful AX destroyed CF set on error AX = error code (03h) (see #01680 at AH=59h/BX=0000h)</text:p>
      <text:p text:style-name="Text_20_body">Notes: if new directory name includes a drive letter, the default drive is not changed, only the current directory on that drive</text:p>
      <text:h text:style-name="Heading_20_2" text:outline-level="2"><text:bookmark-start text:name="d-213c-creat"/>D-213C-CREAT<text:bookmark-end text:name="d-213c-creat"/></text:h>
      <text:p text:style-name="First_20_paragraph">INT 21 - DOS 2+ - “CREAT” - CREATE OR TRUNCATE FILE</text:p>
      <text:p text:style-name="P2414">AH = 3Ch</text:p>
      <text:p text:style-name="P2415">CX = file attributes (see #01401)</text:p>
      <text:p text:style-name="P2416">DS:DX -&gt; ASCIZ filename</text:p>
      <text:p text:style-name="First_20_paragraph">Return: CF clear if successful AX = file handle CF set on error AX = error code (03h,04h,05h) (see #01680 at AH=59h/BX=0000h)</text:p>
      <text:p text:style-name="Text_20_body">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h text:style-name="Heading_20_2" text:outline-level="2"><text:bookmark-start text:name="d-213d-open"/>D-213D-OPEN<text:bookmark-end text:name="d-213d-open"/></text:h>
      <text:p text:style-name="First_20_paragraph">INT 21 - DOS 2+ - “OPEN” - OPEN EXISTING FILE</text:p>
      <text:p text:style-name="P2417">AH = 3Dh</text:p>
      <text:p text:style-name="P2418">AL = access and sharing modes (see #01402)</text:p>
      <text:p text:style-name="P2419">DS:DX -&gt; ASCIZ filename</text:p>
      <text:p text:style-name="P2420">CL = attribute mask of files to look for (server call only)</text:p>
      <text:p text:style-name="First_20_paragraph">Return: CF clear if successful AX = file handle CF set on error AX = error code (01h,02h,03h,04h,05h,0Ch,56h) (see #01680 at AH=59h)</text:p>
      <text:p text:style-name="Text_20_body">Bitfields for access and sharing modes:</text:p>
      <text:h text:style-name="Heading_20_3" text:outline-level="3"><text:bookmark-start text:name="table-01402"/>Table 01402<text:bookmark-end text:name="table-01402"/></text:h>
      <text:p text:style-name="First_20_paragraph">Bit(s) Description 2-0 access mode</text:p>
      <text:list text:style-name="L10">
        <text:list-item>
          <text:p text:style-name="P2421">000 read only</text:p>
        </text:list-item>
        <text:list-item>
          <text:p text:style-name="P2421">001 write only</text:p>
        </text:list-item>
        <text:list-item>
          <text:p text:style-name="P2421">010 read/write</text:p>
        </text:list-item>
      </text:list>
      <text:h text:style-name="Heading_20_2" text:outline-level="2"><text:bookmark-start text:name="d-213e-close"/>D-213E-CLOSE<text:bookmark-end text:name="d-213e-close"/></text:h>
      <text:p text:style-name="First_20_paragraph">INT 21 - DOS 2+ - “CLOSE” - CLOSE FILE</text:p>
      <text:p text:style-name="P2422">AH = 3Eh</text:p>
      <text:p text:style-name="P2423">BX = file handle</text:p>
      <text:p text:style-name="First_20_paragraph">Return: CF clear if successful AX destroyed CF set on error AX = error code (06h) (see #01680 at AH=59h/BX=0000h)</text:p>
      <text:p text:style-name="Text_20_body">Notes: if the file was written to, any pending disk writes are performed, the time and date stamps are set to the current time, and the directory entry is updated</text:p>
      <text:h text:style-name="Heading_20_2" text:outline-level="2"><text:bookmark-start text:name="d-213f-read"/>D-213F-READ<text:bookmark-end text:name="d-213f-read"/></text:h>
      <text:p text:style-name="First_20_paragraph">INT 21 - DOS 2+ - “READ” - READ FROM FILE OR DEVICE</text:p>
      <text:p text:style-name="P2424">AH = 3Fh</text:p>
      <text:p text:style-name="P2425">BX = file handle</text:p>
      <text:p text:style-name="P2426">CX = number of bytes to read</text:p>
      <text:p text:style-name="P2427">DS:DX -&gt; buffer for data</text:p>
      <text:p text:style-name="First_20_paragraph">Return: CF clear if successful AX = number of bytes actually read (0 if at EOF before call) CF set on error AX = error code (05h,06h) (see #01680 at AH=59h/BX=0000h)</text:p>
      <text:p text:style-name="Text_20_body">Notes: data is read beginning at current file position, and the file position is updated after a successful read the returned AX may be smaller than the request in CX if a partial read occurred</text:p>
      <text:h text:style-name="Heading_20_2" text:outline-level="2"><text:bookmark-start text:name="d-2140-write"/>D-2140-WRITE<text:bookmark-end text:name="d-2140-write"/></text:h>
      <text:p text:style-name="First_20_paragraph">INT 21 - DOS 2+ - “WRITE” - WRITE TO FILE OR DEVICE</text:p>
      <text:p text:style-name="P2428">AH = 40h</text:p>
      <text:p text:style-name="P2429">BX = file handle</text:p>
      <text:p text:style-name="P2430">CX = number of bytes to write</text:p>
      <text:p text:style-name="P2431">DS:DX -&gt; data to write</text:p>
      <text:p text:style-name="First_20_paragraph">Return: CF clear if successful AX = number of bytes actually written CF set on error AX = error code (05h,06h) (see #01680 at AH=59h/BX=0000h)</text:p>
      <text:p text:style-name="Text_20_body">Notes: if CX is zero, no data is written, and the file is truncated or extended to the current position data is written beginning at the current file position, and the file position is updated after a successful write</text:p>
      <text:h text:style-name="Heading_20_2" text:outline-level="2"><text:bookmark-start text:name="d-2141-unlink"/>D-2141-UNLINK<text:bookmark-end text:name="d-2141-unlink"/></text:h>
      <text:p text:style-name="First_20_paragraph">INT 21 - DOS 2+ - “UNLINK” - DELETE FILE</text:p>
      <text:p text:style-name="P2432">AH = 41h</text:p>
      <text:p text:style-name="P2433">DS:DX -&gt; ASCIZ filename (no wildcards, but see notes)</text:p>
      <text:p text:style-name="P2434">CL = attribute mask for deletion (server call only, see notes)</text:p>
      <text:p text:style-name="First_20_paragraph">Return: CF clear if successful AX destroyed (DOS 3.3) AL seems to be drive of deleted file CF set on error AX = error code (02h,03h,05h) (see #01680 at AH=59h/BX=0000h)</text:p>
      <text:p text:style-name="Text_20_body">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h text:style-name="Heading_20_2" text:outline-level="2"><text:bookmark-start text:name="d-2142-lseek"/>D-2142-LSEEK<text:bookmark-end text:name="d-2142-lseek"/></text:h>
      <text:p text:style-name="First_20_paragraph">INT 21 - DOS 2+ - “LSEEK” - SET CURRENT FILE POSITION</text:p>
      <text:p text:style-name="P2435">AH = 42h</text:p>
      <text:p text:style-name="P2436">AL = origin of move</text:p>
      <text:p text:style-name="P2437"><text:s text:c="4"/>00h start of file</text:p>
      <text:p text:style-name="P2438"><text:s text:c="4"/>01h current file position</text:p>
      <text:p text:style-name="P2439"><text:s text:c="4"/>02h end of file</text:p>
      <text:p text:style-name="P2440">BX = file handle</text:p>
      <text:p text:style-name="P2441">CX:DX = (signed) offset from origin of new file position</text:p>
      <text:p text:style-name="First_20_paragraph">Return: CF clear if successful DX:AX = new file position in bytes from start of file CF set on error AX = error code (01h,06h) (see #01680 at AH=59h/BX=0000h)</text:p>
      <text:p text:style-name="Text_20_body">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h text:style-name="Heading_20_2" text:outline-level="2"><text:bookmark-start text:name="d-214300-get-file-attributes"/>D-214300-GET FILE ATTRIBUTES<text:bookmark-end text:name="d-214300-get-file-attributes"/></text:h>
      <text:p text:style-name="First_20_paragraph">INT 21 - DOS 2+ - GET FILE ATTRIBUTES</text:p>
      <text:p text:style-name="P2442">AX = 4300h</text:p>
      <text:p text:style-name="P2443">DS:DX -&gt; ASCIZ filename</text:p>
      <text:p text:style-name="First_20_paragraph">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h text:style-name="Heading_20_2" text:outline-level="2"><text:bookmark-start text:name="d-214301-chmod"/>D-214301-CHMOD<text:bookmark-end text:name="d-214301-chmod"/></text:h>
      <text:p text:style-name="First_20_paragraph">INT 21 - DOS 2+ - “CHMOD” - SET FILE ATTRIBUTES</text:p>
      <text:p text:style-name="P2444">AX = 4301h</text:p>
      <text:p text:style-name="P2445">CX = new file attributes (see #01420)</text:p>
      <text:p text:style-name="P2446">DS:DX -&gt; ASCIZ filename</text:p>
      <text:p text:style-name="First_20_paragraph">Return: CF clear if successful AX destroyed CF set on error AX = error code (01h,02h,03h,05h) (see #01680 at AH=59h)</text:p>
      <text:p text:style-name="Text_20_body">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h text:style-name="Heading_20_2" text:outline-level="2"><text:bookmark-start text:name="d-214c-exit"/>D-214C-EXIT<text:bookmark-end text:name="d-214c-exit"/></text:h>
      <text:p text:style-name="First_20_paragraph">INT 21 - DOS 2+ - “EXIT” - TERMINATE WITH RETURN CODE</text:p>
      <text:p text:style-name="P2447">AH = 4Ch</text:p>
      <text:p text:style-name="P2448">AL = return code</text:p>
      <text:p text:style-name="First_20_paragraph">Return: never returns</text:p>
      <text:p text:style-name="Text_20_body">Notes: unless the process is its own parent (see #01378 [offset 16h] at AH=26h), all open files are closed and all memory belonging to the process is freed all network file locks should be removed before calling this function</text:p>
      <text:p text:style-name="Text_20_body">SeeAlso: AH=00h,AH=26h,AH=4Bh,AH=4Dh,INT 15/AH=12h/BH=02h,INT 20,INT 22 SeeAlso: INT 60/DI=0601h</text:p>
      <text:h text:style-name="Heading_20_2" text:outline-level="2"><text:bookmark-start text:name="d-2159-get-error-info"/>D-2159-GET ERROR INFO<text:bookmark-end text:name="d-2159-get-error-info"/></text:h>
      <text:p text:style-name="First_20_paragraph">INT 21 - DOS 3.0+ - GET EXTENDED ERROR INFORMATION</text:p>
      <text:p text:style-name="P2449">AH = 59h</text:p>
      <text:p text:style-name="P2450">BX = 0000h</text:p>
      <text:p text:style-name="First_20_paragraph">Return: AX = extended error code (see #01680) BH = error class (see #01682) BL = recommended action (see #01683) CH = error locus (see #01684) ES:DI may be pointer (see #01681, #01680) CL, DX, SI, BP, and DS destroyed</text:p>
      <text:p text:style-name="Text_20_body">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text:p>
      <text:p text:style-name="Text_20_body">SeeAlso: AH=59h/BX=0001h,AX=5D0Ah,INT 2F/AX=122Dh,INT 24</text:p>
      <text:h text:style-name="Heading_20_3" text:outline-level="3"><text:bookmark-start text:name="table-01680"/>Table 01680<text:bookmark-end text:name="table-01680"/></text:h>
      <text:p text:style-name="First_20_paragraph">Values for DOS extended error code:</text:p>
      <text:list text:style-name="L11">
        <text:list-item>
          <text:p text:style-name="P2451">00h (0) no error</text:p>
        </text:list-item>
        <text:list-item>
          <text:p text:style-name="P2451">01h (1) function number invalid</text:p>
        </text:list-item>
        <text:list-item>
          <text:p text:style-name="P2451">02h (2) file not found</text:p>
        </text:list-item>
        <text:list-item>
          <text:p text:style-name="P2451">03h (3) path not found</text:p>
        </text:list-item>
        <text:list-item>
          <text:p text:style-name="P2451">04h (4) too many open files (no handles available)</text:p>
        </text:list-item>
        <text:list-item>
          <text:p text:style-name="P2451">05h (5) access denied</text:p>
        </text:list-item>
        <text:list-item>
          <text:p text:style-name="P2451">06h (6) invalid handle</text:p>
        </text:list-item>
        <text:list-item>
          <text:p text:style-name="P2451">07h (7) memory control block destroyed</text:p>
        </text:list-item>
        <text:list-item>
          <text:p text:style-name="P2451">08h (8) insufficient memory</text:p>
        </text:list-item>
        <text:list-item>
          <text:p text:style-name="P2451">09h (9) memory block address invalid</text:p>
        </text:list-item>
        <text:list-item>
          <text:p text:style-name="P2451">0Ah (10) environment invalid (usually &gt;32K in length)</text:p>
        </text:list-item>
        <text:list-item>
          <text:p text:style-name="P2451">0Bh (11) format invalid</text:p>
        </text:list-item>
        <text:list-item>
          <text:p text:style-name="P2451">0Ch (12) access code invalid</text:p>
        </text:list-item>
        <text:list-item>
          <text:p text:style-name="P2451">0Dh (13) data invalid</text:p>
        </text:list-item>
        <text:list-item>
          <text:p text:style-name="P2451">0Eh (14) reserved</text:p>
        </text:list-item>
        <text:list-item>
          <text:p text:style-name="P2451">0Eh (14) (PTS-DOS 6.51+, S/DOS 1.0+) fixup overflow</text:p>
        </text:list-item>
        <text:list-item>
          <text:p text:style-name="P2451">0Fh (15) invalid drive</text:p>
        </text:list-item>
        <text:list-item>
          <text:p text:style-name="P2451">10h (16) attempted to remove current directory</text:p>
        </text:list-item>
        <text:list-item>
          <text:p text:style-name="P2451">11h (17) not same device</text:p>
        </text:list-item>
        <text:list-item>
          <text:p text:style-name="P2451">12h (18) no more files</text:p>
        </text:list-item>
        <text:list-item>
          <text:p text:style-name="P2451">13h (19) disk write-protected</text:p>
        </text:list-item>
        <text:list-item>
          <text:p text:style-name="P2451">14h (20) unknown unit</text:p>
        </text:list-item>
        <text:list-item>
          <text:p text:style-name="P2451">15h (21) drive not ready</text:p>
        </text:list-item>
        <text:list-item>
          <text:p text:style-name="P2451">16h (22) unknown command</text:p>
        </text:list-item>
        <text:list-item>
          <text:p text:style-name="P2451">17h (23) data error (CRC)</text:p>
        </text:list-item>
        <text:list-item>
          <text:p text:style-name="P2451">18h (24) bad request structure length</text:p>
        </text:list-item>
        <text:list-item>
          <text:p text:style-name="P2451">19h (25) seek error</text:p>
        </text:list-item>
        <text:list-item>
          <text:p text:style-name="P2451">1Ah (26) unknown media type (non-DOS disk)</text:p>
        </text:list-item>
        <text:list-item>
          <text:p text:style-name="P2451">1Bh (27) sector not found</text:p>
        </text:list-item>
        <text:list-item>
          <text:p text:style-name="P2451">1Ch (28) printer out of paper</text:p>
        </text:list-item>
        <text:list-item>
          <text:p text:style-name="P2451">1Dh (29) write fault</text:p>
        </text:list-item>
        <text:list-item>
          <text:p text:style-name="P2451">1Eh (30) read fault</text:p>
        </text:list-item>
        <text:list-item>
          <text:p text:style-name="P2451">1Fh (31) general failure</text:p>
        </text:list-item>
        <text:list-item>
          <text:p text:style-name="P2451">20h (32) sharing violation</text:p>
        </text:list-item>
        <text:list-item>
          <text:p text:style-name="P2451">21h (33) lock violation</text:p>
        </text:list-item>
        <text:list-item>
          <text:p text:style-name="P2451">22h (34) disk change invalid (ES:DI -&gt; media ID structure)(see #01681)</text:p>
        </text:list-item>
        <text:list-item>
          <text:p text:style-name="P2451">23h (35) FCB unavailable</text:p>
        </text:list-item>
        <text:list-item>
          <text:p text:style-name="P2451">23h (35) (PTS-DOS 6.51+, S/DOS 1.0+) bad FAT</text:p>
        </text:list-item>
        <text:list-item>
          <text:p text:style-name="P2451">24h (36) sharing buffer overflow</text:p>
        </text:list-item>
        <text:list-item>
          <text:p text:style-name="P2451">25h (37) (DOS 4.0+) code page mismatch</text:p>
        </text:list-item>
        <text:list-item>
          <text:p text:style-name="P2451">26h (38) (DOS 4.0+) cannot complete file operation (EOF / out of input)</text:p>
        </text:list-item>
        <text:list-item>
          <text:p text:style-name="P2451">27h (39) (DOS 4.0+) insufficient disk space</text:p>
        </text:list-item>
        <text:list-item>
          <text:p text:style-name="P2451">28h-31h reserved</text:p>
        </text:list-item>
      </text:list>
      <text:h text:style-name="Heading_20_2" text:outline-level="2"><text:bookmark-start text:name="d-2162-get-psp-address"/>D-2162-GET PSP ADDRESS<text:bookmark-end text:name="d-2162-get-psp-address"/></text:h>
      <text:p text:style-name="First_20_paragraph">INT 21 - DOS 3.0+ - GET CURRENT PSP ADDRESS</text:p>
      <text:p text:style-name="P2452">AH = 62h</text:p>
      <text:p text:style-name="First_20_paragraph">Return: BX = segment of PSP for current process</text:p>
      <text:p text:style-name="Text_20_body">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5-20T16:27:39Z</meta:creation-date>
    <dc:date>2026-05-20T16:27:39Z</dc:date>
  </office:meta>
</office:document-meta>
</file>