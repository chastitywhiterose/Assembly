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2">
      <style:paragraph-properties fo:margin-top="0in" fo:margin-bottom="0in"/>
    </style:style>
    <style:style style:name="P40" style:family="paragraph" style:parent-style-name="Text_20_body" style:list-style-name="L3">
      <style:paragraph-properties fo:margin-top="0in" fo:margin-bottom="0in"/>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Text_20_body" style:list-style-name="L4">
      <style:paragraph-properties fo:margin-top="0in" fo:margin-bottom="0in"/>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Text_20_body" style:list-style-name="L5">
      <style:paragraph-properties fo:margin-top="0in" fo:margin-bottom="0in"/>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Text_20_body" style:list-style-name="L6">
      <style:paragraph-properties fo:margin-top="0in" fo:margin-bottom="0in"/>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7">
      <style:paragraph-properties fo:margin-top="0in" fo:margin-bottom="0in"/>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Text_20_body" style:list-style-name="L8">
      <style:paragraph-properties fo:margin-top="0in" fo:margin-bottom="0in"/>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Text_20_body" style:list-style-name="L9">
      <style:paragraph-properties fo:margin-top="0in" fo:margin-bottom="0in"/>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Text_20_body" style:list-style-name="L10">
      <style:paragraph-properties fo:margin-top="0in" fo:margin-bottom="0in"/>
    </style:style>
    <style:style style:name="P1650" style:family="paragraph" style:parent-style-name="Text_20_body" style:list-style-name="L11">
      <style:paragraph-properties fo:margin-top="0in" fo:margin-bottom="0in"/>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Text_20_body" style:list-style-name="L12">
      <style:paragraph-properties fo:margin-top="0in" fo:margin-bottom="0in"/>
    </style:style>
    <style:style style:name="P1656" style:family="paragraph" style:parent-style-name="Text_20_body" style:list-style-name="L13">
      <style:paragraph-properties fo:margin-top="0in" fo:margin-bottom="0in"/>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Text_20_body" style:list-style-name="L14">
      <style:paragraph-properties fo:margin-top="0in" fo:margin-bottom="0in"/>
    </style:style>
    <style:style style:name="P2283" style:family="paragraph" style:parent-style-name="Preformatted_20_Text">
    </style:style>
    <style:style style:name="P2284" style:family="paragraph" style:parent-style-name="Text_20_body" style:list-style-name="L15">
      <style:paragraph-properties fo:margin-top="0in" fo:margin-bottom="0in"/>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Preformatted_20_Text">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Preformatted_20_Text">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Text_20_body" style:list-style-name="L16">
      <style:paragraph-properties fo:margin-top="0in" fo:margin-bottom="0in"/>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Preformatted_20_Text">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Preformatted_20_Text">
    </style:style>
    <style:style style:name="P2792" style:family="paragraph" style:parent-style-name="Preformatted_20_Text">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P2822" style:family="paragraph" style:parent-style-name="Preformatted_20_Text">
    </style:style>
    <style:style style:name="P2823" style:family="paragraph" style:parent-style-name="Preformatted_20_Text">
    </style:style>
    <style:style style:name="P2824" style:family="paragraph" style:parent-style-name="Preformatted_20_Text">
    </style:style>
    <style:style style:name="P2825" style:family="paragraph" style:parent-style-name="Preformatted_20_Text">
    </style:style>
    <style:style style:name="P2826" style:family="paragraph" style:parent-style-name="Preformatted_20_Text">
    </style:style>
    <style:style style:name="P2827" style:family="paragraph" style:parent-style-name="Preformatted_20_Text">
    </style:style>
    <style:style style:name="P2828" style:family="paragraph" style:parent-style-name="Preformatted_20_Text">
    </style:style>
    <style:style style:name="P2829" style:family="paragraph" style:parent-style-name="Preformatted_20_Text">
    </style:style>
    <style:style style:name="P2830" style:family="paragraph" style:parent-style-name="Preformatted_20_Text">
    </style:style>
    <style:style style:name="P2831" style:family="paragraph" style:parent-style-name="Preformatted_20_Text">
    </style:style>
    <style:style style:name="P2832" style:family="paragraph" style:parent-style-name="Preformatted_20_Text">
    </style:style>
    <style:style style:name="P2833" style:family="paragraph" style:parent-style-name="Preformatted_20_Text">
    </style:style>
    <style:style style:name="P2834" style:family="paragraph" style:parent-style-name="Preformatted_20_Text">
    </style:style>
    <style:style style:name="P2835" style:family="paragraph" style:parent-style-name="Preformatted_20_Text">
    </style:style>
    <style:style style:name="P2836" style:family="paragraph" style:parent-style-name="Preformatted_20_Text">
    </style:style>
    <style:style style:name="P2837" style:family="paragraph" style:parent-style-name="Preformatted_20_Text">
    </style:style>
    <style:style style:name="P2838" style:family="paragraph" style:parent-style-name="Preformatted_20_Text">
    </style:style>
    <style:style style:name="P2839" style:family="paragraph" style:parent-style-name="Preformatted_20_Text">
    </style:style>
    <style:style style:name="P2840" style:family="paragraph" style:parent-style-name="Preformatted_20_Text">
    </style:style>
    <style:style style:name="P2841" style:family="paragraph" style:parent-style-name="Preformatted_20_Text">
    </style:style>
    <style:style style:name="P2842" style:family="paragraph" style:parent-style-name="Preformatted_20_Text">
    </style:style>
    <style:style style:name="P2843" style:family="paragraph" style:parent-style-name="Preformatted_20_Text">
    </style:style>
    <style:style style:name="P2844" style:family="paragraph" style:parent-style-name="Preformatted_20_Text">
    </style:style>
    <style:style style:name="P2845" style:family="paragraph" style:parent-style-name="Preformatted_20_Text">
    </style:style>
    <style:style style:name="P2846" style:family="paragraph" style:parent-style-name="Preformatted_20_Text">
    </style:style>
    <style:style style:name="P2847" style:family="paragraph" style:parent-style-name="Preformatted_20_Text">
    </style:style>
    <style:style style:name="P2848" style:family="paragraph" style:parent-style-name="Preformatted_20_Text">
    </style:style>
    <style:style style:name="P2849" style:family="paragraph" style:parent-style-name="Preformatted_20_Text">
    </style:style>
    <style:style style:name="P2850" style:family="paragraph" style:parent-style-name="Preformatted_20_Text">
    </style:style>
    <style:style style:name="P2851" style:family="paragraph" style:parent-style-name="Preformatted_20_Text">
    </style:style>
    <style:style style:name="P2852" style:family="paragraph" style:parent-style-name="Preformatted_20_Text">
    </style:style>
    <style:style style:name="P2853" style:family="paragraph" style:parent-style-name="Preformatted_20_Text">
    </style:style>
    <style:style style:name="P2854" style:family="paragraph" style:parent-style-name="Preformatted_20_Text">
    </style:style>
    <style:style style:name="P2855" style:family="paragraph" style:parent-style-name="Preformatted_20_Text">
    </style:style>
    <style:style style:name="P2856" style:family="paragraph" style:parent-style-name="Preformatted_20_Text">
    </style:style>
    <style:style style:name="P2857" style:family="paragraph" style:parent-style-name="Preformatted_20_Text">
    </style:style>
    <style:style style:name="P2858" style:family="paragraph" style:parent-style-name="Preformatted_20_Text">
    </style:style>
    <style:style style:name="P2859" style:family="paragraph" style:parent-style-name="Preformatted_20_Text">
    </style:style>
    <style:style style:name="P2860" style:family="paragraph" style:parent-style-name="Preformatted_20_Text">
    </style:style>
    <style:style style:name="P2861" style:family="paragraph" style:parent-style-name="Preformatted_20_Text">
    </style:style>
    <style:style style:name="P2862" style:family="paragraph" style:parent-style-name="Preformatted_20_Text">
    </style:style>
    <style:style style:name="P2863" style:family="paragraph" style:parent-style-name="Preformatted_20_Text">
    </style:style>
    <style:style style:name="P2864" style:family="paragraph" style:parent-style-name="Preformatted_20_Text">
    </style:style>
    <style:style style:name="P2865" style:family="paragraph" style:parent-style-name="Preformatted_20_Text">
    </style:style>
    <style:style style:name="P2866" style:family="paragraph" style:parent-style-name="Preformatted_20_Text">
    </style:style>
    <style:style style:name="P2867" style:family="paragraph" style:parent-style-name="Preformatted_20_Text">
    </style:style>
    <style:style style:name="P2868" style:family="paragraph" style:parent-style-name="Preformatted_20_Text">
    </style:style>
    <style:style style:name="P2869" style:family="paragraph" style:parent-style-name="Preformatted_20_Text">
    </style:style>
    <style:style style:name="P2870" style:family="paragraph" style:parent-style-name="Preformatted_20_Text">
    </style:style>
    <style:style style:name="P2871" style:family="paragraph" style:parent-style-name="Preformatted_20_Text">
    </style:style>
    <style:style style:name="P2872" style:family="paragraph" style:parent-style-name="Preformatted_20_Text">
    </style:style>
    <style:style style:name="P2873" style:family="paragraph" style:parent-style-name="Preformatted_20_Text">
    </style:style>
    <style:style style:name="P2874" style:family="paragraph" style:parent-style-name="Preformatted_20_Text">
    </style:style>
    <style:style style:name="P2875" style:family="paragraph" style:parent-style-name="Preformatted_20_Text">
    </style:style>
    <style:style style:name="P2876" style:family="paragraph" style:parent-style-name="Preformatted_20_Text">
    </style:style>
    <style:style style:name="P2877" style:family="paragraph" style:parent-style-name="Preformatted_20_Text">
    </style:style>
    <style:style style:name="P2878" style:family="paragraph" style:parent-style-name="Preformatted_20_Text">
    </style:style>
    <style:style style:name="P2879" style:family="paragraph" style:parent-style-name="Preformatted_20_Text">
    </style:style>
    <style:style style:name="P2880" style:family="paragraph" style:parent-style-name="Preformatted_20_Text">
    </style:style>
    <style:style style:name="P2881" style:family="paragraph" style:parent-style-name="Preformatted_20_Text">
    </style:style>
    <style:style style:name="P2882" style:family="paragraph" style:parent-style-name="Preformatted_20_Text">
    </style:style>
    <style:style style:name="P2883" style:family="paragraph" style:parent-style-name="Preformatted_20_Text">
    </style:style>
    <style:style style:name="P2884" style:family="paragraph" style:parent-style-name="Preformatted_20_Text">
    </style:style>
    <style:style style:name="P2885" style:family="paragraph" style:parent-style-name="Preformatted_20_Text">
    </style:style>
    <style:style style:name="P2886" style:family="paragraph" style:parent-style-name="Preformatted_20_Text">
    </style:style>
    <style:style style:name="P2887" style:family="paragraph" style:parent-style-name="Preformatted_20_Text">
    </style:style>
    <style:style style:name="P2888" style:family="paragraph" style:parent-style-name="Preformatted_20_Text">
    </style:style>
    <style:style style:name="P2889" style:family="paragraph" style:parent-style-name="Preformatted_20_Text">
    </style:style>
    <style:style style:name="P2890" style:family="paragraph" style:parent-style-name="Preformatted_20_Text">
    </style:style>
    <style:style style:name="P2891" style:family="paragraph" style:parent-style-name="Preformatted_20_Text">
    </style:style>
    <style:style style:name="P2892" style:family="paragraph" style:parent-style-name="Preformatted_20_Text">
    </style:style>
    <style:style style:name="P2893" style:family="paragraph" style:parent-style-name="Preformatted_20_Text">
    </style:style>
    <style:style style:name="P2894" style:family="paragraph" style:parent-style-name="Preformatted_20_Text">
    </style:style>
    <style:style style:name="P2895" style:family="paragraph" style:parent-style-name="Preformatted_20_Text">
    </style:style>
    <style:style style:name="P2896" style:family="paragraph" style:parent-style-name="Preformatted_20_Text">
    </style:style>
    <style:style style:name="P2897" style:family="paragraph" style:parent-style-name="Preformatted_20_Text">
    </style:style>
    <style:style style:name="P2898" style:family="paragraph" style:parent-style-name="Preformatted_20_Text">
    </style:style>
    <style:style style:name="P2899" style:family="paragraph" style:parent-style-name="Preformatted_20_Text">
    </style:style>
    <style:style style:name="P2900" style:family="paragraph" style:parent-style-name="Preformatted_20_Text">
    </style:style>
    <style:style style:name="P2901" style:family="paragraph" style:parent-style-name="Preformatted_20_Text">
    </style:style>
    <style:style style:name="P2902" style:family="paragraph" style:parent-style-name="Preformatted_20_Text">
    </style:style>
    <style:style style:name="P2903" style:family="paragraph" style:parent-style-name="Preformatted_20_Text">
    </style:style>
    <style:style style:name="P2904" style:family="paragraph" style:parent-style-name="Preformatted_20_Text">
    </style:style>
    <style:style style:name="P2905" style:family="paragraph" style:parent-style-name="Preformatted_20_Text">
    </style:style>
    <style:style style:name="P2906" style:family="paragraph" style:parent-style-name="Preformatted_20_Text">
    </style:style>
    <style:style style:name="P2907" style:family="paragraph" style:parent-style-name="Preformatted_20_Text">
    </style:style>
    <style:style style:name="P2908" style:family="paragraph" style:parent-style-name="Preformatted_20_Text">
    </style:style>
    <style:style style:name="P2909" style:family="paragraph" style:parent-style-name="Preformatted_20_Text">
    </style:style>
    <style:style style:name="P2910" style:family="paragraph" style:parent-style-name="Preformatted_20_Text">
    </style:style>
    <style:style style:name="P2911" style:family="paragraph" style:parent-style-name="Preformatted_20_Text">
    </style:style>
    <style:style style:name="P2912" style:family="paragraph" style:parent-style-name="Preformatted_20_Text">
    </style:style>
    <style:style style:name="P2913" style:family="paragraph" style:parent-style-name="Preformatted_20_Text">
    </style:style>
    <style:style style:name="P2914" style:family="paragraph" style:parent-style-name="Preformatted_20_Text">
    </style:style>
    <style:style style:name="P2915" style:family="paragraph" style:parent-style-name="Preformatted_20_Text">
    </style:style>
    <style:style style:name="P2916" style:family="paragraph" style:parent-style-name="Preformatted_20_Text">
    </style:style>
    <style:style style:name="P2917" style:family="paragraph" style:parent-style-name="Preformatted_20_Text">
    </style:style>
    <style:style style:name="P2918" style:family="paragraph" style:parent-style-name="Preformatted_20_Text">
    </style:style>
    <style:style style:name="P2919" style:family="paragraph" style:parent-style-name="Preformatted_20_Text">
    </style:style>
    <style:style style:name="P2920" style:family="paragraph" style:parent-style-name="Preformatted_20_Text">
    </style:style>
    <style:style style:name="P2921" style:family="paragraph" style:parent-style-name="Preformatted_20_Text">
    </style:style>
    <style:style style:name="P2922" style:family="paragraph" style:parent-style-name="Preformatted_20_Text">
    </style:style>
    <style:style style:name="P2923" style:family="paragraph" style:parent-style-name="Preformatted_20_Text">
    </style:style>
    <style:style style:name="P2924" style:family="paragraph" style:parent-style-name="Preformatted_20_Text">
    </style:style>
    <style:style style:name="P2925" style:family="paragraph" style:parent-style-name="Preformatted_20_Text">
    </style:style>
    <style:style style:name="P2926" style:family="paragraph" style:parent-style-name="Preformatted_20_Text">
    </style:style>
    <style:style style:name="P2927" style:family="paragraph" style:parent-style-name="Preformatted_20_Text">
    </style:style>
    <style:style style:name="P2928" style:family="paragraph" style:parent-style-name="Preformatted_20_Text">
    </style:style>
    <style:style style:name="P2929" style:family="paragraph" style:parent-style-name="Preformatted_20_Text">
    </style:style>
    <style:style style:name="P2930" style:family="paragraph" style:parent-style-name="Preformatted_20_Text">
    </style:style>
    <style:style style:name="P2931" style:family="paragraph" style:parent-style-name="Preformatted_20_Text">
    </style:style>
    <style:style style:name="P2932" style:family="paragraph" style:parent-style-name="Preformatted_20_Text">
    </style:style>
    <style:style style:name="P2933" style:family="paragraph" style:parent-style-name="Preformatted_20_Text">
    </style:style>
    <style:style style:name="P2934" style:family="paragraph" style:parent-style-name="Preformatted_20_Text">
    </style:style>
    <style:style style:name="P2935" style:family="paragraph" style:parent-style-name="Preformatted_20_Text">
    </style:style>
    <style:style style:name="P2936" style:family="paragraph" style:parent-style-name="Preformatted_20_Text">
    </style:style>
    <style:style style:name="P2937" style:family="paragraph" style:parent-style-name="Preformatted_20_Text">
    </style:style>
    <style:style style:name="P2938" style:family="paragraph" style:parent-style-name="Preformatted_20_Text">
    </style:style>
    <style:style style:name="P2939" style:family="paragraph" style:parent-style-name="Preformatted_20_Text">
    </style:style>
    <style:style style:name="P2940" style:family="paragraph" style:parent-style-name="Preformatted_20_Text">
    </style:style>
    <style:style style:name="P2941" style:family="paragraph" style:parent-style-name="Preformatted_20_Text">
    </style:style>
    <style:style style:name="P2942" style:family="paragraph" style:parent-style-name="Preformatted_20_Text">
    </style:style>
    <style:style style:name="P2943" style:family="paragraph" style:parent-style-name="Preformatted_20_Text">
    </style:style>
    <style:style style:name="P2944" style:family="paragraph" style:parent-style-name="Preformatted_20_Text">
    </style:style>
    <style:style style:name="P2945" style:family="paragraph" style:parent-style-name="Preformatted_20_Text">
    </style:style>
    <style:style style:name="P2946" style:family="paragraph" style:parent-style-name="Preformatted_20_Text">
    </style:style>
    <style:style style:name="P2947" style:family="paragraph" style:parent-style-name="Preformatted_20_Text">
    </style:style>
    <style:style style:name="P2948" style:family="paragraph" style:parent-style-name="Preformatted_20_Text">
    </style:style>
    <style:style style:name="P2949" style:family="paragraph" style:parent-style-name="Preformatted_20_Text">
    </style:style>
    <style:style style:name="P2950" style:family="paragraph" style:parent-style-name="Preformatted_20_Text">
    </style:style>
    <style:style style:name="P2951" style:family="paragraph" style:parent-style-name="Preformatted_20_Text">
    </style:style>
    <style:style style:name="P2952" style:family="paragraph" style:parent-style-name="Preformatted_20_Text">
    </style:style>
    <style:style style:name="P2953" style:family="paragraph" style:parent-style-name="Preformatted_20_Text">
    </style:style>
    <style:style style:name="P2954" style:family="paragraph" style:parent-style-name="Preformatted_20_Text">
    </style:style>
    <style:style style:name="P2955" style:family="paragraph" style:parent-style-name="Preformatted_20_Text">
    </style:style>
    <style:style style:name="P2956" style:family="paragraph" style:parent-style-name="Preformatted_20_Text">
    </style:style>
    <style:style style:name="P2957" style:family="paragraph" style:parent-style-name="Preformatted_20_Text">
    </style:style>
    <style:style style:name="P2958" style:family="paragraph" style:parent-style-name="Preformatted_20_Text">
    </style:style>
    <style:style style:name="P2959" style:family="paragraph" style:parent-style-name="Preformatted_20_Text">
    </style:style>
    <style:style style:name="P2960" style:family="paragraph" style:parent-style-name="Preformatted_20_Text">
    </style:style>
    <style:style style:name="P2961" style:family="paragraph" style:parent-style-name="Preformatted_20_Text">
    </style:style>
    <style:style style:name="P2962" style:family="paragraph" style:parent-style-name="Preformatted_20_Text">
    </style:style>
    <style:style style:name="P2963" style:family="paragraph" style:parent-style-name="Preformatted_20_Text">
    </style:style>
    <style:style style:name="P2964" style:family="paragraph" style:parent-style-name="Preformatted_20_Text">
    </style:style>
    <style:style style:name="P2965" style:family="paragraph" style:parent-style-name="Preformatted_20_Text">
    </style:style>
    <style:style style:name="P2966" style:family="paragraph" style:parent-style-name="Preformatted_20_Text">
    </style:style>
    <style:style style:name="P2967" style:family="paragraph" style:parent-style-name="Preformatted_20_Text">
    </style:style>
    <style:style style:name="P2968" style:family="paragraph" style:parent-style-name="Preformatted_20_Text">
    </style:style>
    <style:style style:name="P2969" style:family="paragraph" style:parent-style-name="Preformatted_20_Text">
    </style:style>
    <style:style style:name="P2970" style:family="paragraph" style:parent-style-name="Preformatted_20_Text">
    </style:style>
    <style:style style:name="P2971" style:family="paragraph" style:parent-style-name="Preformatted_20_Text">
    </style:style>
    <style:style style:name="P2972" style:family="paragraph" style:parent-style-name="Preformatted_20_Text">
    </style:style>
    <style:style style:name="P2973" style:family="paragraph" style:parent-style-name="Preformatted_20_Text">
    </style:style>
    <style:style style:name="P2974" style:family="paragraph" style:parent-style-name="Preformatted_20_Text">
    </style:style>
    <style:style style:name="P2975" style:family="paragraph" style:parent-style-name="Preformatted_20_Text">
    </style:style>
    <style:style style:name="P2976" style:family="paragraph" style:parent-style-name="Preformatted_20_Text">
    </style:style>
    <style:style style:name="P2977" style:family="paragraph" style:parent-style-name="Preformatted_20_Text">
    </style:style>
    <style:style style:name="P2978" style:family="paragraph" style:parent-style-name="Preformatted_20_Text">
    </style:style>
    <style:style style:name="P2979" style:family="paragraph" style:parent-style-name="Preformatted_20_Text">
    </style:style>
    <style:style style:name="P2980" style:family="paragraph" style:parent-style-name="Preformatted_20_Text">
    </style:style>
    <style:style style:name="P2981" style:family="paragraph" style:parent-style-name="Preformatted_20_Text">
    </style:style>
    <style:style style:name="P2982" style:family="paragraph" style:parent-style-name="Preformatted_20_Text">
    </style:style>
    <style:style style:name="P2983" style:family="paragraph" style:parent-style-name="Preformatted_20_Text">
    </style:style>
    <style:style style:name="P2984" style:family="paragraph" style:parent-style-name="Preformatted_20_Text">
    </style:style>
    <style:style style:name="P2985" style:family="paragraph" style:parent-style-name="Preformatted_20_Text">
    </style:style>
    <style:style style:name="P2986" style:family="paragraph" style:parent-style-name="Preformatted_20_Text">
    </style:style>
    <style:style style:name="P2987" style:family="paragraph" style:parent-style-name="Preformatted_20_Text">
    </style:style>
    <style:style style:name="P2988" style:family="paragraph" style:parent-style-name="Preformatted_20_Text">
    </style:style>
    <style:style style:name="P2989" style:family="paragraph" style:parent-style-name="Preformatted_20_Text">
    </style:style>
    <style:style style:name="P2990" style:family="paragraph" style:parent-style-name="Preformatted_20_Text">
    </style:style>
    <style:style style:name="P2991" style:family="paragraph" style:parent-style-name="Preformatted_20_Text">
    </style:style>
    <style:style style:name="P2992" style:family="paragraph" style:parent-style-name="Preformatted_20_Text">
    </style:style>
    <style:style style:name="P2993" style:family="paragraph" style:parent-style-name="Preformatted_20_Text">
    </style:style>
    <style:style style:name="P2994" style:family="paragraph" style:parent-style-name="Preformatted_20_Text">
    </style:style>
    <style:style style:name="P2995" style:family="paragraph" style:parent-style-name="Preformatted_20_Text">
    </style:style>
    <style:style style:name="P2996" style:family="paragraph" style:parent-style-name="Preformatted_20_Text">
    </style:style>
    <style:style style:name="P2997" style:family="paragraph" style:parent-style-name="Preformatted_20_Text">
    </style:style>
    <style:style style:name="P2998" style:family="paragraph" style:parent-style-name="Preformatted_20_Text">
    </style:style>
    <style:style style:name="P2999" style:family="paragraph" style:parent-style-name="Preformatted_20_Text">
    </style:style>
    <style:style style:name="P3000" style:family="paragraph" style:parent-style-name="Preformatted_20_Text">
    </style:style>
    <style:style style:name="P3001" style:family="paragraph" style:parent-style-name="Preformatted_20_Text">
    </style:style>
    <style:style style:name="P3002" style:family="paragraph" style:parent-style-name="Preformatted_20_Text">
    </style:style>
    <style:style style:name="P3003" style:family="paragraph" style:parent-style-name="Preformatted_20_Text">
    </style:style>
    <style:style style:name="P3004" style:family="paragraph" style:parent-style-name="Preformatted_20_Text">
    </style:style>
    <style:style style:name="P3005" style:family="paragraph" style:parent-style-name="Preformatted_20_Text">
    </style:style>
    <style:style style:name="P3006" style:family="paragraph" style:parent-style-name="Preformatted_20_Text">
    </style:style>
    <style:style style:name="P3007" style:family="paragraph" style:parent-style-name="Preformatted_20_Text">
    </style:style>
    <style:style style:name="P3008" style:family="paragraph" style:parent-style-name="Preformatted_20_Text">
    </style:style>
    <style:style style:name="P3009" style:family="paragraph" style:parent-style-name="Preformatted_20_Text">
    </style:style>
    <style:style style:name="P3010" style:family="paragraph" style:parent-style-name="Preformatted_20_Text">
    </style:style>
    <style:style style:name="P3011" style:family="paragraph" style:parent-style-name="Preformatted_20_Text">
    </style:style>
    <style:style style:name="P3012" style:family="paragraph" style:parent-style-name="Preformatted_20_Text">
    </style:style>
    <style:style style:name="P3013" style:family="paragraph" style:parent-style-name="Preformatted_20_Text">
    </style:style>
    <style:style style:name="P3014" style:family="paragraph" style:parent-style-name="Preformatted_20_Text">
    </style:style>
    <style:style style:name="P3015" style:family="paragraph" style:parent-style-name="Preformatted_20_Text">
    </style:style>
    <style:style style:name="P3016" style:family="paragraph" style:parent-style-name="Preformatted_20_Text">
    </style:style>
    <style:style style:name="P3017" style:family="paragraph" style:parent-style-name="Preformatted_20_Text">
    </style:style>
    <style:style style:name="P3018" style:family="paragraph" style:parent-style-name="Preformatted_20_Text">
    </style:style>
    <style:style style:name="P3019" style:family="paragraph" style:parent-style-name="Preformatted_20_Text">
    </style:style>
    <style:style style:name="P3020" style:family="paragraph" style:parent-style-name="Preformatted_20_Text">
    </style:style>
    <style:style style:name="P3021" style:family="paragraph" style:parent-style-name="Preformatted_20_Text">
    </style:style>
    <style:style style:name="P3022" style:family="paragraph" style:parent-style-name="Preformatted_20_Text">
    </style:style>
    <style:style style:name="P3023" style:family="paragraph" style:parent-style-name="Preformatted_20_Text">
    </style:style>
    <style:style style:name="P3024" style:family="paragraph" style:parent-style-name="Preformatted_20_Text">
    </style:style>
    <style:style style:name="P3025" style:family="paragraph" style:parent-style-name="Preformatted_20_Text">
    </style:style>
    <style:style style:name="P3026" style:family="paragraph" style:parent-style-name="Preformatted_20_Text">
    </style:style>
    <style:style style:name="P3027" style:family="paragraph" style:parent-style-name="Preformatted_20_Text">
    </style:style>
    <style:style style:name="P3028" style:family="paragraph" style:parent-style-name="Preformatted_20_Text">
    </style:style>
    <style:style style:name="P3029" style:family="paragraph" style:parent-style-name="Preformatted_20_Text">
    </style:style>
    <style:style style:name="P3030" style:family="paragraph" style:parent-style-name="Preformatted_20_Text">
    </style:style>
    <style:style style:name="P3031" style:family="paragraph" style:parent-style-name="Preformatted_20_Text">
    </style:style>
    <style:style style:name="P3032" style:family="paragraph" style:parent-style-name="Preformatted_20_Text">
    </style:style>
    <style:style style:name="P3033" style:family="paragraph" style:parent-style-name="Preformatted_20_Text">
    </style:style>
    <style:style style:name="P3034" style:family="paragraph" style:parent-style-name="Preformatted_20_Text">
    </style:style>
    <style:style style:name="P3035" style:family="paragraph" style:parent-style-name="Preformatted_20_Text">
    </style:style>
    <style:style style:name="P3036" style:family="paragraph" style:parent-style-name="Preformatted_20_Text">
    </style:style>
    <style:style style:name="P3037" style:family="paragraph" style:parent-style-name="Preformatted_20_Text">
    </style:style>
    <style:style style:name="P3038" style:family="paragraph" style:parent-style-name="Preformatted_20_Text">
    </style:style>
    <style:style style:name="P3039" style:family="paragraph" style:parent-style-name="Preformatted_20_Text">
    </style:style>
    <style:style style:name="P3040" style:family="paragraph" style:parent-style-name="Preformatted_20_Text">
    </style:style>
    <style:style style:name="P3041" style:family="paragraph" style:parent-style-name="Preformatted_20_Text">
    </style:style>
    <style:style style:name="P3042" style:family="paragraph" style:parent-style-name="Preformatted_20_Text">
    </style:style>
    <style:style style:name="P3043" style:family="paragraph" style:parent-style-name="Preformatted_20_Text">
    </style:style>
    <style:style style:name="P3044" style:family="paragraph" style:parent-style-name="Preformatted_20_Text">
    </style:style>
    <style:style style:name="P3045" style:family="paragraph" style:parent-style-name="Preformatted_20_Text">
    </style:style>
    <style:style style:name="P3046" style:family="paragraph" style:parent-style-name="Preformatted_20_Text">
    </style:style>
    <style:style style:name="P3047" style:family="paragraph" style:parent-style-name="Preformatted_20_Text">
    </style:style>
    <style:style style:name="P3048" style:family="paragraph" style:parent-style-name="Preformatted_20_Text">
    </style:style>
    <style:style style:name="P3049" style:family="paragraph" style:parent-style-name="Preformatted_20_Text">
    </style:style>
    <style:style style:name="P3050" style:family="paragraph" style:parent-style-name="Preformatted_20_Text">
    </style:style>
    <style:style style:name="P3051" style:family="paragraph" style:parent-style-name="Preformatted_20_Text">
    </style:style>
    <style:style style:name="P3052" style:family="paragraph" style:parent-style-name="Preformatted_20_Text">
    </style:style>
    <style:style style:name="P3053" style:family="paragraph" style:parent-style-name="Preformatted_20_Text">
    </style:style>
    <style:style style:name="P3054" style:family="paragraph" style:parent-style-name="Preformatted_20_Text">
    </style:style>
    <style:style style:name="P3055" style:family="paragraph" style:parent-style-name="Preformatted_20_Text">
    </style:style>
    <style:style style:name="P3056" style:family="paragraph" style:parent-style-name="Preformatted_20_Text">
    </style:style>
    <style:style style:name="P3057" style:family="paragraph" style:parent-style-name="Preformatted_20_Text">
    </style:style>
    <style:style style:name="P3058" style:family="paragraph" style:parent-style-name="Preformatted_20_Text">
    </style:style>
    <style:style style:name="P3059" style:family="paragraph" style:parent-style-name="Preformatted_20_Text">
    </style:style>
    <style:style style:name="P3060" style:family="paragraph" style:parent-style-name="Preformatted_20_Text">
    </style:style>
    <style:style style:name="P3061" style:family="paragraph" style:parent-style-name="Preformatted_20_Text">
    </style:style>
    <style:style style:name="P3062" style:family="paragraph" style:parent-style-name="Preformatted_20_Text">
    </style:style>
    <style:style style:name="P3063" style:family="paragraph" style:parent-style-name="Preformatted_20_Text">
    </style:style>
    <style:style style:name="P3064" style:family="paragraph" style:parent-style-name="Preformatted_20_Text">
    </style:style>
    <style:style style:name="P3065" style:family="paragraph" style:parent-style-name="Preformatted_20_Text">
    </style:style>
    <style:style style:name="P3066" style:family="paragraph" style:parent-style-name="Preformatted_20_Text">
    </style:style>
    <style:style style:name="P3067" style:family="paragraph" style:parent-style-name="Preformatted_20_Text">
    </style:style>
    <style:style style:name="P3068" style:family="paragraph" style:parent-style-name="Preformatted_20_Text">
    </style:style>
    <style:style style:name="P3069" style:family="paragraph" style:parent-style-name="Preformatted_20_Text">
    </style:style>
    <style:style style:name="P3070" style:family="paragraph" style:parent-style-name="Preformatted_20_Text">
    </style:style>
    <style:style style:name="P3071" style:family="paragraph" style:parent-style-name="Preformatted_20_Text">
    </style:style>
    <style:style style:name="P3072" style:family="paragraph" style:parent-style-name="Preformatted_20_Text">
    </style:style>
    <style:style style:name="P3073" style:family="paragraph" style:parent-style-name="Preformatted_20_Text">
    </style:style>
    <style:style style:name="P3074" style:family="paragraph" style:parent-style-name="Preformatted_20_Text">
    </style:style>
    <style:style style:name="P3075" style:family="paragraph" style:parent-style-name="Preformatted_20_Text">
    </style:style>
    <style:style style:name="P3076" style:family="paragraph" style:parent-style-name="Preformatted_20_Text">
    </style:style>
    <style:style style:name="P3077" style:family="paragraph" style:parent-style-name="Preformatted_20_Text">
    </style:style>
    <style:style style:name="P3078" style:family="paragraph" style:parent-style-name="Preformatted_20_Text">
    </style:style>
    <style:style style:name="P3079" style:family="paragraph" style:parent-style-name="Preformatted_20_Text">
    </style:style>
    <style:style style:name="P3080" style:family="paragraph" style:parent-style-name="Preformatted_20_Text">
    </style:style>
    <style:style style:name="P3081" style:family="paragraph" style:parent-style-name="Preformatted_20_Text">
    </style:style>
    <style:style style:name="P3082" style:family="paragraph" style:parent-style-name="Preformatted_20_Text">
    </style:style>
    <style:style style:name="P3083" style:family="paragraph" style:parent-style-name="Preformatted_20_Text">
    </style:style>
    <style:style style:name="P3084" style:family="paragraph" style:parent-style-name="Preformatted_20_Text">
    </style:style>
    <style:style style:name="P3085" style:family="paragraph" style:parent-style-name="Preformatted_20_Text">
    </style:style>
    <style:style style:name="P3086" style:family="paragraph" style:parent-style-name="Preformatted_20_Text">
    </style:style>
    <style:style style:name="P3087" style:family="paragraph" style:parent-style-name="Preformatted_20_Text">
    </style:style>
    <style:style style:name="P3088" style:family="paragraph" style:parent-style-name="Preformatted_20_Text">
    </style:style>
    <style:style style:name="P3089" style:family="paragraph" style:parent-style-name="Preformatted_20_Text">
    </style:style>
    <style:style style:name="P3090" style:family="paragraph" style:parent-style-name="Preformatted_20_Text">
    </style:style>
    <style:style style:name="P3091" style:family="paragraph" style:parent-style-name="Preformatted_20_Text">
    </style:style>
    <style:style style:name="P3092" style:family="paragraph" style:parent-style-name="Preformatted_20_Text">
    </style:style>
    <style:style style:name="P3093" style:family="paragraph" style:parent-style-name="Preformatted_20_Text">
    </style:style>
    <style:style style:name="P3094" style:family="paragraph" style:parent-style-name="Preformatted_20_Text">
    </style:style>
    <style:style style:name="P3095" style:family="paragraph" style:parent-style-name="Preformatted_20_Text">
    </style:style>
    <style:style style:name="P3096" style:family="paragraph" style:parent-style-name="Preformatted_20_Text">
    </style:style>
    <style:style style:name="P3097" style:family="paragraph" style:parent-style-name="Preformatted_20_Text">
    </style:style>
    <style:style style:name="P3098" style:family="paragraph" style:parent-style-name="Preformatted_20_Text">
    </style:style>
    <style:style style:name="P3099" style:family="paragraph" style:parent-style-name="Preformatted_20_Text">
    </style:style>
    <style:style style:name="P3100" style:family="paragraph" style:parent-style-name="Preformatted_20_Text">
    </style:style>
    <style:style style:name="P3101" style:family="paragraph" style:parent-style-name="Preformatted_20_Text">
    </style:style>
    <style:style style:name="P3102" style:family="paragraph" style:parent-style-name="Preformatted_20_Text">
    </style:style>
    <style:style style:name="P3103" style:family="paragraph" style:parent-style-name="Preformatted_20_Text">
    </style:style>
    <style:style style:name="P3104" style:family="paragraph" style:parent-style-name="Preformatted_20_Text">
    </style:style>
    <style:style style:name="P3105" style:family="paragraph" style:parent-style-name="Preformatted_20_Text">
    </style:style>
    <style:style style:name="P3106" style:family="paragraph" style:parent-style-name="Preformatted_20_Text">
    </style:style>
    <style:style style:name="P3107" style:family="paragraph" style:parent-style-name="Preformatted_20_Text">
    </style:style>
    <style:style style:name="P3108" style:family="paragraph" style:parent-style-name="Preformatted_20_Text">
    </style:style>
    <style:style style:name="P3109" style:family="paragraph" style:parent-style-name="Preformatted_20_Text">
    </style:style>
    <style:style style:name="P3110" style:family="paragraph" style:parent-style-name="Preformatted_20_Text">
    </style:style>
    <style:style style:name="P3111" style:family="paragraph" style:parent-style-name="Preformatted_20_Text">
    </style:style>
    <style:style style:name="P3112" style:family="paragraph" style:parent-style-name="Preformatted_20_Text">
    </style:style>
    <style:style style:name="P3113" style:family="paragraph" style:parent-style-name="Preformatted_20_Text">
    </style:style>
    <style:style style:name="P3114" style:family="paragraph" style:parent-style-name="Preformatted_20_Text">
    </style:style>
    <style:style style:name="P3115" style:family="paragraph" style:parent-style-name="Preformatted_20_Text">
    </style:style>
    <style:style style:name="P3116" style:family="paragraph" style:parent-style-name="Preformatted_20_Text">
    </style:style>
    <style:style style:name="P3117" style:family="paragraph" style:parent-style-name="Preformatted_20_Text">
    </style:style>
    <style:style style:name="P3118" style:family="paragraph" style:parent-style-name="Preformatted_20_Text">
    </style:style>
    <style:style style:name="P3119" style:family="paragraph" style:parent-style-name="Preformatted_20_Text">
    </style:style>
    <style:style style:name="P3120" style:family="paragraph" style:parent-style-name="Preformatted_20_Text">
    </style:style>
    <style:style style:name="P3121" style:family="paragraph" style:parent-style-name="Preformatted_20_Text">
    </style:style>
    <style:style style:name="P3122" style:family="paragraph" style:parent-style-name="Preformatted_20_Text">
    </style:style>
    <style:style style:name="P3123" style:family="paragraph" style:parent-style-name="Preformatted_20_Text">
    </style:style>
    <style:style style:name="P3124" style:family="paragraph" style:parent-style-name="Preformatted_20_Text">
    </style:style>
    <style:style style:name="P3125" style:family="paragraph" style:parent-style-name="Preformatted_20_Text">
    </style:style>
    <style:style style:name="P3126" style:family="paragraph" style:parent-style-name="Preformatted_20_Text">
    </style:style>
    <style:style style:name="P3127" style:family="paragraph" style:parent-style-name="Preformatted_20_Text">
    </style:style>
    <style:style style:name="P3128" style:family="paragraph" style:parent-style-name="Preformatted_20_Text">
    </style:style>
    <style:style style:name="P3129" style:family="paragraph" style:parent-style-name="Preformatted_20_Text">
    </style:style>
    <style:style style:name="P3130" style:family="paragraph" style:parent-style-name="Preformatted_20_Text">
    </style:style>
    <style:style style:name="P3131" style:family="paragraph" style:parent-style-name="Preformatted_20_Text">
    </style:style>
    <style:style style:name="P3132" style:family="paragraph" style:parent-style-name="Preformatted_20_Text">
    </style:style>
    <style:style style:name="P3133" style:family="paragraph" style:parent-style-name="Preformatted_20_Text">
    </style:style>
    <style:style style:name="P3134" style:family="paragraph" style:parent-style-name="Preformatted_20_Text">
    </style:style>
    <style:style style:name="P3135" style:family="paragraph" style:parent-style-name="Preformatted_20_Text">
    </style:style>
    <style:style style:name="P3136" style:family="paragraph" style:parent-style-name="Preformatted_20_Text">
    </style:style>
    <style:style style:name="P3137" style:family="paragraph" style:parent-style-name="Preformatted_20_Text">
    </style:style>
    <style:style style:name="P3138" style:family="paragraph" style:parent-style-name="Preformatted_20_Text">
    </style:style>
    <style:style style:name="P3139" style:family="paragraph" style:parent-style-name="Preformatted_20_Text">
    </style:style>
    <style:style style:name="P3140" style:family="paragraph" style:parent-style-name="Preformatted_20_Text">
    </style:style>
    <style:style style:name="P3141" style:family="paragraph" style:parent-style-name="Preformatted_20_Text">
    </style:style>
    <style:style style:name="P3142" style:family="paragraph" style:parent-style-name="Preformatted_20_Text">
    </style:style>
    <style:style style:name="P3143" style:family="paragraph" style:parent-style-name="Preformatted_20_Text">
    </style:style>
    <style:style style:name="P3144" style:family="paragraph" style:parent-style-name="Preformatted_20_Text">
    </style:style>
    <style:style style:name="P3145" style:family="paragraph" style:parent-style-name="Preformatted_20_Text">
    </style:style>
    <style:style style:name="P3146" style:family="paragraph" style:parent-style-name="Preformatted_20_Text">
    </style:style>
    <style:style style:name="P3147" style:family="paragraph" style:parent-style-name="Preformatted_20_Text">
    </style:style>
    <style:style style:name="P3148" style:family="paragraph" style:parent-style-name="Preformatted_20_Text">
    </style:style>
    <style:style style:name="P3149" style:family="paragraph" style:parent-style-name="Preformatted_20_Text">
    </style:style>
    <style:style style:name="P3150" style:family="paragraph" style:parent-style-name="Preformatted_20_Text">
    </style:style>
    <style:style style:name="P3151" style:family="paragraph" style:parent-style-name="Preformatted_20_Text">
    </style:style>
    <style:style style:name="P3152" style:family="paragraph" style:parent-style-name="Preformatted_20_Text">
    </style:style>
    <style:style style:name="P3153" style:family="paragraph" style:parent-style-name="Preformatted_20_Text">
    </style:style>
    <style:style style:name="P3154" style:family="paragraph" style:parent-style-name="Preformatted_20_Text">
    </style:style>
    <style:style style:name="P3155" style:family="paragraph" style:parent-style-name="Preformatted_20_Text">
    </style:style>
    <style:style style:name="P3156" style:family="paragraph" style:parent-style-name="Preformatted_20_Text">
    </style:style>
    <style:style style:name="P3157" style:family="paragraph" style:parent-style-name="Preformatted_20_Text">
    </style:style>
    <style:style style:name="P3158" style:family="paragraph" style:parent-style-name="Preformatted_20_Text">
    </style:style>
    <style:style style:name="P3159" style:family="paragraph" style:parent-style-name="Preformatted_20_Text">
    </style:style>
    <style:style style:name="P3160" style:family="paragraph" style:parent-style-name="Preformatted_20_Text">
    </style:style>
    <style:style style:name="P3161" style:family="paragraph" style:parent-style-name="Preformatted_20_Text">
    </style:style>
    <style:style style:name="P3162" style:family="paragraph" style:parent-style-name="Preformatted_20_Text">
    </style:style>
    <style:style style:name="P3163" style:family="paragraph" style:parent-style-name="Preformatted_20_Text">
    </style:style>
    <style:style style:name="P3164" style:family="paragraph" style:parent-style-name="Preformatted_20_Text">
    </style:style>
    <style:style style:name="P3165" style:family="paragraph" style:parent-style-name="Preformatted_20_Text">
    </style:style>
    <style:style style:name="P3166" style:family="paragraph" style:parent-style-name="Preformatted_20_Text">
    </style:style>
    <style:style style:name="P3167" style:family="paragraph" style:parent-style-name="Preformatted_20_Text">
    </style:style>
    <style:style style:name="P3168" style:family="paragraph" style:parent-style-name="Preformatted_20_Text">
    </style:style>
    <style:style style:name="P3169" style:family="paragraph" style:parent-style-name="Preformatted_20_Text">
    </style:style>
    <style:style style:name="P3170" style:family="paragraph" style:parent-style-name="Preformatted_20_Text">
    </style:style>
    <style:style style:name="P3171" style:family="paragraph" style:parent-style-name="Preformatted_20_Text">
    </style:style>
    <style:style style:name="P3172" style:family="paragraph" style:parent-style-name="Preformatted_20_Text">
    </style:style>
    <style:style style:name="P3173" style:family="paragraph" style:parent-style-name="Preformatted_20_Text">
    </style:style>
    <style:style style:name="P3174" style:family="paragraph" style:parent-style-name="Preformatted_20_Text">
    </style:style>
    <style:style style:name="P3175" style:family="paragraph" style:parent-style-name="Preformatted_20_Text">
    </style:style>
    <style:style style:name="P3176" style:family="paragraph" style:parent-style-name="Preformatted_20_Text">
    </style:style>
    <style:style style:name="P3177" style:family="paragraph" style:parent-style-name="Preformatted_20_Text">
    </style:style>
    <style:style style:name="P3178" style:family="paragraph" style:parent-style-name="Preformatted_20_Text">
    </style:style>
    <style:style style:name="P3179" style:family="paragraph" style:parent-style-name="Preformatted_20_Text">
    </style:style>
    <style:style style:name="P3180" style:family="paragraph" style:parent-style-name="Preformatted_20_Text">
    </style:style>
    <style:style style:name="P3181" style:family="paragraph" style:parent-style-name="Preformatted_20_Text">
    </style:style>
    <style:style style:name="P3182" style:family="paragraph" style:parent-style-name="Preformatted_20_Text">
    </style:style>
    <style:style style:name="P3183" style:family="paragraph" style:parent-style-name="Preformatted_20_Text">
    </style:style>
    <style:style style:name="P3184" style:family="paragraph" style:parent-style-name="Preformatted_20_Text">
    </style:style>
    <style:style style:name="P3185" style:family="paragraph" style:parent-style-name="Preformatted_20_Text">
    </style:style>
    <style:style style:name="P3186" style:family="paragraph" style:parent-style-name="Preformatted_20_Text">
    </style:style>
    <style:style style:name="P3187" style:family="paragraph" style:parent-style-name="Preformatted_20_Text">
    </style:style>
    <style:style style:name="P3188" style:family="paragraph" style:parent-style-name="Preformatted_20_Text">
    </style:style>
    <style:style style:name="P3189" style:family="paragraph" style:parent-style-name="Preformatted_20_Text">
    </style:style>
    <style:style style:name="P3190" style:family="paragraph" style:parent-style-name="Preformatted_20_Text">
    </style:style>
    <style:style style:name="P3191" style:family="paragraph" style:parent-style-name="Preformatted_20_Text">
    </style:style>
    <style:style style:name="P319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F"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9" style:family="table">
      <style:table-properties table:align="center"/>
    </style:style>
    <style:style style:name="Table9.A" style:family="table-column"/>
    <style:style style:name="Table9.B" style:family="table-column"/>
  </office:automatic-styles>
  <office:body>
    <office:text>
      <text:h text:style-name="Heading_20_1" text:outline-level="1"><text:bookmark-start text:name="assembly-arithmetic-algorithms"/>Assembly Arithmetic Algorithms<text:bookmark-end text:name="assembly-arithmetic-algorithms"/></text:h>
      <text:p text:style-name="First_20_paragraph">32-bit Linux Edition</text:p>
      <text:h text:style-name="Heading_20_1" text:outline-level="1"><text:bookmark-start text:name="preface"/>Preface<text:bookmark-end text:name="preface"/></text:h>
      <text:p text:style-name="First_20_paragraph">This book is the Linux edition of Assembly Arithmetic Algorithms. The first book was for 16-bit DOS programming using Assembly. This book is for 32-bit Linux programming using the same assembly language for Intel machines.</text:p>
      <text:p text:style-name="Text_20_body">Although the DOS book was useful, reading it first is not required to understand this book because programming for Linux is very different from what it was for DOS. Using interrupt 0x21 no longer works because the operating system is different. Instead, everything will use interrupt 0x80 because this is how the Linux kernel is called in assembly language when running on a 32-bit Linux operating system.</text:p>
      <text:p text:style-name="Text_20_body">Keep in mind that most Linux distributions today are capable of running 32-bit or 64-bit code. The reason I am teaching 32-bit is that I know it better, and because programs using 32-bit instructions are usually smaller than the same thing written in 64-bit.</text:p>
      <text:p text:style-name="Text_20_body">The Linux distribution I am using to write and test my examples is Debian version 12 (bookworm). It works well enough for what I do on a daily basis. These examples should Assemble on almost any distribution of Linux because the system call numbers are the same on any distro running x86 Intel because they are hardcoded into the Linux kernel.</text:p>
      <text:p text:style-name="Text_20_body">This standard means that the information here is useful to anyone who is running Linux unless their Central Processing Unit is an ARM, RISC-V, or something else. Intel is still the most popular at this time and is traditionally the same type of machine that usually runs Microsoft Windows.</text:p>
      <text:p text:style-name="Text_20_body">So if you happen to have an old computer around with Windows that runs too slow, you might decide to install Linux on it and get started with the world of Free Software and writing your own programs. Linux is a better environment for programming in ANY language (I will explain more about that later).</text:p>
      <text:h text:style-name="Heading_20_1" text:outline-level="1"><text:bookmark-start text:name="introduction"/>Introduction<text:bookmark-end text:name="introduction"/></text:h>
      <text:p text:style-name="First_20_paragraph">First, let me introduce this book by telling you what I will teach you. By the end of this book, you will have enough information to write any text-based console program in the form of a 32-bit Linux “ELF” file.</text:p>
      <text:p text:style-name="Text_20_body">The “ELF” format is an acronym for “Executable and Linkable Format”. This format is used on all modern Linux operating systems and some Unix systems like FreeBSD. The header for this format is slightly complicated, but FASM is capable of generating one for you so that you don’t generally have to worry about creating it yourself.</text:p>
      <text:p text:style-name="Text_20_body">If you are a user who prefers NASM, there are also ways to have one generated for you by the GNU linker, which is already installed on any system that has the GCC compiler. The linker does not require you to write C code because it can also link standard ELF objects created by NASM.</text:p>
      <text:h text:style-name="Heading_20_2" text:outline-level="2"><text:bookmark-start text:name="required-knowledge"/>Required Knowledge<text:bookmark-end text:name="required-knowledge"/></text:h>
      <text:p text:style-name="First_20_paragraph">To get the most out of this book, some background on the Binary and Hexadecimal numeral systems is going to be helpful, but this is not strictly required because I will be providing functions you can use in your code that will convert between decimal (base ten), binary (base two), and hexadecimal (base 16).</text:p>
      <text:p text:style-name="Text_20_body">However, I would say that experience in at least one programming language is necessary for an understanding of terminology like “arrays”, “pointers”, “addresses”, “integers”, “floating point”, etc. I recommend the C Programming Language as a start. C++ is also a good starting language, but it tends to abstract details away that directly apply to Assembly Language, which is the lowest level a human can go for understanding a computer.</text:p>
      <text:p text:style-name="Text_20_body">But specifically in this book about Linux assembly, I will make comparisons between C programs and Assembly because C is usually considered the native language of the Linux kernel. The manual pages of the system calls also show the C prototypes of the functions. Translating these into Assembly has not been easy because information on Assembly doesn’t come by as easy as C or C++. I hope my book will save you the time and trouble I experienced when I first starting writing Assembly programs for Linux.</text:p>
      <text:h text:style-name="Heading_20_2" text:outline-level="2"><text:bookmark-start text:name="low-level"/>Low Level<text:bookmark-end text:name="low-level"/></text:h>
      <text:p text:style-name="First_20_paragraph">Low level is a term that confuses people. People think something high-level is better than low-level. In simple terms, humans consider themselves superior to machines and therefore think themselves higher or more important because of their abstract thought.</text:p>
      <text:p text:style-name="Text_20_body">A computer thinks only in terms of numbers. A computer may not understand “high-level” abstractions such as love, religion, philosophy, etc, but that is not its job. A computer must add, subtract, multiply, and divide. These are the four arithmetic functions that many humans struggle with.</text:p>
      <text:p text:style-name="Text_20_body">Therefore, I ask you, between a human and a computer, who is really low level or high level? In the age of Artificial Intelligence taking over human jobs and beating humans at Chess, we would all do well to take this question seriously.</text:p>
      <text:p text:style-name="Text_20_body">I wrote this book because I think like a machine, and I hope to help others think this way because it is the best way to learn programming and control your computer by writing Assembly Language programs, or to go back to your favorite programming language with a greater understanding of why things work as they do.</text:p>
      <text:h text:style-name="Heading_20_2" text:outline-level="2"><text:bookmark-start text:name="why-linux"/>Why Linux?<text:bookmark-end text:name="why-linux"/></text:h>
      <text:p text:style-name="First_20_paragraph">Linux is a controversial operating system because most people who use a computer just use the operating system that was preinstalled on their computer when they bought it. Usually, this is Windows by Microsoft, MacOS by Apple, or ChromeOS by Google.</text:p>
      <text:p text:style-name="Text_20_body">Therefore, most of these people don’t know that other operating systems exist, unless they are programmers. I am a programmer, and I switched to Linux many years ago on a computer that formerly ran Windows XP and only had 256 megabytes of RAM. It booted up faster than Windows did, and I learned to use the terminal quickly to compile and run my C programs. My DOS background certainly helped me adjust.</text:p>
      <text:p text:style-name="Text_20_body">The average person is not interested in learning about operating systems. They are usually also not interested in learning about number bases other than the default decimal system humans use.</text:p>
      <text:p text:style-name="Text_20_body">This book is not for ordinary people. It is for smart people who love to learn how computers work and also to customize their computing experience in a way that only Linux allows. The source code of everything on a GNU/Linux system is available for people to modify anything they like, either by recompiling the source code or by changing a few configuration files, which are usually in a plain text format.</text:p>
      <text:p text:style-name="Text_20_body">But to explain to the average person why I chose Linux as my primary operating system, I have two reasons.</text:p>
      <text:list text:style-name="L1">
        <text:list-item>
          <text:p text:style-name="P1">My former favorite OS, DOS, is really old and not suited for the modern world of gaming and programming with better text editors and compilers. Linux is as close as I can get to DOS because I can run commands the way I like, but also enjoy the benefits of a GUI environment when I want to.</text:p>
        </text:list-item>
        <text:list-item>
          <text:p text:style-name="P1">Microsoft Windows actively sabotages programming by its forced system updates, reboots, and AI advertising forced into every part of the OS. Also, it is REALLY slow because it spends most of the CPU power spying on you and sending the data to Microsoft and the government so they can kill you as soon as you do something they don’t like.</text:p>
        </text:list-item>
      </text:list>
      <text:h text:style-name="Heading_20_1" text:outline-level="1"><text:bookmark-start text:name="chapter-1-the-first-program"/>Chapter 1: The First Program<text:bookmark-end text:name="chapter-1-the-first-program"/></text:h>
      <text:p text:style-name="First_20_paragraph">For this chapter, I will explain give the source code of an example program that works in Linux, how to assemble it using the tools FASM or NASM, and finally, how the program works line by line.</text:p>
      <text:p text:style-name="Text_20_body">First, here is the source code of a program that looks like nonsense but does something really cool.</text:p>
      <text:p text:style-name="P2">format ELF executable</text:p>
      <text:p text:style-name="P3"/>
      <text:p text:style-name="P4">mov eax,4 <text:s text:c="2"/>; invoke SYS_WRITE (kernel opcode 4 on 32 bit systems)</text:p>
      <text:p text:style-name="P5">mov ebx,1 <text:s text:c="2"/>; write to the STDOUT file</text:p>
      <text:p text:style-name="P6">mov ecx,msg ; pointer/address of string to write</text:p>
      <text:p text:style-name="P7">mov edx,13 <text:s text:c="1"/>; number of bytes to write</text:p>
      <text:p text:style-name="P8">int 80h</text:p>
      <text:p text:style-name="P9"/>
      <text:p text:style-name="P10">mov eax,1 <text:s text:c="2"/>; function SYS_EXIT (kernel opcode 1 on 32 bit systems)</text:p>
      <text:p text:style-name="P11">mov ebx,0 <text:s text:c="2"/>; return 0 status on exit - 'No Errors'</text:p>
      <text:p text:style-name="P12">int 80h</text:p>
      <text:p text:style-name="P13"/>
      <text:p text:style-name="P14">msg db 'Hello World!',0Ah,0</text:p>
      <text:p text:style-name="First_20_paragraph">You will need an assembler. My first recommendation is FASM, the Flat Assembler.</text:p>
      <text:p text:style-name="Text_20_body"><text:a xlink:type="simple" xlink:href="https://flatassembler.net/" office:name=""><text:span text:style-name="Definition">https://flatassembler.net/</text:span></text:a></text:p>
      <text:p text:style-name="Text_20_body">You can download FASM and install it by putting it in your path. The instructions for doing this depend on your operating system but it can be done on Windows, Linux, or even within a DOS operating system. You can assemble your source from any operating system but you will still need a Linux system (either real or emulated) to run the programs made from the source code in this book.</text:p>
      <text:h text:style-name="Heading_20_2" text:outline-level="2"><text:bookmark-start text:name="assemble-with-fasm"/>Assemble with FASM<text:bookmark-end text:name="assemble-with-fasm"/></text:h>
      <text:p text:style-name="First_20_paragraph">To assemble this program with FASM, place the source in a file named “main.asm” and run this command from a terminal opened into the same folder as the file.</text:p>
      <text:p text:style-name="Text_20_body"><text:span text:style-name="Source_Text">fasm main.asm</text:span></text:p>
      <text:p text:style-name="Text_20_body">FASM will automatically create a “main” in the ELF format that is executable. FASM understands by the command of “format ELF executable” that we intend this file to contain code that will be executed. But we are not read to run it yet. We also have to give the operating system permission to run it! The following command will do the trick.</text:p>
      <text:p text:style-name="Text_20_body"><text:span text:style-name="Source_Text">chmod +x main</text:span></text:p>
      <text:p text:style-name="Text_20_body">Now the file will have the Linux permissions to be executed. To execute the program we simple do this command:</text:p>
      <text:p text:style-name="Text_20_body"><text:span text:style-name="Source_Text">./main</text:span></text:p>
      <text:p text:style-name="Text_20_body">The dot and backslash is how you run a program that exists in the current directory. The process is the same as any other Linux command except that the “./” is not needed since they are usually in the path already when you install them with whatever package manager your Linux distribution uses.</text:p>
      <text:p text:style-name="Text_20_body">Anyway, when you run the program, it should output</text:p>
      <text:p text:style-name="P15">Hello World!</text:p>
      <text:p text:style-name="First_20_paragraph">If you have Gnu Make installed on your Linux system (which I highly recommend), you can copy paste the following into a “makefile” to easily build and run your code just by typing “make”.</text:p>
      <text:h text:style-name="Heading_20_2" text:outline-level="2"><text:bookmark-start text:name="makefile-for-fasm-users"/>makefile for FASM users<text:bookmark-end text:name="makefile-for-fasm-users"/></text:h>
      <text:p text:style-name="P16">main-fasm:</text:p>
      <text:p text:style-name="P17"><text:s text:c="4"/>fasm main.asm</text:p>
      <text:p text:style-name="P18"><text:s text:c="4"/>chmod +x main</text:p>
      <text:p text:style-name="P19"><text:s text:c="4"/>./main</text:p>
      <text:p text:style-name="First_20_paragraph">A makefile is basically like a shell script except it has more options. For the most part, you don’t need to worry about the details of how it works because I will be providing any makefiles you will need for the examples in this book. However, I have read the documentation of Gnu Make and I frequently use it to manage converting my books with Pandoc and managing updates to my Git repositories. It is a fabulous tool for any programmer because it allows setting up “rules” for commands you need to run.</text:p>
      <text:h text:style-name="Heading_20_2" text:outline-level="2"><text:bookmark-start text:name="assemble-with-nasm"/>Assemble with NASM<text:bookmark-end text:name="assemble-with-nasm"/></text:h>
      <text:p text:style-name="First_20_paragraph">You can assemble the example program with NASM instead of FASM if you wish. However, you will need to make a few small changes. The following is a form that will be acceptable to NASM and the GNU linker.</text:p>
      <text:p text:style-name="P20">global <text:s text:c="1"/>_start</text:p>
      <text:p text:style-name="P21"/>
      <text:p text:style-name="P22">_start:</text:p>
      <text:p text:style-name="P23"/>
      <text:p text:style-name="P24">section .text</text:p>
      <text:p text:style-name="P25"/>
      <text:p text:style-name="P26">mov eax,4 <text:s text:c="2"/>; invoke SYS_WRITE (kernel opcode 4 on 32 bit systems)</text:p>
      <text:p text:style-name="P27">mov ebx,1 <text:s text:c="2"/>; write to the STDOUT file</text:p>
      <text:p text:style-name="P28">mov ecx,msg ; pointer/address of string to write</text:p>
      <text:p text:style-name="P29">mov edx,13 <text:s text:c="1"/>; number of bytes to write</text:p>
      <text:p text:style-name="P30">int 80h</text:p>
      <text:p text:style-name="P31"/>
      <text:p text:style-name="P32">mov eax,1 <text:s text:c="2"/>; function SYS_EXIT (kernel opcode 1 on 32 bit systems)</text:p>
      <text:p text:style-name="P33">mov ebx,0 <text:s text:c="2"/>; return 0 status on exit - 'No Errors'</text:p>
      <text:p text:style-name="P34">int 80h</text:p>
      <text:p text:style-name="P35"/>
      <text:p text:style-name="P36">section .data</text:p>
      <text:p text:style-name="P37"/>
      <text:p text:style-name="P38">msg db 'Hello World!',0Ah,0</text:p>
      <text:p text:style-name="First_20_paragraph">If you take a look at it, you will see it is the exact same program but that things are separated into “.text” and “.data” sections. This is a rule that most programs follow and it is required by the GNU linker which is very strict about which is code(.text) and which is data that will be read from or written to. Also you will see the global symbol _start which is expected by the linker.</text:p>
      <text:p text:style-name="Text_20_body">The following command will make an ELF object.</text:p>
      <text:p text:style-name="Text_20_body"><text:span text:style-name="Source_Text">nasm -f elf32 main.asm</text:span></text:p>
      <text:p text:style-name="Text_20_body">The object created is not executable but you can make one that is by linking it with the GNU Linker.</text:p>
      <text:p text:style-name="Text_20_body"><text:span text:style-name="Source_Text">ld -m elf_i386 main.o -o main</text:span></text:p>
      <text:p text:style-name="Text_20_body">And finally, you can run the program in the traditional way.</text:p>
      <text:p text:style-name="Text_20_body"><text:span text:style-name="Source_Text">./main</text:span></text:p>
      <text:h text:style-name="Heading_20_2" text:outline-level="2"><text:bookmark-start text:name="interrupt-faq"/>Interrupt FAQ<text:bookmark-end text:name="interrupt-faq"/></text:h>
      <text:p text:style-name="First_20_paragraph">I know you are probably a little bit confused at this point and have many questions such as</text:p>
      <text:list text:style-name="L2">
        <text:list-item>
          <text:p text:style-name="P39">What is an interrupt?</text:p>
        </text:list-item>
        <text:list-item>
          <text:p text:style-name="P39">What is a system call?</text:p>
        </text:list-item>
        <text:list-item>
          <text:p text:style-name="P39">Why do you write your numbers in hexadecimal?</text:p>
        </text:list-item>
        <text:list-item>
          <text:p text:style-name="P39">What is a register?</text:p>
        </text:list-item>
      </text:list>
      <text:p text:style-name="First_20_paragraph">An interrupt is where your code passes control to the operating system which has loaded code to run various functions. Only the Linux kernel has authority to access devices like the console and file system. By placing the right numbers in the right registers and calling interrupt 0x80, we let the kernel “interrupt” our program and then display the data using the information we have given it. Obviously the writers of the kernel know more than I do and chose which registers are used in which functions.</text:p>
      <text:p text:style-name="Text_20_body">A helpful reference I use to remind myself which call numbers to use for interrupts/syscalls is here:</text:p>
      <text:p text:style-name="Text_20_body"><text:a xlink:type="simple" xlink:href="https://www.chromium.org/chromium-os/developer-library/reference/linux-constants/syscalls/#x86-32-bit" office:name=""><text:span text:style-name="Definition">https://www.chromium.org/chromium-os/developer-library/reference/linux-constants/syscalls/#x86-32-bit</text:span></text:a></text:p>
      <text:p text:style-name="Text_20_body">Although that reference is for Chromium-OS, it is Linux based and so the information is valid. It is only a brief reference and I will be explaining more as this book continues.</text:p>
      <text:p text:style-name="Text_20_body">The reason the interrupts and other numbers in my code are in hexadecimal is because most assembly language books and tutorials use them. Hexadecimal is objectively more convenient because it can be more easily converted to and from binary. For now just remember that interupt 80h is actually 128 decimal and for some reason was chosen as the interrupt number for Linux on Intel systems. I have chosen to stick mostly with hexadecimal for this book because it will be relevant later on when I show you other tools which can be used if you understand hexadecimal!</text:p>
      <text:p text:style-name="Text_20_body">A register is a special variable that exists on a specific CPU type. DOS, Windows, and most Linux operating systems run on an Intel 8086 compatible CPU. I will explain the registers and their functions.</text:p>
      <text:h text:style-name="Heading_20_2" text:outline-level="2"><text:bookmark-start text:name="the-general-purpose-registers"/>The General Purpose Registers<text:bookmark-end text:name="the-general-purpose-registers"/></text:h>
      <text:p text:style-name="First_20_paragraph">There are 8 general purpose registers.</text:p>
      <text:list text:style-name="L3">
        <text:list-item>
          <text:p text:style-name="P40">EAX: The Accumulator Register</text:p>
        </text:list-item>
        <text:list-item>
          <text:p text:style-name="P40">EBX: The Base Register</text:p>
        </text:list-item>
        <text:list-item>
          <text:p text:style-name="P40">ECX: The Count Register</text:p>
        </text:list-item>
        <text:list-item>
          <text:p text:style-name="P40">EDX: The Data Register</text:p>
        </text:list-item>
        <text:list-item>
          <text:p text:style-name="P40">ESI: The Source Index</text:p>
        </text:list-item>
        <text:list-item>
          <text:p text:style-name="P40">EDI: the Destination index</text:p>
        </text:list-item>
        <text:list-item>
          <text:p text:style-name="P40">EBP: The Base Pointer</text:p>
        </text:list-item>
        <text:list-item>
          <text:p text:style-name="P40">ESP: The Stack Pointer</text:p>
        </text:list-item>
      </text:list>
      <text:p text:style-name="First_20_paragraph">If you read the DOS version of this book, you will notice these are the same names as the 8 general 16-bit registers except prefixed with an E. The E stands for Extended. You can still access the 8 and 16 bit registers, for example AX is still the lower half of EAX and is divided into the 8 bit registers AH and AL. I still frequently use these in 32 bit code.</text:p>
      <text:p text:style-name="Text_20_body">These registers are “general” in that they can do many things, but they each have more “specific” uses also.</text:p>
      <text:p text:style-name="Text_20_body">In my source code, I use lowercase for the names of instructions and registers, but for this section, I listed them in capital letters because they are actually acronyms named for their purpose according to what Intel had in mind when making the 8086 and above Central Processing Units.</text:p>
      <text:p text:style-name="Text_20_body">Most of the time, I stick with only EAX,EBX,ECX,EDX when writing my programs. If I need an extra registers, I will use EBP,ESI,EDI. There are special instructions for them but these are outside the scope of what I am trying to teach with this book.</text:p>
      <text:p text:style-name="Text_20_body">You might wonder, why isn’t there EX,FX,…YX,ZX? Perhaps in a perfect world there should have been, but they probably didn’t want to spend the extra money on having extra registers for all 26 letters of the alphabet.</text:p>
      <text:p text:style-name="Text_20_body">In the next chapter I will show you a few other ways to assemble the program from this chapter using NASM and GAS. I will also be explaining the pros and cons of executable files compared to linkable ELF objects.</text:p>
      <text:h text:style-name="Heading_20_1" text:outline-level="1"><text:bookmark-start text:name="chapter-2-assembler-choices"/>Chapter 2: Assembler Choices<text:bookmark-end text:name="chapter-2-assembler-choices"/></text:h>
      <text:p text:style-name="First_20_paragraph">Most of the time I used the FASM assembler. It is the Flat Assembler which means it generates flat or raw binary executable files that are already to run. The information in the file includes the ELF header at the beginning and then the code and data defined by you in your program.</text:p>
      <text:p text:style-name="Text_20_body">In chapter 1, I showed the same program using both FASM and NASM. The code is identical but the assembler directives are different. If you are using FASM, the “format ELF executable” at the start of the source is enough for FASM to auto generate what you need. This does not exist in NASM, so I have created a header file that achieves the same thing!</text:p>
      <text:p text:style-name="Text_20_body">The contents of my custom built 32 bit ELF header is below. It can be included in any NASM program so you only need to copy paste this file once or download it from my repository.</text:p>
      <text:h text:style-name="Heading_20_2" text:outline-level="2"><text:bookmark-start text:name="chaste-elf-32.nasm"/>chaste-elf-32.nasm<text:bookmark-end text:name="chaste-elf-32.nasm"/></text:h>
      <text:p text:style-name="P41">;Chastity's Source for ELF 32-bit executable creation</text:p>
      <text:p text:style-name="P42">;</text:p>
      <text:p text:style-name="P43">;All data as defined in this file is based off of the specification of the ELF file format.</text:p>
      <text:p text:style-name="P44">;I first looked at the type of file created by FASM's "format ELF executable" directive.</text:p>
      <text:p text:style-name="P45">;It is great that FASM can create an executable file automatically. (Thanks Tomasz Grysztar, you are a true warrior!)</text:p>
      <text:p text:style-name="P46"/>
      <text:p text:style-name="P47">;However, I wanted to understand the format for theoretical use in other assemblers like NASM.</text:p>
      <text:p text:style-name="P48">;Therefore, what you see here is a complete Hello World program that should work within NASM</text:p>
      <text:p text:style-name="P49">;to create an executable file without using a linker. It worked perfectly on my machine running Debian Linux and NASM version 2.16.01.</text:p>
      <text:p text:style-name="P50"/>
      <text:p text:style-name="P51">;The Github repository with the spec I used is here.</text:p>
      <text:p text:style-name="P52">;&lt;https://github.com/xinuos/gabi&gt;</text:p>
      <text:p text:style-name="P53">;And this is the wikipedia article which linked me to the specification document</text:p>
      <text:p text:style-name="P54">;&lt;https://en.wikipedia.org/wiki/Executable_and_Linkable_Format&gt;</text:p>
      <text:p text:style-name="P55"/>
      <text:p text:style-name="P56">;This file contains a raw binary ELF32 header created using db,dw,dd commands.</text:p>
      <text:p text:style-name="P57">;After that, it proceeds to assemble a real "Hello World!" program</text:p>
      <text:p text:style-name="P58"/>
      <text:p text:style-name="P59">;Header for 32 bit ELF executable (with comments based on specification)</text:p>
      <text:p text:style-name="P60"/>
      <text:p text:style-name="P61">db 0x7F,"ELF" ;ELFMAGIC: 4 bytes that identify this as an ELF file. The magic numbers you could say.</text:p>
      <text:p text:style-name="P62">db 1 <text:s text:c="9"/>;EI_CLASS: 1=32-bit 2=64-bit</text:p>
      <text:p text:style-name="P63">db 1 <text:s text:c="9"/>;EI_DATA: The endianness of the data. 1=ELFDATA2LSB 2=ELFDATA2MSB For Intel x86 this is always 1 as far as I know.</text:p>
      <text:p text:style-name="P64">db 1 <text:s text:c="9"/>;EI_VERSION: 1=EV_CURRENT (ELF identity version 1) (which is current at time of specification Version 4.2 I was using)</text:p>
      <text:p text:style-name="P65">db 9 dup 0 <text:s text:c="3"/>;padding zeros to bring us to address 0x10</text:p>
      <text:p text:style-name="P66">dw 2 <text:s text:c="9"/>;e_type: 2=ET_EXEC (executable instead of object file)</text:p>
      <text:p text:style-name="P67">dw 3 <text:s text:c="9"/>;e_machine : 3=EM_386 (Intel 80386) 0x3E (AMD x86-64 architecture)</text:p>
      <text:p text:style-name="P68">dd 1 <text:s text:c="9"/>;e_version: 1=EV_CURRENT (ELF object file version.)</text:p>
      <text:p text:style-name="P69"/>
      <text:p text:style-name="P70">p_vaddr equ 0x8048000 ;the absolute base address where the file is loaded into memory</text:p>
      <text:p text:style-name="P71">e_entry equ 0x8048054 ;program starts running at this address (right after header)</text:p>
      <text:p text:style-name="P72"/>
      <text:p text:style-name="P73">dd e_entry <text:s text:c="3"/>;e_entry: the address at which the program starts running</text:p>
      <text:p text:style-name="P74">dd 0x34 <text:s text:c="6"/>;e_phoff: where in the file the program header offset is</text:p>
      <text:p text:style-name="P75">db 8 dup 0 <text:s text:c="3"/>;e_shoff and e_flags are unused in this example,therefore all zeros</text:p>
      <text:p text:style-name="P76">dw 0x34 <text:s text:c="6"/>;e_ehsize: size of the ELF header</text:p>
      <text:p text:style-name="P77">dw 0x20 <text:s text:c="6"/>;e_phentsize: size of program header which happens after ELF header</text:p>
      <text:p text:style-name="P78">dw 1 <text:s text:c="9"/>;e_phnum: How many program headers. Only 1 in this case</text:p>
      <text:p text:style-name="P79">dw 0x28 <text:s text:c="6"/>;e_shentsize: Size of a section header</text:p>
      <text:p text:style-name="P80">dw 0 <text:s text:c="9"/>;e_shnum number of section headers</text:p>
      <text:p text:style-name="P81">dw 0 <text:s text:c="9"/>;e_shstrndx: section header string index (not used here)</text:p>
      <text:p text:style-name="P82"/>
      <text:p text:style-name="P83">;That is the end of the 0x34 byte (52 bytes decimal) ELF header. Sadly, this is not the end and a program header is also required (what drunk person made this format?)</text:p>
      <text:p text:style-name="P84"/>
      <text:p text:style-name="P85">dd 1 <text:s text:c="9"/>;p_type: 1=PT_LOAD</text:p>
      <text:p text:style-name="P86">dd 0 <text:s text:c="9"/>;p_offset: Base address from file (zero)</text:p>
      <text:p text:style-name="P87">dd p_vaddr <text:s text:c="3"/>;p_vaddr: Virtual address in memory where the file will be.</text:p>
      <text:p text:style-name="P88">dd p_vaddr <text:s text:c="3"/>;p_paddr: Physical address. Same as previous</text:p>
      <text:p text:style-name="P89"/>
      <text:p text:style-name="P90">;The file_size variable I have defined uses some trickery to get the size of the file.</text:p>
      <text:p text:style-name="P91">;An EOF constant (End Of File) is defined at the end of the program code</text:p>
      <text:p text:style-name="P92">;By subtracting the program virtual address from that address,</text:p>
      <text:p text:style-name="P93">;I get the actual number of bytes of this entire program</text:p>
      <text:p text:style-name="P94"/>
      <text:p text:style-name="P95">file_size equ EOF-p_vaddr ;Place the actual size of the file using NASM address constants</text:p>
      <text:p text:style-name="P96"/>
      <text:p text:style-name="P97">dd file_size <text:s text:c="1"/>;p_filesz: Size of file image of the segment. Must be equal to the file size or greater</text:p>
      <text:p text:style-name="P98">dd file_size <text:s text:c="1"/>;p_memsz: Size of memory image of the segment, which may be equal to or greater than file image.</text:p>
      <text:p text:style-name="P99"/>
      <text:p text:style-name="P100">dd 7 <text:s text:c="10"/>;p_flags: permission flags: 7=4(Read)+2(Write)+1(Execute)</text:p>
      <text:p text:style-name="P101">dd 0x1000 <text:s text:c="5"/>;p_align; Alignment (same page alignment that FASM uses of 4096 bytes)</text:p>
      <text:p text:style-name="P102"/>
      <text:p text:style-name="P103">;important NASM directives</text:p>
      <text:p text:style-name="P104"/>
      <text:p text:style-name="P105">use32 <text:s text:c="9"/>;tell assembler that 32 bit code is being used</text:p>
      <text:p text:style-name="P106">org p_vaddr <text:s text:c="3"/>;origin of new code begins here</text:p>
      <text:p text:style-name="First_20_paragraph">Next, here is a short program which properly includes the header above.</text:p>
      <text:h text:style-name="Heading_20_2" text:outline-level="2"><text:bookmark-start text:name="main.asm"/>main.asm<text:bookmark-end text:name="main.asm"/></text:h>
      <text:p text:style-name="P107">%include 'chaste-elf-32.nasm'</text:p>
      <text:p text:style-name="P108"/>
      <text:p text:style-name="P109">mov eax,4 <text:s text:c="2"/>;invoke SYS_WRITE (kernel opcode 4 on 32 bit systems)</text:p>
      <text:p text:style-name="P110">mov ebx,1 <text:s text:c="2"/>;write to the STDOUT file</text:p>
      <text:p text:style-name="P111">mov ecx,msg ;pointer/address of string to write</text:p>
      <text:p text:style-name="P112">mov edx,13 <text:s text:c="1"/>;number of bytes to write</text:p>
      <text:p text:style-name="P113">int 80h</text:p>
      <text:p text:style-name="P114"/>
      <text:p text:style-name="P115">mov eax,1 <text:s text:c="2"/>;function SYS_EXIT (kernel opcode 1 on 32 bit systems)</text:p>
      <text:p text:style-name="P116">mov ebx,0 <text:s text:c="2"/>;return 0 status on exit - 'No Errors'</text:p>
      <text:p text:style-name="P117">int 80h</text:p>
      <text:p text:style-name="P118"/>
      <text:p text:style-name="P119">msg db 'Hello World!',0Ah,0</text:p>
      <text:p text:style-name="P120"/>
      <text:p text:style-name="P121">EOF equ $ ; End Of File label</text:p>
      <text:p text:style-name="First_20_paragraph">This program uses the “%include” directive to include the header file. This file will automatically create the header file needed to run the program by the operating system.</text:p>
      <text:p text:style-name="Text_20_body">The “EOF equ $” is required at the end because this makes an “EOF” label equal to the current address. The header uses the EOF label to tell it how big the file is. The size of the file must be hard coded into the header.</text:p>
      <text:p text:style-name="Text_20_body">Linux is very strict and picky about what it will load. It doesn’t just load any random file like DOS does. But if you actually assemble and run this program, it will work flawlessly.</text:p>
      <text:p text:style-name="Text_20_body">The following makefile was written for assembling and running in one “make” command. I highly recommend GNU make so you can make use of it and save yourself typing each command.</text:p>
      <text:h text:style-name="Heading_20_2" text:outline-level="2"><text:bookmark-start text:name="nasm-makefile"/>NASM makefile<text:bookmark-end text:name="nasm-makefile"/></text:h>
      <text:p text:style-name="P122">main-nasm:</text:p>
      <text:p text:style-name="P123"><text:s text:c="4"/>nasm main.asm</text:p>
      <text:p text:style-name="P124"><text:s text:c="4"/>chmod +x main</text:p>
      <text:p text:style-name="P125"><text:s text:c="4"/>./main</text:p>
      <text:p text:style-name="P126">ndisasm:</text:p>
      <text:p text:style-name="P127"><text:s text:c="4"/>ndisasm -b 32 -o 0x8048054 -e 0x54 main</text:p>
      <text:p text:style-name="First_20_paragraph">Although this works, you might wonder why I went to the trouble of writing this header file to be used with NASM. The following are my reasons:</text:p>
      <text:list text:style-name="L4">
        <text:list-item>
          <text:p text:style-name="P128">FASM is better, but not always available on every operating system.</text:p>
        </text:list-item>
        <text:list-item>
          <text:p text:style-name="P128">NASM is written in C and ported to more platforms</text:p>
        </text:list-item>
        <text:list-item>
          <text:p text:style-name="P128">Writing the header manually allows me full control and understanding of the process.</text:p>
        </text:list-item>
      </text:list>
      <text:p text:style-name="First_20_paragraph">I believe item 3 is most important because if I was to just allow FASM to generate the header and not know what it was doing, I would not be the KIND OF PERSON who writes assembly language. It is much better to program in C or C++ if you just want to get programs working and don’t care about what is happening behind the scenes.</text:p>
      <text:p text:style-name="Text_20_body">In fact, I will prove this with one more example. This next program does the exact same thing except that it uses the GNU assembler (also called GAS) and linker.</text:p>
      <text:h text:style-name="Heading_20_2" text:outline-level="2"><text:bookmark-start text:name="gnu-assembler"/>GNU Assembler<text:bookmark-end text:name="gnu-assembler"/></text:h>
      <text:p text:style-name="First_20_paragraph">The GNU Assembler is automatically installed on systems that have the GCC compiler, which uses it as part of the process of transforming C programs into executable code. The compiler normally creates an assembly file, assembles it, and then deletes the source.</text:p>
      <text:p text:style-name="Text_20_body">However, you can supply your own assembly code. The following is one I wrote that behaves the same as the NASM program above.</text:p>
      <text:p text:style-name="Text_20_body">I must warn you though, GAS uses the AT&amp;T syntax which uses a different order of operands. For example, the destination register is on the right and the source address or number is on the left. This is opposite of FASM and NASM source code which uses the Intel Style.</text:p>
      <text:p text:style-name="Text_20_body">History Note:</text:p>
      <text:p text:style-name="Text_20_body">Intel made the 8086 Central Processing Unit and its descendants, but AT&amp;T (yes the phone company) was responsible for the C programming language and UNIX. Because of this, they made their own style of writing assembly that is used by some C compiler systems to this day.</text:p>
      <text:h text:style-name="Heading_20_2" text:outline-level="2"><text:bookmark-start text:name="main.s"/>main.s<text:bookmark-end text:name="main.s"/></text:h>
      <text:p text:style-name="P129"># Using Linux System calls for 32-bit</text:p>
      <text:p text:style-name="P130"># Tested with GNU Assembler on Debian 12 (bookworm)</text:p>
      <text:p text:style-name="P131"># Writes a message to standard output with Linux system calls</text:p>
      <text:p text:style-name="P132"/>
      <text:p text:style-name="P133">.global _start</text:p>
      <text:p text:style-name="P134"/>
      <text:p text:style-name="P135">.text</text:p>
      <text:p text:style-name="P136"/>
      <text:p text:style-name="P137">_start:</text:p>
      <text:p text:style-name="P138"/>
      <text:p text:style-name="P139">mov <text:s text:c="3"/>$0xD,%edx # copy number of bytes to edx</text:p>
      <text:p text:style-name="P140">mov <text:s text:c="3"/>$msg,%ecx # address of string to output</text:p>
      <text:p text:style-name="P141">mov <text:s text:c="3"/>$0x1,%ebx # file handler 1 is stdout</text:p>
      <text:p text:style-name="P142">mov <text:s text:c="3"/>$0x4,%eax # system call 4 is write</text:p>
      <text:p text:style-name="P143">int <text:s text:c="3"/>$0x80</text:p>
      <text:p text:style-name="P144"/>
      <text:p text:style-name="P145">mov <text:s text:c="3"/>$0x1,%eax <text:s text:c="5"/># system call 1 is exit</text:p>
      <text:p text:style-name="P146">mov <text:s text:c="3"/>$0x0,%ebx <text:s text:c="5"/># we want to return code 0</text:p>
      <text:p text:style-name="P147">int <text:s text:c="3"/>$0x80 <text:s text:c="9"/># end program with system call</text:p>
      <text:p text:style-name="P148"/>
      <text:p text:style-name="P149">.data <text:s text:c="7"/># must declare data section for mutable memory</text:p>
      <text:p text:style-name="P150"/>
      <text:p text:style-name="P151">msg:</text:p>
      <text:p text:style-name="P152">.ascii "Hello World!\n"</text:p>
      <text:p text:style-name="First_20_paragraph">I have created a makefile for this program as well. I use the gcc command because it automatically calls “as” and “ld” for us. The arguments I used are for tricking it into not including the C standard library. Remember, GAS was designed to process the output of assembly created from a C compiler and they didn’t plan on us writing our own, partly because the syntax is a lot harder to understand than Intel style used by FASM and NASM.</text:p>
      <text:h text:style-name="Heading_20_2" text:outline-level="2"><text:bookmark-start text:name="gas-makefile"/>GAS makefile<text:bookmark-end text:name="gas-makefile"/></text:h>
      <text:p text:style-name="P153">main-gas:</text:p>
      <text:p text:style-name="P154"><text:s text:c="4"/>gcc -nostdlib -nostartfiles -nodefaultlibs -static main.s -o main -m32</text:p>
      <text:p text:style-name="P155"><text:s text:c="4"/>./main</text:p>
      <text:p text:style-name="First_20_paragraph">To sum up this chapter, you have the choice of at least 3 assemblers to use when getting started with Intel Assembly language for Linux Operating Systems. Here is a breakdown</text:p>
      <text:list text:style-name="L5">
        <text:list-item>
          <text:p text:style-name="P156">FASM: Easy to use and does a lot of work for you.</text:p>
        </text:list-item>
        <text:list-item>
          <text:p text:style-name="P156">NASM: Portable and reliable but does not make headers for you.</text:p>
        </text:list-item>
        <text:list-item>
          <text:p text:style-name="P156">GASM: Exists almost everywhere a C compiler is but uses a hard to read syntax!</text:p>
        </text:list-item>
      </text:list>
      <text:p text:style-name="First_20_paragraph">I will be using FASM for the rest of this book because I have the most experience with it and it is available for Linux. It was also written in assembly and is much faster than the other two assemblers I have mentioned.</text:p>
      <text:p text:style-name="Text_20_body">There are many more assemblers for Intel processors but I will not be covering them unless requested by readers in the future.</text:p>
      <text:p text:style-name="Text_20_body">Congratulations! If you have followed the book this far, you now know enough to get “Hello World!” on the screen in Assembly language for 3 different assemblers. The following chapters will cover more advanced ways of printing strings and integers using the FASM assembler, but can be translated into other assemblers if you learn the subtle differences between them.</text:p>
      <text:h text:style-name="Heading_20_1" text:outline-level="1"><text:bookmark-start text:name="chapter-3-linux-system-calls"/>Chapter 3: Linux System Calls<text:bookmark-end text:name="chapter-3-linux-system-calls"/></text:h>
      <text:p text:style-name="First_20_paragraph">Any book about Assembly programming for Linux is going to have to include information about system calls. This book will use what I consider the most useful of the system calls to achieve everything that the C standard library can do.</text:p>
      <text:p text:style-name="Text_20_body">For example, we need to be able to open files, read from them,write to them,and close them. These are the 4 fundamental operations and without them, nothing would work for building text based programs and getting results. Otherwise we will never know if a program was written correctly.</text:p>
      <text:p text:style-name="Text_20_body">The Linux kernel has hundreds of system calls. However only about 8 of them have I ever used. Each call has a number which may be different depending on which CPU type you have and what your operating system supports. Here is a command I can use to find the information on which numbers go with which function names. This will be extremely relevant.</text:p>
      <text:p text:style-name="Text_20_body"><text:span text:style-name="Source_Text">find /usr/include -name "unistd_*"</text:span></text:p>
      <text:p text:style-name="Text_20_body">On my system, that command shows 4 files.</text:p>
      <text:p text:style-name="P157">/usr/include/x86_64-linux-gnu/asm/unistd_64.h</text:p>
      <text:p text:style-name="P158">/usr/include/x86_64-linux-gnu/asm/unistd_x32.h</text:p>
      <text:p text:style-name="P159">/usr/include/x86_64-linux-gnu/asm/unistd_32.h</text:p>
      <text:p text:style-name="P160">/usr/include/x86_64-linux-gnu/bits/unistd_ext.h</text:p>
      <text:p text:style-name="First_20_paragraph">Specifically, it is the file:</text:p>
      <text:p text:style-name="Text_20_body"><text:span text:style-name="Source_Text">/usr/include/x86_64-linux-gnu/asm/unistd_32.h</text:span></text:p>
      <text:p text:style-name="Text_20_body">which shows us the numbers for all the system calls in a 32 bit Linux environment. Here are a few of them.</text:p>
      <text:p text:style-name="P161">#define __NR_exit 1</text:p>
      <text:p text:style-name="P162">#define __NR_fork 2</text:p>
      <text:p text:style-name="P163">#define __NR_read 3</text:p>
      <text:p text:style-name="P164">#define __NR_write 4</text:p>
      <text:p text:style-name="P165">#define __NR_open 5</text:p>
      <text:p text:style-name="P166">#define __NR_close 6</text:p>
      <text:p text:style-name="P167">#define __NR_waitpid 7</text:p>
      <text:p text:style-name="P168">#define __NR_creat 8</text:p>
      <text:p text:style-name="P169">#define __NR_link 9</text:p>
      <text:p text:style-name="P170">#define __NR_unlink 10</text:p>
      <text:p text:style-name="P171">#define __NR_execve 11</text:p>
      <text:p text:style-name="P172">#define __NR_chdir 12</text:p>
      <text:p text:style-name="P173">#define __NR_time 13</text:p>
      <text:p text:style-name="P174">#define __NR_mknod 14</text:p>
      <text:p text:style-name="P175">#define __NR_chmod 15</text:p>
      <text:p text:style-name="P176">#define __NR_lchown 16</text:p>
      <text:p text:style-name="P177">#define __NR_break 17</text:p>
      <text:p text:style-name="P178">#define __NR_oldstat 18</text:p>
      <text:p text:style-name="P179">#define __NR_lseek 19</text:p>
      <text:p text:style-name="P180">#define __NR_getpid 20</text:p>
      <text:p text:style-name="P181">#define __NR_mount 21</text:p>
      <text:p text:style-name="P182">#define __NR_umount 22</text:p>
      <text:p text:style-name="P183">#define __NR_setuid 23</text:p>
      <text:p text:style-name="P184">#define __NR_getuid 24</text:p>
      <text:p text:style-name="P185">#define __NR_stime 25</text:p>
      <text:p text:style-name="P186">#define __NR_ptrace 26</text:p>
      <text:p text:style-name="P187">#define __NR_alarm 27</text:p>
      <text:p text:style-name="P188">#define __NR_oldfstat 28</text:p>
      <text:p text:style-name="P189">#define __NR_pause 29</text:p>
      <text:p text:style-name="P190">#define __NR_utime 30</text:p>
      <text:p text:style-name="P191">#define __NR_stty 31</text:p>
      <text:p text:style-name="P192">#define __NR_gtty 32</text:p>
      <text:p text:style-name="First_20_paragraph">You may have also noticed that there is a 64 bit file with the same functions in a different order. I would have to write a separate book on the 64 bit calls because they use different registers beside different numbers.</text:p>
      <text:p text:style-name="Text_20_body">In any case, these are the same system calls regardless of whether you are calling them from a C program or an Assembly program. In chapters 1 and 2, we have already used two system calls in our Hello World program. The EAX register was loaded with 4 for the write call and then later was loaded with 1 for the exit call to end the program.</text:p>
      <text:p text:style-name="Text_20_body">Getting the system call numbers into EAX is easy enough but how did I know which arguments go in which registers?</text:p>
      <text:p text:style-name="Text_20_body">As it turns out, most Linux distributions have manual pages on all these calls. To access these manual pages, you always enter “man 2 name_of_the_function”. For example the write call can be obtained this way.</text:p>
      <text:p text:style-name="Text_20_body"><text:span text:style-name="Source_Text">man 2 write</text:span></text:p>
      <text:p text:style-name="Text_20_body">It is a big page to read but I do suggest reading it all for a proper understanding of how it works. Included is the C Programming Language signature for the function.</text:p>
      <text:p text:style-name="Text_20_body"><text:span text:style-name="Source_Text">write(int fd, const void buf[.count], size_t count);</text:span></text:p>
      <text:p text:style-name="Text_20_body">Notice that this takes 3 arguments. The first is the file descriptor number. In the case of standard output, it is 1. Next, it needs a pointer with bytes which will be written to standard output. The final argument is to tell it how many bytes to write from this address.</text:p>
      <text:p text:style-name="Text_20_body">Using this information, we can form a complete program in C.</text:p>
      <text:h text:style-name="Heading_20_2" text:outline-level="2"><text:bookmark-start text:name="c-hello-world-with-write-system-call"/>C Hello World with Write System Call<text:bookmark-end text:name="c-hello-world-with-write-system-call"/></text:h>
      <text:p text:style-name="P193">#include &lt;unistd.h&gt;</text:p>
      <text:p text:style-name="P194"/>
      <text:p text:style-name="P195">int main(int argc, char *argv[])</text:p>
      <text:p text:style-name="P196">{</text:p>
      <text:p text:style-name="P197"><text:s text:c="1"/>write(1, "Hello World!\n", 13);</text:p>
      <text:p text:style-name="P198"><text:s text:c="1"/>_exit(0);</text:p>
      <text:p text:style-name="P199">}</text:p>
      <text:p text:style-name="First_20_paragraph">If you are on a Linux system, which you should be for learning from this book, you can use the following command to compile and run it.</text:p>
      <text:p text:style-name="P200">gcc -Wall -ansi -pedantic main.c -o main &amp;&amp; ./main</text:p>
      <text:p text:style-name="First_20_paragraph">The reason I show a C programming example in a book about assembly is because C is the native language for the Linux operating system but all the system calls are also accessible from Assembly language as well. Look again at the C program above and then look again at the program from chapter 1.</text:p>
      <text:h text:style-name="Heading_20_2" text:outline-level="2"><text:bookmark-start text:name="fasm-hello-world-with-write-system-call"/>FASM Hello World with Write System Call<text:bookmark-end text:name="fasm-hello-world-with-write-system-call"/></text:h>
      <text:p text:style-name="P201">format ELF executable</text:p>
      <text:p text:style-name="P202"/>
      <text:p text:style-name="P203">mov eax,4 <text:s text:c="2"/>; invoke SYS_WRITE (kernel opcode 4 on 32 bit systems)</text:p>
      <text:p text:style-name="P204">mov ebx,1 <text:s text:c="2"/>; write to the STDOUT file</text:p>
      <text:p text:style-name="P205">mov ecx,msg ; pointer/address of string to write</text:p>
      <text:p text:style-name="P206">mov edx,13 <text:s text:c="1"/>; number of bytes to write</text:p>
      <text:p text:style-name="P207">int 80h</text:p>
      <text:p text:style-name="P208"/>
      <text:p text:style-name="P209">mov eax,1 <text:s text:c="2"/>; function SYS_EXIT (kernel opcode 1 on 32 bit systems)</text:p>
      <text:p text:style-name="P210">mov ebx,0 <text:s text:c="2"/>; return 0 status on exit - 'No Errors'</text:p>
      <text:p text:style-name="P211">int 80h</text:p>
      <text:p text:style-name="P212"/>
      <text:p text:style-name="P213">msg db 'Hello World!',0Ah,0</text:p>
      <text:p text:style-name="First_20_paragraph">These two programs are the EXACT same thing written in two different languages. Also notice that the arguments for the write call are the same as in the C signature. The registers are EBX,ECX,EDX. This is because B,C,D is the order of the alphabet!</text:p>
      <text:p text:style-name="Text_20_body">Of course this consistency is not followed past 3 arguments. After that, the order is ESI,EDI,EBP. However this is rare because most functions do not use more than 3 arguments.</text:p>
      <text:p text:style-name="Text_20_body">The write call technically uses 4 registers because EAX must have the system call number before we call int 0x80.</text:p>
      <text:p text:style-name="Text_20_body">This means we still have 3 registers that are not used by system calls and can be used for other purposes like holding temporary numbers we need to use later.</text:p>
      <text:p text:style-name="Text_20_body">I often refer to this online list to help me remember which registers are used as which arguments.</text:p>
      <text:p text:style-name="Text_20_body">https://www.chromium.org/chromium-os/developer-library/reference/linux-constants/syscalls/#x86-32-bit</text:p>
      <text:p text:style-name="Text_20_body">It may be a reference for Chromium OS but this is still a Linux compatible system and so it is valid for all Linux distributions as long as they support 32 bit system calls. These functions we are calling are part of the Linux kernel which is actually used on all kinds of operating systems that are not called Linux. Android is a popular example.</text:p>
      <text:p text:style-name="Text_20_body">I have explained the way that system calls work, specifically the “write” call. The “exit” call is also included because it is how you must end a program in Assembly.</text:p>
      <text:p text:style-name="Text_20_body">But there is also the problem that system calls are inconvenient. Having to keep in my head what registers to load with what can get pretty confusing. That is why I created a function that uses the write call but manages printing strings and automatically tells the write call how long the string is.</text:p>
      <text:p text:style-name="Text_20_body">In the next chapter, I will show you the putstring function. But remember, all of the code for input and output in a Linux system is going to require one of the system calls. Knowing when to use the system calls becomes important from the perspective of a C or Assembly programmer.</text:p>
      <text:h text:style-name="Heading_20_1" text:outline-level="1"><text:bookmark-start text:name="chapter-4-putstring"/>Chapter 4: putstring<text:bookmark-end text:name="chapter-4-putstring"/></text:h>
      <text:p text:style-name="First_20_paragraph">Perhaps it is God’s sense of humor that I am beginning chapter 4 with a function that uses function number 4 of interrupt 0x80.</text:p>
      <text:p text:style-name="Text_20_body">The write system call is the most useful of all the calls because it is the only way to get output from a program. You have already seen examples of this call being used in the first three chapters. However, the downside of this system call is that you must tell it exactly how many bytes of a string to write. It makes no assumptions about how long the string is.</text:p>
      <text:p text:style-name="Text_20_body">If you are coming from a C programming background, you will know that it is a common convention that strings are an array of bytes ending in 0. I agree with this convention because it just makes sense. The byte 0 doesn’t map to a printable character, and the number zero generally has the sense of “nothing” because there are no more bytes in the string to print.</text:p>
      <text:p text:style-name="Text_20_body">It might make sense to my mind, but I have to logically get the computer to understand it. To achieve this, I will show you a C program first and then the Assembly version that does the same thing.</text:p>
      <text:h text:style-name="Heading_20_2" text:outline-level="2"><text:bookmark-start text:name="c-unistd-putstring"/>C unistd putstring<text:bookmark-end text:name="c-unistd-putstring"/></text:h>
      <text:p text:style-name="P214">#include &lt;unistd.h&gt;</text:p>
      <text:p text:style-name="P215"/>
      <text:p text:style-name="P216">int putstring(const char *s)</text:p>
      <text:p text:style-name="P217">{</text:p>
      <text:p text:style-name="P218"><text:s text:c="1"/>int count=0; <text:s text:c="5"/>/*used to count how many bytes will be written*/</text:p>
      <text:p text:style-name="P219"><text:s text:c="1"/>const char *p=s; <text:s text:c="1"/>/*pointer used to find terminating zero of string*/</text:p>
      <text:p text:style-name="P220"><text:s text:c="1"/>while(*p){p++;} <text:s text:c="2"/>/*loop until zero found and immediately exit*/</text:p>
      <text:p text:style-name="P221"><text:s text:c="1"/>count=p-s; <text:s text:c="7"/>/*count is the difference of pointers p and s*/</text:p>
      <text:p text:style-name="P222"><text:s text:c="1"/>write(1,s,count); /*the unix system call way of writing the bytes*/</text:p>
      <text:p text:style-name="P223"><text:s text:c="1"/>return count; <text:s text:c="4"/>/*return how many bytes were written*/</text:p>
      <text:p text:style-name="P224">}</text:p>
      <text:p text:style-name="P225"/>
      <text:p text:style-name="P226">int main(int argc, char *argv[])</text:p>
      <text:p text:style-name="P227">{</text:p>
      <text:p text:style-name="P228"><text:s text:c="1"/>putstring("The putstring function can print any string!\n");</text:p>
      <text:p text:style-name="P229"><text:s text:c="1"/>_exit(0);</text:p>
      <text:p text:style-name="P230">}</text:p>
      <text:p text:style-name="First_20_paragraph">The program source above uses the <text:span text:style-name="T1">unistd.h</text:span> interface to the Unix Standard way of doing things. Sometimes this is referred to as POSIX. POSIX is the (Portable Operating System Interface), which is a group of standards that Linux and Unix-like systems, such as BSD (and its descendants FreeBSD, NetBSD, and OpenBSD), and even MacOS, which is actually based on Unix.</text:p>
      <text:p text:style-name="Text_20_body">So basically, the sets of functions available, such as write, read, open, close, lseek, and exit, are part of a special Unix Standard Library that can be used on Linux and every operating system except for DOS and Windows because those have different standards set by Microsoft.</text:p>
      <text:p text:style-name="Text_20_body">Because this book is about programming on Linux, I do promote this as the best way to go about programming on Linux. However, I also consider that my readers may be used to a more traditional C Standard Library approach to programming. Therefore, I will also show you the same thing using the fwrite function from the <text:span text:style-name="T1">stdio.h</text:span> header.</text:p>
      <text:h text:style-name="Heading_20_2" text:outline-level="2"><text:bookmark-start text:name="c-stdlib-putstring"/>C stdlib putstring<text:bookmark-end text:name="c-stdlib-putstring"/></text:h>
      <text:p text:style-name="P231">#include &lt;stdio.h&gt;</text:p>
      <text:p text:style-name="P232"/>
      <text:p text:style-name="P233">int putstring(const char *s)</text:p>
      <text:p text:style-name="P234">{</text:p>
      <text:p text:style-name="P235"><text:s text:c="1"/>int count=0; <text:s text:c="13"/>/*used to count how many bytes will be written*/</text:p>
      <text:p text:style-name="P236"><text:s text:c="1"/>const char *p=s; <text:s text:c="9"/>/*pointer used to find terminating zero of string*/</text:p>
      <text:p text:style-name="P237"><text:s text:c="1"/>while(*p){p++;} <text:s text:c="10"/>/*loop until zero found and immediately exit*/</text:p>
      <text:p text:style-name="P238"><text:s text:c="1"/>count=p-s; <text:s text:c="15"/>/*count is the difference of pointers p and s*/</text:p>
      <text:p text:style-name="P239"><text:s text:c="1"/>fwrite(s,1,count,stdout); /*https://cppreference.com/w/c/io/fwrite.html*/</text:p>
      <text:p text:style-name="P240"><text:s text:c="1"/>return count; <text:s text:c="12"/>/*return how many bytes were written*/</text:p>
      <text:p text:style-name="P241">}</text:p>
      <text:p text:style-name="P242"/>
      <text:p text:style-name="P243">int main(int argc, char *argv[])</text:p>
      <text:p text:style-name="P244">{</text:p>
      <text:p text:style-name="P245"><text:s text:c="1"/>putstring("The putstring function can print any string!\n");</text:p>
      <text:p text:style-name="P246"><text:s text:c="1"/>return 0;</text:p>
      <text:p text:style-name="P247">}</text:p>
      <text:p text:style-name="First_20_paragraph">If you compare the two C programs, you will see that they are line by line the exact same thing, except they include a different header, different functions to send the output to the terminal, and return from the main function in different ways.</text:p>
      <text:p text:style-name="Text_20_body">The consistency in behavior is why it is easy to translate programs using Unix calls into C Standard calls and vice versa.</text:p>
      <text:p text:style-name="Text_20_body">In any case, here is a breakdown of how the putstring function works regardless of which version you use.</text:p>
      <text:p text:style-name="Text_20_body">A char pointer named s is passed to the function when it is called.</text:p>
      <text:p text:style-name="Text_20_body">A count variable is created for use in telling how many bytes need to be printed. This count is initialized to 0 but will be changed later.</text:p>
      <text:p text:style-name="Text_20_body">A pointer named p is set to the same address as s.</text:p>
      <text:p text:style-name="Text_20_body">A short loop occurs, which checks the byte at the address at pointer p. If it is zero, the loop ends. Otherwise, p is incremented with the ++ operator. Adding 1 to a pointer means it will point to the next byte. Sooner or later, it will find that a byte is 0 because the C compiler forces any string literal inside double quotes to end in a zero byte.</text:p>
      <text:p text:style-name="Text_20_body">The count is set to p minus s. Yes, you can subtract pointers from each other in the C language. This pointer arithmetic is the fastest way to extract the length of the string. By subtracting the start of the string (s) from the place where the 0 was found (p), we can know that it will always have the exact length of the string.</text:p>
      <text:p text:style-name="Text_20_body">As far as the write and fwrite calls. They are the same thing, but the number of arguments and their order are slightly different. See the following links for a more accurate breakdown.</text:p>
      <text:p text:style-name="Text_20_body"><text:a xlink:type="simple" xlink:href="https://man7.org/linux/man-pages/man2/write.2.html" office:name=""><text:span text:style-name="Definition">https://man7.org/linux/man-pages/man2/write.2.html</text:span></text:a></text:p>
      <text:p text:style-name="Text_20_body"><text:a xlink:type="simple" xlink:href="https://cppreference.com/w/c/io/fwrite.html" office:name=""><text:span text:style-name="Definition">https://cppreference.com/w/c/io/fwrite.html</text:span></text:a></text:p>
      <text:p text:style-name="Text_20_body">After the data is written, the putstring function returns the number of bytes written. You can ignore this most of the time, but it can be helpful if you need the length of the string to be saved for some operation later. Technically, the C strlen function can also be used for finding the length of a string, but there is a strategic reason I did not use that function in my implementation of putstring</text:p>
      <text:p text:style-name="Text_20_body">The reason is that when we are coding in Assembly, C functions don’t exist unless we specifically link assembly programs to the C library. I recommend against this and therefore won’t teach you how to do this. More importantly, it is unnecessary because we can always write our own functions in Assembly that run much faster and do exactly what we want.</text:p>
      <text:p text:style-name="Text_20_body">Now I have shown you two possible interfaces in C for writing a function named “putstring” that counts the length of a string and prints it to standard output. All of this effort was made so that when you see the Assembly version, you already have a basic idea of how it works, so that you won’t be overwhelmed at how complicated it looks.</text:p>
      <text:p text:style-name="Text_20_body">And don’t worry, I will still be explaining more about it after the code for those who still may not get it.</text:p>
      <text:h text:style-name="Heading_20_2" text:outline-level="2"><text:bookmark-start text:name="assembly-putstring"/>Assembly putstring<text:bookmark-end text:name="assembly-putstring"/></text:h>
      <text:p text:style-name="P248">format ELF executable</text:p>
      <text:p text:style-name="P249"/>
      <text:p text:style-name="P250">main:</text:p>
      <text:p text:style-name="P251"/>
      <text:p text:style-name="P252">mov eax,string0</text:p>
      <text:p text:style-name="P253">call putstring</text:p>
      <text:p text:style-name="P254"/>
      <text:p text:style-name="P255">mov eax,1 ; invoke SYS_EXIT (kernel opcode 1)</text:p>
      <text:p text:style-name="P256">mov ebx,0 ; return 0 status on exit - 'No Errors'</text:p>
      <text:p text:style-name="P257">int 80h</text:p>
      <text:p text:style-name="P258"/>
      <text:p text:style-name="P259">string0 db 'The putstring function can print any string!',0Ah,0</text:p>
      <text:p text:style-name="P260"/>
      <text:p text:style-name="P261">putstring:</text:p>
      <text:p text:style-name="P262"/>
      <text:p text:style-name="P263">push eax</text:p>
      <text:p text:style-name="P264">push ebx</text:p>
      <text:p text:style-name="P265">push ecx</text:p>
      <text:p text:style-name="P266">push edx</text:p>
      <text:p text:style-name="P267"/>
      <text:p text:style-name="P268">mov ebx,eax</text:p>
      <text:p text:style-name="P269"/>
      <text:p text:style-name="P270">putstring_strlen_start:</text:p>
      <text:p text:style-name="P271"/>
      <text:p text:style-name="P272">cmp [ebx],byte 0</text:p>
      <text:p text:style-name="P273">jz putstring_strlen_end</text:p>
      <text:p text:style-name="P274">inc ebx</text:p>
      <text:p text:style-name="P275">jmp putstring_strlen_start</text:p>
      <text:p text:style-name="P276"/>
      <text:p text:style-name="P277">putstring_strlen_end:</text:p>
      <text:p text:style-name="P278">sub ebx,eax</text:p>
      <text:p text:style-name="P279"/>
      <text:p text:style-name="P280">mov edx,ebx ;number of bytes to write</text:p>
      <text:p text:style-name="P281">mov ecx,eax ;pointer/address of string to write</text:p>
      <text:p text:style-name="P282">mov ebx,1 <text:s text:c="2"/>;write to the STDOUT file</text:p>
      <text:p text:style-name="P283">mov eax,4 <text:s text:c="2"/>;invoke SYS_WRITE (kernel opcode 4 on 32 bit systems)</text:p>
      <text:p text:style-name="P284">int 80h <text:s text:c="4"/>;system call to write the message</text:p>
      <text:p text:style-name="P285"/>
      <text:p text:style-name="P286">pop edx</text:p>
      <text:p text:style-name="P287">pop ecx</text:p>
      <text:p text:style-name="P288">pop ebx</text:p>
      <text:p text:style-name="P289">pop eax</text:p>
      <text:p text:style-name="P290"/>
      <text:p text:style-name="P291">ret</text:p>
      <text:p text:style-name="First_20_paragraph">The Assembly program that uses putstring follows all the same logic as the two C programs earlier in this chapter.</text:p>
      <text:p text:style-name="Text_20_body">However, you may notice that the main function appears first, and then the putstring function appears after the exit call to end the program, and also after where string 0 is defined.</text:p>
      <text:p text:style-name="Text_20_body">Most C compilers force you to define a function before it can be called. FASM has no such restriction, and I frequently place all my data and other functions after the main function.</text:p>
      <text:p text:style-name="Text_20_body">Because function 1 of Interrupt 0x80 is the exit call, this means the program will end and not accidentally run anything after it.</text:p>
      <text:p text:style-name="Text_20_body">It is possible to define the functions and the data before the main function, much like you would do in the C language, but this means that you would need to do a “jmp main” instruction to skip executing those. Therefore, I reversed the order from the C convention because it saves a few bytes of space and because it protects me from running code that I didn’t mean to. Writing Assembly language is very prone to error because the source typically takes more lines, and it is easier to get lost and forget what I was doing.</text:p>
      <text:p text:style-name="Text_20_body">The putstring function is written in a way that it expects the address of the string we want to print to be placed in the eax register before it is called. I could have used any of the registers but I chose eax because ‘A’ is the first letter of the alphabet and so it is considered the first and most important in my code.</text:p>
      <text:p text:style-name="Text_20_body">At the beginning and end of the putstring function, you may notice the push and pop instructions. These save and restore the values of registers to the “stack”. The stack is a LIFO (Last In First Out) data structure which is useful because the registers are modified whenever we make a system call. By pushing registers in the order eax,ebx,ecx,and edx, we are saving them to a memory location which is indexed by the Stack Pointer or esp. To restore them in the proper order, we have to pop them back in the reverse order of edx,ecx,ebx,and eax.</text:p>
      <text:p text:style-name="Text_20_body">I understand this is a lot of information that seems pointless, but that is because it requires a good understanding of pointers. Note however that other languages use the stack when you call functions but they hide this from the users. Assembly requires getting comfortable with pointers.</text:p>
      <text:h text:style-name="Heading_20_2" text:outline-level="2"><text:bookmark-start text:name="pointers-vs-integers"/>Pointers vs Integers<text:bookmark-end text:name="pointers-vs-integers"/></text:h>
      <text:p text:style-name="First_20_paragraph">One thing that sometimes trips up new assembly programmers is how registers can sometimes function as pointers and other times as plain integers.</text:p>
      <text:p text:style-name="Text_20_body">For example</text:p>
      <text:p text:style-name="P292">mov eax,string0</text:p>
      <text:p text:style-name="First_20_paragraph">Means we are moving the address of the string into the eax register. The registers starting with the letter E all store 32 bits of data. They are integers, or simply numbers. However, addresses are also numbers, and therefore it is totally normal to use the same register as both a pointer to an address and yet also use it as a regular number elsewhere.</text:p>
      <text:p text:style-name="Text_20_body">For example</text:p>
      <text:p text:style-name="P293">cmp [ebx],byte 0</text:p>
      <text:p text:style-name="First_20_paragraph">Means we are comparing the address at ebx with 0. We know that ebx is being used as a pointer because it is in the brackets. Here, ebx functions just like “*p” does in the C version because ebx is being used as the pointer, just like p was in the C language. Notice also that it is required to include the “byte” specifier so the assembler knows we are searching for an 8-bit value (byte) instead of a 16-bit (word) or 32-bit (dword).</text:p>
      <text:p text:style-name="Text_20_body">But I think the final best example of how integers and pointers are mixed is looking at the part of the putstring function that takes place after a zero is found.</text:p>
      <text:p text:style-name="P294">sub ebx,eax ;subtract eax from ebx</text:p>
      <text:p text:style-name="P295"/>
      <text:p text:style-name="P296">mov edx,ebx ;number of bytes to write</text:p>
      <text:p text:style-name="P297">mov ecx,eax ;pointer of string to write</text:p>
      <text:p text:style-name="P298">mov ebx,1 <text:s text:c="2"/>;write to the STDOUT file</text:p>
      <text:p text:style-name="P299">mov eax,4 <text:s text:c="2"/>;function number 4</text:p>
      <text:p text:style-name="P300">int 80h</text:p>
      <text:p text:style-name="First_20_paragraph">Registers eax and ebx are both used as pointers but then the usage of ebx suddenly changes. We subtract eax from ebx to get the number of bytes we need to print and then we copy ebx to edx.</text:p>
      <text:p text:style-name="Text_20_body">This is the same as</text:p>
      <text:p text:style-name="Text_20_body"><text:span text:style-name="Source_Text">count=p-s;</text:span></text:p>
      <text:p text:style-name="Text_20_body">Was in the original C program. However, we can also think of it as</text:p>
      <text:p text:style-name="Text_20_body">`edx=ebx-eax;’</text:p>
      <text:p text:style-name="Text_20_body">Registers are still just special variables that can be used for anything we like. Unlike C, there is no difference between an “int” and an “int*“. The C compiler will complain at you if you try to reuse the same variable as a different type. Sometimes you can convince it to let you do it anyway with typecasting.</text:p>
      <text:p text:style-name="Text_20_body">But Assembly is the Minecraft Creative Mode of programming. There are no limitations other than those imposed on you by your operating system and hardware. To be honest</text:p>
      <text:p text:style-name="Text_20_body">To drive home the point of why Assembly language is powerful but also dangerous, allow me to share the ancient wisdom of a programming master.</text:p>
      <text:p text:style-name="Text_20_body">“C makes it easy to shoot yourself in the foot; C++ makes it harder, but when you do it blows your whole leg off” - Bjarne Stroustrup <text:a xlink:type="simple" xlink:href="https://www.stroustrup.com/quotes.html" office:name=""><text:span text:style-name="Definition">Quotes</text:span></text:a></text:p>
      <text:p text:style-name="Text_20_body">And from my experience in Assembly language, I can tell you, Assembly programming is like searching for documentation on how to shoot yourself in the foot. Then Google censors your search results because it thinks you are going to self-harm. Suddenly, the government labels you a terrorist and then drops a bomb on your house until your legs are blown off, and so are everyone else’s in your neighborhood.</text:p>
      <text:p text:style-name="Text_20_body">In this chapter, I spent a lot more time explaining the behavior of the putstring function than I did in the DOS edition of this book. This function is foundational to the other functions in this book because whenever we need to print a number or an error message, the only real way to do it is to first define a string in the memory and print it using putstring. Without this function I would have to specifically count the length by hand of each function and load the registers again each time.</text:p>
      <text:p text:style-name="Text_20_body">The purpose of creating a function in Assembly, or any other language, is to have a piece of reusable code that can be used at your convenience. It saves space when programming and also allows errors to be fixed because if the code that handles input or output is isolated in a function, then fixing that function fixes the rest of the program automatically.</text:p>
      <text:p text:style-name="Text_20_body">Now that I have taught you the magical properties of the putstring function, I will use the next chapter to show you how I print integers in multiple bases!</text:p>
      <text:h text:style-name="Heading_20_1" text:outline-level="1"><text:bookmark-start text:name="chapter-5-intstr-and-putint"/>Chapter 5: intstr and putint<text:bookmark-end text:name="chapter-5-intstr-and-putint"/></text:h>
      <text:p text:style-name="First_20_paragraph">In the last chapter, we used a function named putstring to print strings of text. This is nice but in order to do useful things in assembly, we need to be able to print numbers.</text:p>
      <text:p text:style-name="Text_20_body">If you are coming from the C language, you might remember the printf function and expect something similar. However, printf is not as good as what I will be showing you in both C and assembly. Printf can only print integers in base ten (decimal), eight (octal), and sixteen (hexadecimal)</text:p>
      <text:p text:style-name="Text_20_body">Instead, I will introduce two new functions that can be used along with putstring in order to print any integer in any base from two to thirty-six. The default base is two (binary) because it is my favorite but it can be changed.</text:p>
      <text:p text:style-name="Text_20_body">First, here is the C program that shows how these functions are written and used in C. Keep in mind that putstring is the same as it was in the last chapter. Whether you use the unistd or stdlib form of output will not matter here. However, this is a Linux book so I will be using the unistd interface with POSIX system calls from now on.</text:p>
      <text:h text:style-name="Heading_20_2" text:outline-level="2"><text:bookmark-start text:name="c-putint"/>C putint<text:bookmark-end text:name="c-putint"/></text:h>
      <text:p text:style-name="P301">#include &lt;unistd.h&gt;</text:p>
      <text:p text:style-name="P302"/>
      <text:p text:style-name="P303">int putstring(const char *s)</text:p>
      <text:p text:style-name="P304">{</text:p>
      <text:p text:style-name="P305"><text:s text:c="1"/>int count=0; <text:s text:c="5"/>/*used to count how many bytes will be written*/</text:p>
      <text:p text:style-name="P306"><text:s text:c="1"/>const char *p=s; <text:s text:c="1"/>/*pointer used to find terminating zero of string*/</text:p>
      <text:p text:style-name="P307"><text:s text:c="1"/>while(*p){p++;} <text:s text:c="2"/>/*loop until zero found and immediately exit*/</text:p>
      <text:p text:style-name="P308"><text:s text:c="1"/>count=p-s; <text:s text:c="7"/>/*count is the difference of pointers p and s*/</text:p>
      <text:p text:style-name="P309"><text:s text:c="1"/>write(1,s,count); /*the unix system call way of writing the bytes*/</text:p>
      <text:p text:style-name="P310"><text:s text:c="1"/>return count; <text:s text:c="4"/>/*return how many bytes were written*/</text:p>
      <text:p text:style-name="P311">}</text:p>
      <text:p text:style-name="P312"/>
      <text:p text:style-name="P313">#define usl 0x100 /*usl stands for Unsigned or Universal String Length.*/</text:p>
      <text:p text:style-name="P314">char int_string[usl+1]; /*global string which will be used to store string of integers. Size is usl+1 for terminating zero*/</text:p>
      <text:p text:style-name="P315"/>
      <text:p text:style-name="P316">/*radix or base for integer output. 2=binary, 8=octal, 10=decimal, 16=hexadecimal*/</text:p>
      <text:p text:style-name="P317">int radix=2;</text:p>
      <text:p text:style-name="P318">/*default minimum digits for printing integers*/</text:p>
      <text:p text:style-name="P319">int int_width=1;</text:p>
      <text:p text:style-name="P320"/>
      <text:p text:style-name="P321">char *intstr(unsigned int i) <text:s text:c="3"/>/*Chastity's supreme integer to string conversion function*/</text:p>
      <text:p text:style-name="P322">{</text:p>
      <text:p text:style-name="P323"><text:s text:c="1"/>int width=0; <text:s text:c="18"/>/*the width or how many digits including prefixed zeros are printed*/</text:p>
      <text:p text:style-name="P324"><text:s text:c="1"/>char *s=int_string+usl; <text:s text:c="7"/>/*a pointer starting to the place where we will end the string with zero*/</text:p>
      <text:p text:style-name="P325"><text:s text:c="1"/>*s=0; <text:s text:c="25"/>/*set the zero that terminates the string in the C language*/</text:p>
      <text:p text:style-name="P326"><text:s text:c="1"/>while(i!=0 || width&lt;int_width) /*loop to fill the string with every required digit plus prefixed zeros*/</text:p>
      <text:p text:style-name="P327"><text:s text:c="1"/>{</text:p>
      <text:p text:style-name="P328"><text:s text:c="2"/>s--; <text:s text:c="25"/>/*decrement the pointer to go left for correct digit placing*/</text:p>
      <text:p text:style-name="P329"><text:s text:c="2"/>*s=i%radix; <text:s text:c="18"/>/*get the remainder of division by the radix or base*/</text:p>
      <text:p text:style-name="P330"><text:s text:c="2"/>i/=radix; <text:s text:c="20"/>/*divide the input by radix*/</text:p>
      <text:p text:style-name="P331"><text:s text:c="2"/>if(*s&lt;10){*s+='0';} <text:s text:c="10"/>/*fconvert digits 0 to 9 to the ASCII character for that digit*/</text:p>
      <text:p text:style-name="P332"><text:s text:c="2"/>else{*s=*s+'A'-10;} <text:s text:c="10"/>/*for digits higher than 9, convert to letters starting at A*/</text:p>
      <text:p text:style-name="P333"><text:s text:c="2"/>width++; <text:s text:c="21"/>/*increment the width so we know when enough digits are saved*/</text:p>
      <text:p text:style-name="P334"><text:s text:c="1"/>}</text:p>
      <text:p text:style-name="P335"><text:s text:c="1"/>return s; <text:s text:c="21"/>/*return this string to be used by putstr,printf,std::cout or whatever*/</text:p>
      <text:p text:style-name="P336">}</text:p>
      <text:p text:style-name="P337"/>
      <text:p text:style-name="P338">void putint(unsigned int i)</text:p>
      <text:p text:style-name="P339">{</text:p>
      <text:p text:style-name="P340"><text:s text:c="1"/>putstring(intstr(i));</text:p>
      <text:p text:style-name="P341">}</text:p>
      <text:p text:style-name="P342"/>
      <text:p text:style-name="P343">int main(int argc, char *argv[])</text:p>
      <text:p text:style-name="P344">{</text:p>
      <text:p text:style-name="P345"><text:s text:c="1"/>int a=0;</text:p>
      <text:p text:style-name="P346"/>
      <text:p text:style-name="P347"><text:s text:c="1"/>putstring("The putstring function can print any string!\n");</text:p>
      <text:p text:style-name="P348"><text:s text:c="1"/>putstring("The intstr function can convert an integer to a string!\n");</text:p>
      <text:p text:style-name="P349"><text:s text:c="1"/>putstring("The putint function calls intstr and putstring to print an integer\n");</text:p>
      <text:p text:style-name="P350"><text:s text:c="1"/></text:p>
      <text:p text:style-name="P351"><text:s text:c="1"/>while(a&lt;0x10)</text:p>
      <text:p text:style-name="P352"><text:s text:c="1"/>{</text:p>
      <text:p text:style-name="P353"><text:s text:c="2"/>putint(a);</text:p>
      <text:p text:style-name="P354"><text:s text:c="2"/>putstring("\n");</text:p>
      <text:p text:style-name="P355"><text:s text:c="2"/>a++;</text:p>
      <text:p text:style-name="P356"><text:s text:c="1"/>}</text:p>
      <text:p text:style-name="P357"><text:s text:c="1"/></text:p>
      <text:p text:style-name="P358"><text:s text:c="1"/>_exit(0);</text:p>
      <text:p text:style-name="P359">}</text:p>
      <text:p text:style-name="First_20_paragraph">After the putstring function was defined, I defined some global variables which control the details of where the digits for integers are stored and which number base or radix will be used to convert an integer into a string.</text:p>
      <text:p text:style-name="Text_20_body">The width variable determines how many minimum digits are going to be printed. A width of 8 for example would mean that extra zeros would be prefixed if the number was naturally less than 8 digits. Most of the time this can be left as 1 so that only the minimum number of required digits is used.</text:p>
      <text:p text:style-name="Text_20_body">I will admit that the intstr function which uses these variables looks quite complicated to a beginner programmer. However, this difficulty does not come from the C language.</text:p>
      <text:p text:style-name="Text_20_body">The reason that this function is complex is because it requires the human reading it to understand the nature of number systems themselves. If you don’t know about bases other than ten, you probably haven’t thought about it much. In fact, most people don’t even take the time to analyze the base ten system of numbers they are already using. For now, I suggest learning about the binary numeral system from other sources for clarification, though I may be including more information about it in this book later about number bases and the pros and cons of them.</text:p>
      <text:p text:style-name="Text_20_body">The last C program I showed you will print the following text when compiled and run.</text:p>
      <text:p text:style-name="P360">The putstring function can print any string!</text:p>
      <text:p text:style-name="P361">The intstr function can convert an integer to a string!</text:p>
      <text:p text:style-name="P362">The putint function calls intstr and putstring to print an integer</text:p>
      <text:p text:style-name="P363">0</text:p>
      <text:p text:style-name="P364">1</text:p>
      <text:p text:style-name="P365">10</text:p>
      <text:p text:style-name="P366">11</text:p>
      <text:p text:style-name="P367">100</text:p>
      <text:p text:style-name="P368">101</text:p>
      <text:p text:style-name="P369">110</text:p>
      <text:p text:style-name="P370">111</text:p>
      <text:p text:style-name="P371">1000</text:p>
      <text:p text:style-name="P372">1001</text:p>
      <text:p text:style-name="P373">1010</text:p>
      <text:p text:style-name="P374">1011</text:p>
      <text:p text:style-name="P375">1100</text:p>
      <text:p text:style-name="P376">1101</text:p>
      <text:p text:style-name="P377">1110</text:p>
      <text:p text:style-name="P378">1111</text:p>
      <text:p text:style-name="First_20_paragraph">Naturally, I am going to show you the assembly program that does the same exact thing as the C version above.</text:p>
      <text:h text:style-name="Heading_20_2" text:outline-level="2"><text:bookmark-start text:name="fasm-putint"/>FASM putint<text:bookmark-end text:name="fasm-putint"/></text:h>
      <text:p text:style-name="P379">format ELF executable</text:p>
      <text:p text:style-name="P380"/>
      <text:p text:style-name="P381">main:</text:p>
      <text:p text:style-name="P382"/>
      <text:p text:style-name="P383">mov eax,string0</text:p>
      <text:p text:style-name="P384">call putstring</text:p>
      <text:p text:style-name="P385">mov eax,string1</text:p>
      <text:p text:style-name="P386">call putstring</text:p>
      <text:p text:style-name="P387">mov eax,string2</text:p>
      <text:p text:style-name="P388">call putstring</text:p>
      <text:p text:style-name="P389"/>
      <text:p text:style-name="P390">mov eax,0</text:p>
      <text:p text:style-name="P391"/>
      <text:p text:style-name="P392">loop0:</text:p>
      <text:p text:style-name="P393">call putint</text:p>
      <text:p text:style-name="P394">call putline</text:p>
      <text:p text:style-name="P395">inc eax</text:p>
      <text:p text:style-name="P396">cmp eax,0x10</text:p>
      <text:p text:style-name="P397">jnz loop0</text:p>
      <text:p text:style-name="P398"/>
      <text:p text:style-name="P399">mov eax,1 ; invoke SYS_EXIT (kernel opcode 1)</text:p>
      <text:p text:style-name="P400">mov ebx,0 ; return 0 status on exit - 'No Errors'</text:p>
      <text:p text:style-name="P401">int 80h</text:p>
      <text:p text:style-name="P402"/>
      <text:p text:style-name="P403">string0 db 'The putstring function can print any string!',0Ah,0</text:p>
      <text:p text:style-name="P404">string1 db 'The intstr function can convert an integer to a string!',0Ah,0</text:p>
      <text:p text:style-name="P405">string2 db 'The putint function calls intstr and putstring to print an integer',0Ah,0</text:p>
      <text:p text:style-name="P406"/>
      <text:p text:style-name="P407">putstring:</text:p>
      <text:p text:style-name="P408"/>
      <text:p text:style-name="P409">push eax</text:p>
      <text:p text:style-name="P410">push ebx</text:p>
      <text:p text:style-name="P411">push ecx</text:p>
      <text:p text:style-name="P412">push edx</text:p>
      <text:p text:style-name="P413"/>
      <text:p text:style-name="P414">mov ebx,eax</text:p>
      <text:p text:style-name="P415"/>
      <text:p text:style-name="P416">putstring_strlen_start:</text:p>
      <text:p text:style-name="P417"/>
      <text:p text:style-name="P418">cmp [ebx],byte 0</text:p>
      <text:p text:style-name="P419">jz putstring_strlen_end</text:p>
      <text:p text:style-name="P420">inc ebx</text:p>
      <text:p text:style-name="P421">jmp putstring_strlen_start</text:p>
      <text:p text:style-name="P422"/>
      <text:p text:style-name="P423">putstring_strlen_end:</text:p>
      <text:p text:style-name="P424">sub ebx,eax</text:p>
      <text:p text:style-name="P425"/>
      <text:p text:style-name="P426">mov edx,ebx ;number of bytes to write</text:p>
      <text:p text:style-name="P427">mov ecx,eax ;pointer/address of string to write</text:p>
      <text:p text:style-name="P428">mov ebx,1 <text:s text:c="2"/>;write to the STDOUT file</text:p>
      <text:p text:style-name="P429">mov eax,4 <text:s text:c="2"/>;invoke SYS_WRITE (kernel opcode 4 on 32 bit systems)</text:p>
      <text:p text:style-name="P430">int 80h <text:s text:c="4"/>;system call to write the message</text:p>
      <text:p text:style-name="P431"/>
      <text:p text:style-name="P432">pop edx</text:p>
      <text:p text:style-name="P433">pop ecx</text:p>
      <text:p text:style-name="P434">pop ebx</text:p>
      <text:p text:style-name="P435">pop eax</text:p>
      <text:p text:style-name="P436"/>
      <text:p text:style-name="P437">ret</text:p>
      <text:p text:style-name="P438"/>
      <text:p text:style-name="P439">; This is the location in memory where digits are written to by the intstr function</text:p>
      <text:p text:style-name="P440">; The string of bytes and settings such as the radix and width are global variables defined below.</text:p>
      <text:p text:style-name="P441"/>
      <text:p text:style-name="P442">int_string db 32 dup '?' ;enough bytes to hold maximum size 32-bit binary integer</text:p>
      <text:p text:style-name="P443"/>
      <text:p text:style-name="P444">int_string_end db 0 ;zero byte terminator for the integer string</text:p>
      <text:p text:style-name="P445"/>
      <text:p text:style-name="P446">radix dd 2 ;radix or base for integer output. 2=binary, 8=octal, 10=decimal, 16=hexadecimal</text:p>
      <text:p text:style-name="P447">int_width dd 1 ;default width of integers. Extra zeros prefixed if more than 1</text:p>
      <text:p text:style-name="P448"/>
      <text:p text:style-name="P449">;this function creates a string of the integer in eax</text:p>
      <text:p text:style-name="P450">;it uses the above radix variable to determine base from 2 to 36</text:p>
      <text:p text:style-name="P451">;it then loads eax with the address of the string</text:p>
      <text:p text:style-name="P452">;this means that it can be used with the putstring function</text:p>
      <text:p text:style-name="P453"/>
      <text:p text:style-name="P454">intstr:</text:p>
      <text:p text:style-name="P455"/>
      <text:p text:style-name="P456">mov ebx,int_string_end-1 ;find address of lowest digit(just before the newline 0Ah)</text:p>
      <text:p text:style-name="P457">mov ecx,1</text:p>
      <text:p text:style-name="P458"/>
      <text:p text:style-name="P459">digits_start:</text:p>
      <text:p text:style-name="P460"/>
      <text:p text:style-name="P461">mov edx,0;</text:p>
      <text:p text:style-name="P462">div dword [radix]</text:p>
      <text:p text:style-name="P463">cmp edx,10</text:p>
      <text:p text:style-name="P464">jb decimal_digit</text:p>
      <text:p text:style-name="P465">jnb hexadecimal_digit</text:p>
      <text:p text:style-name="P466"/>
      <text:p text:style-name="P467">decimal_digit: ;we go here if it is only a digit 0 to 9</text:p>
      <text:p text:style-name="P468">add edx,'0'</text:p>
      <text:p text:style-name="P469">jmp save_digit</text:p>
      <text:p text:style-name="P470"/>
      <text:p text:style-name="P471">hexadecimal_digit:</text:p>
      <text:p text:style-name="P472">sub edx,10</text:p>
      <text:p text:style-name="P473">add edx,'A'</text:p>
      <text:p text:style-name="P474"/>
      <text:p text:style-name="P475">save_digit:</text:p>
      <text:p text:style-name="P476"/>
      <text:p text:style-name="P477">mov [ebx],dl</text:p>
      <text:p text:style-name="P478">cmp eax,0</text:p>
      <text:p text:style-name="P479">jz intstr_end</text:p>
      <text:p text:style-name="P480">dec ebx</text:p>
      <text:p text:style-name="P481">inc ecx</text:p>
      <text:p text:style-name="P482">jmp digits_start</text:p>
      <text:p text:style-name="P483"/>
      <text:p text:style-name="P484">intstr_end:</text:p>
      <text:p text:style-name="P485"/>
      <text:p text:style-name="P486">prefix_zeros:</text:p>
      <text:p text:style-name="P487">cmp ecx,[int_width]</text:p>
      <text:p text:style-name="P488">jnb end_zeros</text:p>
      <text:p text:style-name="P489">dec ebx</text:p>
      <text:p text:style-name="P490">mov [ebx],byte '0'</text:p>
      <text:p text:style-name="P491">inc ecx</text:p>
      <text:p text:style-name="P492">jmp prefix_zeros</text:p>
      <text:p text:style-name="P493">end_zeros:</text:p>
      <text:p text:style-name="P494"/>
      <text:p text:style-name="P495">mov eax,ebx ; now that the digits have been written to the string, display it!</text:p>
      <text:p text:style-name="P496"/>
      <text:p text:style-name="P497">ret</text:p>
      <text:p text:style-name="P498"/>
      <text:p text:style-name="P499">; function to print string form of whatever integer is in eax</text:p>
      <text:p text:style-name="P500">; The radix determines which number base the string form takes.</text:p>
      <text:p text:style-name="P501">; Anything from 2 to 36 is a valid radix</text:p>
      <text:p text:style-name="P502">; in practice though, only bases 2,8,10,and 16 will make sense to other programmers</text:p>
      <text:p text:style-name="P503">; this function does not process anything by itself but calls the combination of my other</text:p>
      <text:p text:style-name="P504">; functions in the order I intended them to be used.</text:p>
      <text:p text:style-name="P505"/>
      <text:p text:style-name="P506">putint: </text:p>
      <text:p text:style-name="P507"/>
      <text:p text:style-name="P508">push eax</text:p>
      <text:p text:style-name="P509">push ebx</text:p>
      <text:p text:style-name="P510">push ecx</text:p>
      <text:p text:style-name="P511">push edx</text:p>
      <text:p text:style-name="P512"/>
      <text:p text:style-name="P513">call intstr</text:p>
      <text:p text:style-name="P514"/>
      <text:p text:style-name="P515">call putstring</text:p>
      <text:p text:style-name="P516"/>
      <text:p text:style-name="P517">pop edx</text:p>
      <text:p text:style-name="P518">pop ecx</text:p>
      <text:p text:style-name="P519">pop ebx</text:p>
      <text:p text:style-name="P520">pop eax</text:p>
      <text:p text:style-name="P521"/>
      <text:p text:style-name="P522">ret</text:p>
      <text:p text:style-name="P523"/>
      <text:p text:style-name="P524">line db 0Ah,0 ;a string containing only a newline</text:p>
      <text:p text:style-name="P525"/>
      <text:p text:style-name="P526">;the next function which pushes eax to the stack</text:p>
      <text:p text:style-name="P527">;moves the address of the line string and prints it with putstring</text:p>
      <text:p text:style-name="P528">;then it pops the original value of eax back from the stack before the function returns</text:p>
      <text:p text:style-name="P529">;this allows me to print a newline anywhere in the code without a single register changing</text:p>
      <text:p text:style-name="P530"/>
      <text:p text:style-name="P531">putline:</text:p>
      <text:p text:style-name="P532">push eax</text:p>
      <text:p text:style-name="P533">mov eax,line</text:p>
      <text:p text:style-name="P534">call putstring</text:p>
      <text:p text:style-name="P535">pop eax</text:p>
      <text:p text:style-name="P536">ret</text:p>
      <text:p text:style-name="First_20_paragraph">Although this program is longer than the C version, it is doing all of the same things. This program is very simple in terms of what it does. Here is a brief breakdown of it.</text:p>
      <text:p text:style-name="Text_20_body">It sets eax to the address of 3 different strings and each time calls putstring to print those strings until the terminating zero is found. The putstring function was described in chapter 4 and I promise you that you will not want to forget it because it is the top link in a chain of dependencies.</text:p>
      <text:p text:style-name="Text_20_body">Next, eax is set to 0 before a loop labeled as “loop0”. During this loop, the eax register is used when calling putint to print the eax register in the default base of binary. The putline function is called next to print a newline character. The reason this is done is because eax cannot be modified inside the loop or the program would crash. Therefor I wrote a function for printing a line which changes eax temporarily but will leave it as it was so that the loop is still functioning correctly.</text:p>
      <text:p text:style-name="Text_20_body">Next, eax is incremented with the “inc” instruction. This is the same as adding 1 to a variable as you saw in the putstring when I incremented ebx in the same way.</text:p>
      <text:p text:style-name="Text_20_body">The next instruction of “cmp eax,0x10” compares eax with the number 16. It updates flags but does not modify anything else so that the next instruction of “jnz loop0” will operate correctly. If eax was not equal to 16 in the last comparison, then it will jump to the loop0 label.</text:p>
      <text:h text:style-name="Heading_20_2" text:outline-level="2"><text:bookmark-start text:name="side-rant-on-condition-jumps"/>Side rant on condition jumps<text:bookmark-end text:name="side-rant-on-condition-jumps"/></text:h>
      <text:p text:style-name="First_20_paragraph">You might wonder, why is the conditional jump called “jnz” when it means jump if not equal? Technically you can also change it to “jne” and it will still assembly and run.</text:p>
      <text:p text:style-name="Text_20_body">The way Assembly language works is that when you compare something with “cmp”, it subtracts the second number from the first number to get a result but it does not save that result. Therefore, only when eax equals 16 will the the comparison of 16 minus 16 equal zero.</text:p>
      <text:p text:style-name="Text_20_body">I will be covering more about conditional jumps and other things in the next chapter, but for now you can consider the “jnz” to be the same as “jne” and write whichever one you like best. Similarly, you can also modify the last program to use “jb” which means jump if below. The opposite of “jb” would be “ja” which means jump if above.</text:p>
      <text:h text:style-name="Heading_20_2" text:outline-level="2"><text:bookmark-start text:name="how-the-intstr-function-works"/>How the intstr function works<text:bookmark-end text:name="how-the-intstr-function-works"/></text:h>
      <text:p text:style-name="First_20_paragraph">Mastery of conditional jumps is essential for the operation of the intstr function in this chapter that converts integers to strings. This function contains a loop which divides eax with “div” and the remainder is stored in edx. Depending on the value of dl (the lowest byte of edx), we need to jump to different places for different bases.</text:p>
      <text:p text:style-name="Text_20_body">For example, if the remainder is 0 to 9, we can consider it a decimal digit. Then we have to add the ASCII value for ‘0’ which is not the same as the number zero but is instead forty eight. Then it will display as the digit that we expect it to. However, if the digit is ten or above, then we have to represent it somehow using a convenient list of recognized symbols. Letters A to Z of the alphabet were the obvious choice when these decisions were made decades ago. Adding the ASCII value of ‘A’ or sixty-five works for making the digit display as something we can understand. This is how the hexadecimal system works, for example. The intstr function is my largest function so far because it has to handle all these different scenarios that can happen.</text:p>
      <text:p text:style-name="Text_20_body">For greater understanding, I give you the following table of convenient characters for integers.</text:p>
      <text:h text:style-name="Heading_20_2" text:outline-level="2"><text:bookmark-start text:name="digit-character-table"/>Digit Character Table<text:bookmark-end text:name="digit-character-table"/></text:h>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bin</text:p>
            </table:table-cell>
            <table:table-cell table:style-name="TableHeaderRowCell" office:value-type="string">
              <text:p text:style-name="Table_20_Heading">hex</text:p>
            </table:table-cell>
            <table:table-cell table:style-name="TableHeaderRowCell" office:value-type="string">
              <text:p text:style-name="Table_20_Heading">dec</text:p>
            </table:table-cell>
            <table:table-cell table:style-name="TableHeaderRowCell" office:value-type="string">
              <text:p text:style-name="Table_20_Heading">character</text:p>
            </table:table-cell>
          </table:table-row>
        </table:table-header-rows>
        <table:table-row>
          <table:table-cell table:style-name="TableRowCell" office:value-type="string">
            <text:p text:style-name="Table_20_Contents">00110000</text:p>
          </table:table-cell>
          <table:table-cell table:style-name="TableRowCell" office:value-type="string">
            <text:p text:style-name="Table_20_Contents">30</text:p>
          </table:table-cell>
          <table:table-cell table:style-name="TableRowCell" office:value-type="string">
            <text:p text:style-name="Table_20_Contents">048</text:p>
          </table:table-cell>
          <table:table-cell table:style-name="TableRowCell" office:value-type="string">
            <text:p text:style-name="Table_20_Contents">0</text:p>
          </table:table-cell>
        </table:table-row>
        <table:table-row>
          <table:table-cell table:style-name="TableRowCell" office:value-type="string">
            <text:p text:style-name="Table_20_Contents">00110001</text:p>
          </table:table-cell>
          <table:table-cell table:style-name="TableRowCell" office:value-type="string">
            <text:p text:style-name="Table_20_Contents">31</text:p>
          </table:table-cell>
          <table:table-cell table:style-name="TableRowCell" office:value-type="string">
            <text:p text:style-name="Table_20_Contents">049</text:p>
          </table:table-cell>
          <table:table-cell table:style-name="TableRowCell" office:value-type="string">
            <text:p text:style-name="Table_20_Contents">1</text:p>
          </table:table-cell>
        </table:table-row>
        <table:table-row>
          <table:table-cell table:style-name="TableRowCell" office:value-type="string">
            <text:p text:style-name="Table_20_Contents">00110010</text:p>
          </table:table-cell>
          <table:table-cell table:style-name="TableRowCell" office:value-type="string">
            <text:p text:style-name="Table_20_Contents">32</text:p>
          </table:table-cell>
          <table:table-cell table:style-name="TableRowCell" office:value-type="string">
            <text:p text:style-name="Table_20_Contents">050</text:p>
          </table:table-cell>
          <table:table-cell table:style-name="TableRowCell" office:value-type="string">
            <text:p text:style-name="Table_20_Contents">2</text:p>
          </table:table-cell>
        </table:table-row>
        <table:table-row>
          <table:table-cell table:style-name="TableRowCell" office:value-type="string">
            <text:p text:style-name="Table_20_Contents">00110011</text:p>
          </table:table-cell>
          <table:table-cell table:style-name="TableRowCell" office:value-type="string">
            <text:p text:style-name="Table_20_Contents">33</text:p>
          </table:table-cell>
          <table:table-cell table:style-name="TableRowCell" office:value-type="string">
            <text:p text:style-name="Table_20_Contents">051</text:p>
          </table:table-cell>
          <table:table-cell table:style-name="TableRowCell" office:value-type="string">
            <text:p text:style-name="Table_20_Contents">3</text:p>
          </table:table-cell>
        </table:table-row>
        <table:table-row>
          <table:table-cell table:style-name="TableRowCell" office:value-type="string">
            <text:p text:style-name="Table_20_Contents">00110100</text:p>
          </table:table-cell>
          <table:table-cell table:style-name="TableRowCell" office:value-type="string">
            <text:p text:style-name="Table_20_Contents">34</text:p>
          </table:table-cell>
          <table:table-cell table:style-name="TableRowCell" office:value-type="string">
            <text:p text:style-name="Table_20_Contents">052</text:p>
          </table:table-cell>
          <table:table-cell table:style-name="TableRowCell" office:value-type="string">
            <text:p text:style-name="Table_20_Contents">4</text:p>
          </table:table-cell>
        </table:table-row>
        <table:table-row>
          <table:table-cell table:style-name="TableRowCell" office:value-type="string">
            <text:p text:style-name="Table_20_Contents">00110101</text:p>
          </table:table-cell>
          <table:table-cell table:style-name="TableRowCell" office:value-type="string">
            <text:p text:style-name="Table_20_Contents">35</text:p>
          </table:table-cell>
          <table:table-cell table:style-name="TableRowCell" office:value-type="string">
            <text:p text:style-name="Table_20_Contents">053</text:p>
          </table:table-cell>
          <table:table-cell table:style-name="TableRowCell" office:value-type="string">
            <text:p text:style-name="Table_20_Contents">5</text:p>
          </table:table-cell>
        </table:table-row>
        <table:table-row>
          <table:table-cell table:style-name="TableRowCell" office:value-type="string">
            <text:p text:style-name="Table_20_Contents">00110110</text:p>
          </table:table-cell>
          <table:table-cell table:style-name="TableRowCell" office:value-type="string">
            <text:p text:style-name="Table_20_Contents">36</text:p>
          </table:table-cell>
          <table:table-cell table:style-name="TableRowCell" office:value-type="string">
            <text:p text:style-name="Table_20_Contents">054</text:p>
          </table:table-cell>
          <table:table-cell table:style-name="TableRowCell" office:value-type="string">
            <text:p text:style-name="Table_20_Contents">6</text:p>
          </table:table-cell>
        </table:table-row>
        <table:table-row>
          <table:table-cell table:style-name="TableRowCell" office:value-type="string">
            <text:p text:style-name="Table_20_Contents">00110111</text:p>
          </table:table-cell>
          <table:table-cell table:style-name="TableRowCell" office:value-type="string">
            <text:p text:style-name="Table_20_Contents">37</text:p>
          </table:table-cell>
          <table:table-cell table:style-name="TableRowCell" office:value-type="string">
            <text:p text:style-name="Table_20_Contents">055</text:p>
          </table:table-cell>
          <table:table-cell table:style-name="TableRowCell" office:value-type="string">
            <text:p text:style-name="Table_20_Contents">7</text:p>
          </table:table-cell>
        </table:table-row>
        <table:table-row>
          <table:table-cell table:style-name="TableRowCell" office:value-type="string">
            <text:p text:style-name="Table_20_Contents">00111000</text:p>
          </table:table-cell>
          <table:table-cell table:style-name="TableRowCell" office:value-type="string">
            <text:p text:style-name="Table_20_Contents">38</text:p>
          </table:table-cell>
          <table:table-cell table:style-name="TableRowCell" office:value-type="string">
            <text:p text:style-name="Table_20_Contents">056</text:p>
          </table:table-cell>
          <table:table-cell table:style-name="TableRowCell" office:value-type="string">
            <text:p text:style-name="Table_20_Contents">8</text:p>
          </table:table-cell>
        </table:table-row>
        <table:table-row>
          <table:table-cell table:style-name="TableRowCell" office:value-type="string">
            <text:p text:style-name="Table_20_Contents">00111001</text:p>
          </table:table-cell>
          <table:table-cell table:style-name="TableRowCell" office:value-type="string">
            <text:p text:style-name="Table_20_Contents">39</text:p>
          </table:table-cell>
          <table:table-cell table:style-name="TableRowCell" office:value-type="string">
            <text:p text:style-name="Table_20_Contents">057</text:p>
          </table:table-cell>
          <table:table-cell table:style-name="TableRowCell" office:value-type="string">
            <text:p text:style-name="Table_20_Contents">9</text:p>
          </table:table-cell>
        </table:table-row>
        <table:table-row>
          <table:table-cell table:style-name="TableRowCell" office:value-type="string">
            <text:p text:style-name="Table_20_Contents">01000001</text:p>
          </table:table-cell>
          <table:table-cell table:style-name="TableRowCell" office:value-type="string">
            <text:p text:style-name="Table_20_Contents">41</text:p>
          </table:table-cell>
          <table:table-cell table:style-name="TableRowCell" office:value-type="string">
            <text:p text:style-name="Table_20_Contents">065</text:p>
          </table:table-cell>
          <table:table-cell table:style-name="TableRowCell" office:value-type="string">
            <text:p text:style-name="Table_20_Contents">A</text:p>
          </table:table-cell>
        </table:table-row>
        <table:table-row>
          <table:table-cell table:style-name="TableRowCell" office:value-type="string">
            <text:p text:style-name="Table_20_Contents">01000010</text:p>
          </table:table-cell>
          <table:table-cell table:style-name="TableRowCell" office:value-type="string">
            <text:p text:style-name="Table_20_Contents">42</text:p>
          </table:table-cell>
          <table:table-cell table:style-name="TableRowCell" office:value-type="string">
            <text:p text:style-name="Table_20_Contents">066</text:p>
          </table:table-cell>
          <table:table-cell table:style-name="TableRowCell" office:value-type="string">
            <text:p text:style-name="Table_20_Contents">B</text:p>
          </table:table-cell>
        </table:table-row>
        <table:table-row>
          <table:table-cell table:style-name="TableRowCell" office:value-type="string">
            <text:p text:style-name="Table_20_Contents">01000011</text:p>
          </table:table-cell>
          <table:table-cell table:style-name="TableRowCell" office:value-type="string">
            <text:p text:style-name="Table_20_Contents">43</text:p>
          </table:table-cell>
          <table:table-cell table:style-name="TableRowCell" office:value-type="string">
            <text:p text:style-name="Table_20_Contents">067</text:p>
          </table:table-cell>
          <table:table-cell table:style-name="TableRowCell" office:value-type="string">
            <text:p text:style-name="Table_20_Contents">C</text:p>
          </table:table-cell>
        </table:table-row>
        <table:table-row>
          <table:table-cell table:style-name="TableRowCell" office:value-type="string">
            <text:p text:style-name="Table_20_Contents">01000100</text:p>
          </table:table-cell>
          <table:table-cell table:style-name="TableRowCell" office:value-type="string">
            <text:p text:style-name="Table_20_Contents">44</text:p>
          </table:table-cell>
          <table:table-cell table:style-name="TableRowCell" office:value-type="string">
            <text:p text:style-name="Table_20_Contents">068</text:p>
          </table:table-cell>
          <table:table-cell table:style-name="TableRowCell" office:value-type="string">
            <text:p text:style-name="Table_20_Contents">D</text:p>
          </table:table-cell>
        </table:table-row>
        <table:table-row>
          <table:table-cell table:style-name="TableRowCell" office:value-type="string">
            <text:p text:style-name="Table_20_Contents">01000101</text:p>
          </table:table-cell>
          <table:table-cell table:style-name="TableRowCell" office:value-type="string">
            <text:p text:style-name="Table_20_Contents">45</text:p>
          </table:table-cell>
          <table:table-cell table:style-name="TableRowCell" office:value-type="string">
            <text:p text:style-name="Table_20_Contents">069</text:p>
          </table:table-cell>
          <table:table-cell table:style-name="TableRowCell" office:value-type="string">
            <text:p text:style-name="Table_20_Contents">E</text:p>
          </table:table-cell>
        </table:table-row>
        <table:table-row>
          <table:table-cell table:style-name="TableRowCell" office:value-type="string">
            <text:p text:style-name="Table_20_Contents">01000110</text:p>
          </table:table-cell>
          <table:table-cell table:style-name="TableRowCell" office:value-type="string">
            <text:p text:style-name="Table_20_Contents">46</text:p>
          </table:table-cell>
          <table:table-cell table:style-name="TableRowCell" office:value-type="string">
            <text:p text:style-name="Table_20_Contents">070</text:p>
          </table:table-cell>
          <table:table-cell table:style-name="TableRowCell" office:value-type="string">
            <text:p text:style-name="Table_20_Contents">F</text:p>
          </table:table-cell>
        </table:table-row>
        <table:table-row>
          <table:table-cell table:style-name="TableRowCell" office:value-type="string">
            <text:p text:style-name="Table_20_Contents">01000111</text:p>
          </table:table-cell>
          <table:table-cell table:style-name="TableRowCell" office:value-type="string">
            <text:p text:style-name="Table_20_Contents">47</text:p>
          </table:table-cell>
          <table:table-cell table:style-name="TableRowCell" office:value-type="string">
            <text:p text:style-name="Table_20_Contents">071</text:p>
          </table:table-cell>
          <table:table-cell table:style-name="TableRowCell" office:value-type="string">
            <text:p text:style-name="Table_20_Contents">G</text:p>
          </table:table-cell>
        </table:table-row>
        <table:table-row>
          <table:table-cell table:style-name="TableRowCell" office:value-type="string">
            <text:p text:style-name="Table_20_Contents">01001000</text:p>
          </table:table-cell>
          <table:table-cell table:style-name="TableRowCell" office:value-type="string">
            <text:p text:style-name="Table_20_Contents">48</text:p>
          </table:table-cell>
          <table:table-cell table:style-name="TableRowCell" office:value-type="string">
            <text:p text:style-name="Table_20_Contents">072</text:p>
          </table:table-cell>
          <table:table-cell table:style-name="TableRowCell" office:value-type="string">
            <text:p text:style-name="Table_20_Contents">H</text:p>
          </table:table-cell>
        </table:table-row>
        <table:table-row>
          <table:table-cell table:style-name="TableRowCell" office:value-type="string">
            <text:p text:style-name="Table_20_Contents">01001001</text:p>
          </table:table-cell>
          <table:table-cell table:style-name="TableRowCell" office:value-type="string">
            <text:p text:style-name="Table_20_Contents">49</text:p>
          </table:table-cell>
          <table:table-cell table:style-name="TableRowCell" office:value-type="string">
            <text:p text:style-name="Table_20_Contents">073</text:p>
          </table:table-cell>
          <table:table-cell table:style-name="TableRowCell" office:value-type="string">
            <text:p text:style-name="Table_20_Contents">I</text:p>
          </table:table-cell>
        </table:table-row>
        <table:table-row>
          <table:table-cell table:style-name="TableRowCell" office:value-type="string">
            <text:p text:style-name="Table_20_Contents">01001010</text:p>
          </table:table-cell>
          <table:table-cell table:style-name="TableRowCell" office:value-type="string">
            <text:p text:style-name="Table_20_Contents">4A</text:p>
          </table:table-cell>
          <table:table-cell table:style-name="TableRowCell" office:value-type="string">
            <text:p text:style-name="Table_20_Contents">074</text:p>
          </table:table-cell>
          <table:table-cell table:style-name="TableRowCell" office:value-type="string">
            <text:p text:style-name="Table_20_Contents">J</text:p>
          </table:table-cell>
        </table:table-row>
        <table:table-row>
          <table:table-cell table:style-name="TableRowCell" office:value-type="string">
            <text:p text:style-name="Table_20_Contents">01001011</text:p>
          </table:table-cell>
          <table:table-cell table:style-name="TableRowCell" office:value-type="string">
            <text:p text:style-name="Table_20_Contents">4B</text:p>
          </table:table-cell>
          <table:table-cell table:style-name="TableRowCell" office:value-type="string">
            <text:p text:style-name="Table_20_Contents">075</text:p>
          </table:table-cell>
          <table:table-cell table:style-name="TableRowCell" office:value-type="string">
            <text:p text:style-name="Table_20_Contents">K</text:p>
          </table:table-cell>
        </table:table-row>
        <table:table-row>
          <table:table-cell table:style-name="TableRowCell" office:value-type="string">
            <text:p text:style-name="Table_20_Contents">01001100</text:p>
          </table:table-cell>
          <table:table-cell table:style-name="TableRowCell" office:value-type="string">
            <text:p text:style-name="Table_20_Contents">4C</text:p>
          </table:table-cell>
          <table:table-cell table:style-name="TableRowCell" office:value-type="string">
            <text:p text:style-name="Table_20_Contents">076</text:p>
          </table:table-cell>
          <table:table-cell table:style-name="TableRowCell" office:value-type="string">
            <text:p text:style-name="Table_20_Contents">L</text:p>
          </table:table-cell>
        </table:table-row>
        <table:table-row>
          <table:table-cell table:style-name="TableRowCell" office:value-type="string">
            <text:p text:style-name="Table_20_Contents">01001101</text:p>
          </table:table-cell>
          <table:table-cell table:style-name="TableRowCell" office:value-type="string">
            <text:p text:style-name="Table_20_Contents">4D</text:p>
          </table:table-cell>
          <table:table-cell table:style-name="TableRowCell" office:value-type="string">
            <text:p text:style-name="Table_20_Contents">077</text:p>
          </table:table-cell>
          <table:table-cell table:style-name="TableRowCell" office:value-type="string">
            <text:p text:style-name="Table_20_Contents">M</text:p>
          </table:table-cell>
        </table:table-row>
        <table:table-row>
          <table:table-cell table:style-name="TableRowCell" office:value-type="string">
            <text:p text:style-name="Table_20_Contents">01001110</text:p>
          </table:table-cell>
          <table:table-cell table:style-name="TableRowCell" office:value-type="string">
            <text:p text:style-name="Table_20_Contents">4E</text:p>
          </table:table-cell>
          <table:table-cell table:style-name="TableRowCell" office:value-type="string">
            <text:p text:style-name="Table_20_Contents">078</text:p>
          </table:table-cell>
          <table:table-cell table:style-name="TableRowCell" office:value-type="string">
            <text:p text:style-name="Table_20_Contents">N</text:p>
          </table:table-cell>
        </table:table-row>
        <table:table-row>
          <table:table-cell table:style-name="TableRowCell" office:value-type="string">
            <text:p text:style-name="Table_20_Contents">01001111</text:p>
          </table:table-cell>
          <table:table-cell table:style-name="TableRowCell" office:value-type="string">
            <text:p text:style-name="Table_20_Contents">4F</text:p>
          </table:table-cell>
          <table:table-cell table:style-name="TableRowCell" office:value-type="string">
            <text:p text:style-name="Table_20_Contents">079</text:p>
          </table:table-cell>
          <table:table-cell table:style-name="TableRowCell" office:value-type="string">
            <text:p text:style-name="Table_20_Contents">O</text:p>
          </table:table-cell>
        </table:table-row>
        <table:table-row>
          <table:table-cell table:style-name="TableRowCell" office:value-type="string">
            <text:p text:style-name="Table_20_Contents">01010000</text:p>
          </table:table-cell>
          <table:table-cell table:style-name="TableRowCell" office:value-type="string">
            <text:p text:style-name="Table_20_Contents">50</text:p>
          </table:table-cell>
          <table:table-cell table:style-name="TableRowCell" office:value-type="string">
            <text:p text:style-name="Table_20_Contents">080</text:p>
          </table:table-cell>
          <table:table-cell table:style-name="TableRowCell" office:value-type="string">
            <text:p text:style-name="Table_20_Contents">P</text:p>
          </table:table-cell>
        </table:table-row>
        <table:table-row>
          <table:table-cell table:style-name="TableRowCell" office:value-type="string">
            <text:p text:style-name="Table_20_Contents">01010001</text:p>
          </table:table-cell>
          <table:table-cell table:style-name="TableRowCell" office:value-type="string">
            <text:p text:style-name="Table_20_Contents">51</text:p>
          </table:table-cell>
          <table:table-cell table:style-name="TableRowCell" office:value-type="string">
            <text:p text:style-name="Table_20_Contents">081</text:p>
          </table:table-cell>
          <table:table-cell table:style-name="TableRowCell" office:value-type="string">
            <text:p text:style-name="Table_20_Contents">Q</text:p>
          </table:table-cell>
        </table:table-row>
        <table:table-row>
          <table:table-cell table:style-name="TableRowCell" office:value-type="string">
            <text:p text:style-name="Table_20_Contents">01010010</text:p>
          </table:table-cell>
          <table:table-cell table:style-name="TableRowCell" office:value-type="string">
            <text:p text:style-name="Table_20_Contents">52</text:p>
          </table:table-cell>
          <table:table-cell table:style-name="TableRowCell" office:value-type="string">
            <text:p text:style-name="Table_20_Contents">082</text:p>
          </table:table-cell>
          <table:table-cell table:style-name="TableRowCell" office:value-type="string">
            <text:p text:style-name="Table_20_Contents">R</text:p>
          </table:table-cell>
        </table:table-row>
        <table:table-row>
          <table:table-cell table:style-name="TableRowCell" office:value-type="string">
            <text:p text:style-name="Table_20_Contents">01010011</text:p>
          </table:table-cell>
          <table:table-cell table:style-name="TableRowCell" office:value-type="string">
            <text:p text:style-name="Table_20_Contents">53</text:p>
          </table:table-cell>
          <table:table-cell table:style-name="TableRowCell" office:value-type="string">
            <text:p text:style-name="Table_20_Contents">083</text:p>
          </table:table-cell>
          <table:table-cell table:style-name="TableRowCell" office:value-type="string">
            <text:p text:style-name="Table_20_Contents">S</text:p>
          </table:table-cell>
        </table:table-row>
        <table:table-row>
          <table:table-cell table:style-name="TableRowCell" office:value-type="string">
            <text:p text:style-name="Table_20_Contents">01010100</text:p>
          </table:table-cell>
          <table:table-cell table:style-name="TableRowCell" office:value-type="string">
            <text:p text:style-name="Table_20_Contents">54</text:p>
          </table:table-cell>
          <table:table-cell table:style-name="TableRowCell" office:value-type="string">
            <text:p text:style-name="Table_20_Contents">084</text:p>
          </table:table-cell>
          <table:table-cell table:style-name="TableRowCell" office:value-type="string">
            <text:p text:style-name="Table_20_Contents">T</text:p>
          </table:table-cell>
        </table:table-row>
        <table:table-row>
          <table:table-cell table:style-name="TableRowCell" office:value-type="string">
            <text:p text:style-name="Table_20_Contents">01010101</text:p>
          </table:table-cell>
          <table:table-cell table:style-name="TableRowCell" office:value-type="string">
            <text:p text:style-name="Table_20_Contents">55</text:p>
          </table:table-cell>
          <table:table-cell table:style-name="TableRowCell" office:value-type="string">
            <text:p text:style-name="Table_20_Contents">085</text:p>
          </table:table-cell>
          <table:table-cell table:style-name="TableRowCell" office:value-type="string">
            <text:p text:style-name="Table_20_Contents">U</text:p>
          </table:table-cell>
        </table:table-row>
        <table:table-row>
          <table:table-cell table:style-name="TableRowCell" office:value-type="string">
            <text:p text:style-name="Table_20_Contents">01010110</text:p>
          </table:table-cell>
          <table:table-cell table:style-name="TableRowCell" office:value-type="string">
            <text:p text:style-name="Table_20_Contents">56</text:p>
          </table:table-cell>
          <table:table-cell table:style-name="TableRowCell" office:value-type="string">
            <text:p text:style-name="Table_20_Contents">086</text:p>
          </table:table-cell>
          <table:table-cell table:style-name="TableRowCell" office:value-type="string">
            <text:p text:style-name="Table_20_Contents">V</text:p>
          </table:table-cell>
        </table:table-row>
        <table:table-row>
          <table:table-cell table:style-name="TableRowCell" office:value-type="string">
            <text:p text:style-name="Table_20_Contents">01010111</text:p>
          </table:table-cell>
          <table:table-cell table:style-name="TableRowCell" office:value-type="string">
            <text:p text:style-name="Table_20_Contents">57</text:p>
          </table:table-cell>
          <table:table-cell table:style-name="TableRowCell" office:value-type="string">
            <text:p text:style-name="Table_20_Contents">087</text:p>
          </table:table-cell>
          <table:table-cell table:style-name="TableRowCell" office:value-type="string">
            <text:p text:style-name="Table_20_Contents">W</text:p>
          </table:table-cell>
        </table:table-row>
        <table:table-row>
          <table:table-cell table:style-name="TableRowCell" office:value-type="string">
            <text:p text:style-name="Table_20_Contents">01011000</text:p>
          </table:table-cell>
          <table:table-cell table:style-name="TableRowCell" office:value-type="string">
            <text:p text:style-name="Table_20_Contents">58</text:p>
          </table:table-cell>
          <table:table-cell table:style-name="TableRowCell" office:value-type="string">
            <text:p text:style-name="Table_20_Contents">088</text:p>
          </table:table-cell>
          <table:table-cell table:style-name="TableRowCell" office:value-type="string">
            <text:p text:style-name="Table_20_Contents">X</text:p>
          </table:table-cell>
        </table:table-row>
        <table:table-row>
          <table:table-cell table:style-name="TableRowCell" office:value-type="string">
            <text:p text:style-name="Table_20_Contents">01011001</text:p>
          </table:table-cell>
          <table:table-cell table:style-name="TableRowCell" office:value-type="string">
            <text:p text:style-name="Table_20_Contents">59</text:p>
          </table:table-cell>
          <table:table-cell table:style-name="TableRowCell" office:value-type="string">
            <text:p text:style-name="Table_20_Contents">089</text:p>
          </table:table-cell>
          <table:table-cell table:style-name="TableRowCell" office:value-type="string">
            <text:p text:style-name="Table_20_Contents">Y</text:p>
          </table:table-cell>
        </table:table-row>
        <table:table-row>
          <table:table-cell table:style-name="TableRowCell" office:value-type="string">
            <text:p text:style-name="Table_20_Contents">01011010</text:p>
          </table:table-cell>
          <table:table-cell table:style-name="TableRowCell" office:value-type="string">
            <text:p text:style-name="Table_20_Contents">5A</text:p>
          </table:table-cell>
          <table:table-cell table:style-name="TableRowCell" office:value-type="string">
            <text:p text:style-name="Table_20_Contents">090</text:p>
          </table:table-cell>
          <table:table-cell table:style-name="TableRowCell" office:value-type="string">
            <text:p text:style-name="Table_20_Contents">Z</text:p>
          </table:table-cell>
        </table:table-row>
      </table:table>
      <text:p text:style-name="First_20_paragraph">If you are feeling overwhelmed at the point, I don’t blame you. I am hitting you with more information than most programming books attempt to teach. So far the goal has only been to get you started with functions you can use to print strings and numbers to the console. Without doing this foundational step, this book would be like a book on the C Programming Language without including how to use printf.</text:p>
      <text:p text:style-name="Text_20_body">In Assembly, there is no printf. The programmer is responsible for printing the information by setting up registers, memory, and making system calls. This takes a lot of math and is not for the average human who doesn’t like low level details.</text:p>
      <text:p text:style-name="Text_20_body">If you’re still with me, I have some good news for you. The next chapter will be a low easier! I will explaining every single assembly instruction that most programs need and each instruction will have a short example that can be copied and pasted directly from the digital versions of this book or typed by hand if you have a paperback edition.</text:p>
      <text:p text:style-name="Text_20_body">However, those programs will use the putstring and putint functions a lot, and at some point you will thank me for spending 5 chapters on how to assemble programs that allow managing output to your Linux terminal.</text:p>
      <text:h text:style-name="Heading_20_1" text:outline-level="1"><text:bookmark-start text:name="chapter-6-chastitys-intel-assembly-reference"/>Chapter 6: Chastity’s Intel Assembly Reference<text:bookmark-end text:name="chapter-6-chastitys-intel-assembly-reference"/></text:h>
      <text:p text:style-name="First_20_paragraph">I use a very small subset of the Intel 8086 family instruction set. This is both because I want to limit it to my small memory (my brain memory, not computer memory). If you are like me and have a tendency to forget things, then Assembly language is actually very good because there is not a lot to remember when compared to bigger high level languages like C++ or Java. And if you do forget, this chapter will function as the definitive guide for performing math using Assembly language for Linux</text:p>
      <text:p text:style-name="Text_20_body"><text:span text:style-name="T1">Important note. All program listings in this chapter assume that you also included the putstring,intstr,and putint functions as shown in chapters 2 and 3. This can be done by including external files or just copy pasting their text after the system exit call from eax=1 and interrupt 80h. This keeps the exampled brief by not repeating functions you should already have from chapters 4 and 5.</text:span></text:p>
      <text:p text:style-name="Text_20_body">At the end of each example, you will see a line the reads</text:p>
      <text:p text:style-name="P537">include 'chastelib32.asm'</text:p>
      <text:p text:style-name="First_20_paragraph">The <text:a xlink:type="simple" xlink:href="#chastelib32.asm" office:name=""><text:span text:style-name="Definition">chastelib32.asm</text:span></text:a> file is a file containing the functions listed in chapters 4 and 5 but also includes a lot more commentary than I have included in those chapters. For your convenience, you can download it from my repository and/or view the entire source code of it by looking at the end of chapter 10. My functions provide a useful base which to can use to add,delete, or even improve upon mine. Not only do the examples in this reference chapter use them to show output, but so will the core four programs: chastack,chastext,chastecmp,and chastehex.</text:p>
      <text:p text:style-name="Text_20_body"><text:span text:style-name="T1">But</text:span> you don’t need the chastelib32.asm either because you can put the required functions in a file of your choice. As long as you <text:span text:style-name="T2">included</text:span> them in your source after the exit call, these examples will all work.</text:p>
      <text:h text:style-name="Heading_20_2" text:outline-level="2"><text:bookmark-start text:name="mov"/>mov<text:bookmark-end text:name="mov"/></text:h>
      <text:p text:style-name="First_20_paragraph">The mov instruction copies a number from one location to another. In the FASM and NASM assemblers, the instruction always takes the form</text:p>
      <text:p text:style-name="Text_20_body"><text:span text:style-name="Source_Text">mov destination,source</text:span></text:p>
      <text:p text:style-name="Text_20_body">Think of it as “destination=source” as you would write in C. For example, in the following program which prints the number 8, we see that most of the required data is set up with mov instructions.</text:p>
      <text:p text:style-name="P538">format ELF executable</text:p>
      <text:p text:style-name="P539"/>
      <text:p text:style-name="P540">main:</text:p>
      <text:p text:style-name="P541"/>
      <text:p text:style-name="P542">mov dword [radix],10</text:p>
      <text:p text:style-name="P543">mov dword [int_width],1</text:p>
      <text:p text:style-name="P544"/>
      <text:p text:style-name="P545">mov eax,3</text:p>
      <text:p text:style-name="P546">mov ebx,5</text:p>
      <text:p text:style-name="P547">add eax,ebx</text:p>
      <text:p text:style-name="P548"/>
      <text:p text:style-name="P549">call putint</text:p>
      <text:p text:style-name="P550">call putline</text:p>
      <text:p text:style-name="P551"/>
      <text:p text:style-name="P552">mov eax,1</text:p>
      <text:p text:style-name="P553">mov ebx,0</text:p>
      <text:p text:style-name="P554">int 80h</text:p>
      <text:p text:style-name="P555"/>
      <text:p text:style-name="P556">include 'chastelib32.asm'</text:p>
      <text:p text:style-name="First_20_paragraph">That program also contains the call, int, and add instructions to make a program that does something useful. However, mov instructions take up the largest part of any program. Whether you are filling a register with a number, another register, or a memory location, the mov instruction is the way to do it.</text:p>
      <text:h text:style-name="Heading_20_2" text:outline-level="2"><text:bookmark-start text:name="add"/>add<text:bookmark-end text:name="add"/></text:h>
      <text:p text:style-name="First_20_paragraph">Next to mov, you will see that add is going to be your friend in Assembly a lot. In the previous example, we saw that 3 and 5 were added to make 8. Just like mov, add follows the same rules.</text:p>
      <text:p text:style-name="Text_20_body"><text:span text:style-name="Source_Text">add destination,source</text:span></text:p>
      <text:list text:style-name="L6">
        <text:list-item>
          <text:p text:style-name="P557">Source is left of Destination and separated by a comma</text:p>
        </text:list-item>
        <text:list-item>
          <text:p text:style-name="P557">Source and destination can be registers and memory locations</text:p>
        </text:list-item>
        <text:list-item>
          <text:p text:style-name="P557">Source and Destination cannot both be memory location</text:p>
        </text:list-item>
      </text:list>
      <text:p text:style-name="First_20_paragraph">Most instructions that take two arguments follow these same rules. Once you have mastered mov and add, you can handle almost anything in a program because you know the basic rules.</text:p>
      <text:p text:style-name="Text_20_body">There is also the “inc” instruction which takes only one item and adds 1 to it. This is just a shorter way of saying “add Destination,1”</text:p>
      <text:h text:style-name="Heading_20_2" text:outline-level="2"><text:bookmark-start text:name="sub"/>sub<text:bookmark-end text:name="sub"/></text:h>
      <text:p text:style-name="First_20_paragraph">As its name implies, sub will subtract the Source from the Destination.</text:p>
      <text:p text:style-name="Text_20_body"><text:span text:style-name="Source_Text">sub destination,source</text:span></text:p>
      <text:p text:style-name="Text_20_body">Since it follows the same rules as mov and add (starting to see a pattern yet?), subtraction is just as easy as addition.</text:p>
      <text:p text:style-name="Text_20_body">Just as “add” has “inc”, “sub” has the “dec” instruction which subtracts 1. Adding or subtracting 1 are probably the most common thing ever done while programming in any language.</text:p>
      <text:p text:style-name="Text_20_body">Just as a review of the mov,add,sub instructions, here is a small program to show their effect.</text:p>
      <text:p text:style-name="P558">format ELF executable</text:p>
      <text:p text:style-name="P559"/>
      <text:p text:style-name="P560">main:</text:p>
      <text:p text:style-name="P561"/>
      <text:p text:style-name="P562">mov dword [radix],10</text:p>
      <text:p text:style-name="P563">mov dword [int_width],1</text:p>
      <text:p text:style-name="P564"/>
      <text:p text:style-name="P565">mov eax,8</text:p>
      <text:p text:style-name="P566">call putint</text:p>
      <text:p text:style-name="P567">call putline</text:p>
      <text:p text:style-name="P568">add eax,eax</text:p>
      <text:p text:style-name="P569">call putint</text:p>
      <text:p text:style-name="P570">call putline</text:p>
      <text:p text:style-name="P571">sub eax,4</text:p>
      <text:p text:style-name="P572">call putint</text:p>
      <text:p text:style-name="P573">call putline</text:p>
      <text:p text:style-name="P574"/>
      <text:p text:style-name="P575">mov eax,1</text:p>
      <text:p text:style-name="P576">mov ebx,0</text:p>
      <text:p text:style-name="P577">int 80h</text:p>
      <text:p text:style-name="P578"/>
      <text:p text:style-name="P579">include 'chastelib32.asm'</text:p>
      <text:p text:style-name="First_20_paragraph">That program will output the following.</text:p>
      <text:p text:style-name="P580">8</text:p>
      <text:p text:style-name="P581">16</text:p>
      <text:p text:style-name="P582">12</text:p>
      <text:p text:style-name="First_20_paragraph">This is because we set eax to 8, then we added eax to itself, and finally we subtracted 4 from eax. Once you think about how easy this is, read on to see how multiplication and division work.</text:p>
      <text:h text:style-name="Heading_20_2" text:outline-level="2"><text:bookmark-start text:name="mul"/>mul<text:bookmark-end text:name="mul"/></text:h>
      <text:p text:style-name="First_20_paragraph">The mul instruction is slightly different than The previous instructions. It takes only one operand which must be either a register or memory location. It multiplies eax by the value of this operand. If the value is too large to fit within the eax register, it puts the higher bits into edx.</text:p>
      <text:h text:style-name="Heading_20_2" text:outline-level="2"><text:bookmark-start text:name="div"/>div<text:bookmark-end text:name="div"/></text:h>
      <text:p text:style-name="First_20_paragraph">The div instruction divides eax by the operand you give it (the divisor). However, division is a tricky operation because not every number divides evenly into another. It is also more complicated by the fact that the edx register is assumed to be the upper half of the bits in the dividend while eax is the lower bits of the dividend.</text:p>
      <text:p text:style-name="Text_20_body">I know it sounds complicated but it is easier than I can explain. I can illustrate this with a small program that multiplies and divides!</text:p>
      <text:p text:style-name="P583">format ELF executable</text:p>
      <text:p text:style-name="P584"/>
      <text:p text:style-name="P585">main:</text:p>
      <text:p text:style-name="P586"/>
      <text:p text:style-name="P587">mov dword [radix],10</text:p>
      <text:p text:style-name="P588">mov dword [int_width],1</text:p>
      <text:p text:style-name="P589"/>
      <text:p text:style-name="P590">mov eax,12</text:p>
      <text:p text:style-name="P591">call putint</text:p>
      <text:p text:style-name="P592">call putline</text:p>
      <text:p text:style-name="P593">mov ebx,5</text:p>
      <text:p text:style-name="P594">mul ebx</text:p>
      <text:p text:style-name="P595">call putint</text:p>
      <text:p text:style-name="P596">call putline</text:p>
      <text:p text:style-name="P597">mov ebx,8</text:p>
      <text:p text:style-name="P598">mov edx,0</text:p>
      <text:p text:style-name="P599">div ebx</text:p>
      <text:p text:style-name="P600">call putint</text:p>
      <text:p text:style-name="P601">call putline</text:p>
      <text:p text:style-name="P602">mov eax,edx</text:p>
      <text:p text:style-name="P603">call putint</text:p>
      <text:p text:style-name="P604">call putline</text:p>
      <text:p text:style-name="P605"/>
      <text:p text:style-name="P606">mov eax,1</text:p>
      <text:p text:style-name="P607">mov ebx,0</text:p>
      <text:p text:style-name="P608">int 80h</text:p>
      <text:p text:style-name="P609"/>
      <text:p text:style-name="P610">include 'chastelib32.asm'</text:p>
      <text:p text:style-name="First_20_paragraph">The output of that program is this:</text:p>
      <text:p text:style-name="P611">12</text:p>
      <text:p text:style-name="P612">60</text:p>
      <text:p text:style-name="P613">7</text:p>
      <text:p text:style-name="P614">4</text:p>
      <text:p text:style-name="First_20_paragraph">This is because 12 was multiplied by 5 to get 60. Then we attempted to divide 60 by 8. It goes in only 7 times (which equals 56). This means the remainder is 4, which is stored in the edx register after the division.</text:p>
      <text:p text:style-name="Text_20_body">You may also notice in the source above that I set edx to zero before the div instruction. If this is not done, the edx might have mistakenly had another number and been interpreted as part of the dividend.</text:p>
      <text:p text:style-name="Text_20_body">I also think some terminology about division is helpful here.</text:p>
      <text:list text:style-name="L7">
        <text:list-item>
          <text:p text:style-name="P615">Dividend: The number we are dividing from.</text:p>
        </text:list-item>
        <text:list-item>
          <text:p text:style-name="P615">Divisor: The number we are dividing the dividend by. How many times does this number subtract from the dividend?</text:p>
        </text:list-item>
        <text:list-item>
          <text:p text:style-name="P615">Quotient: The result of the division.</text:p>
        </text:list-item>
        <text:list-item>
          <text:p text:style-name="P615">Remainder: What is left over if the divisor could not divide perfectly into the dividend.</text:p>
        </text:list-item>
      </text:list>
      <text:p text:style-name="First_20_paragraph">As much as I love math, I find some of these terms confusing when I try to explain them in English. Let’s face it, I am better at Assembly Language and the C Programming Language than I am with English, but it looks like you’re stuck with me because normal people are not autistic enough to care!</text:p>
      <text:p text:style-name="Text_20_body">Division is repeated subtraction, just as multiplication is repeated addition. Most of the time, modern CPU hardware can multiply and divide faster by the mul and div instructions than if you have manually made loops of repeating addition or subtraction, but the result would have been the same.</text:p>
      <text:p text:style-name="Text_20_body">6502 CPUs (used for the Nintendo Entertainment System) did not have multiplication and division instructions, and so programmers really did use loops of adding and subtracting to get the results needed. On Intel CPUs, mul and div are available, and I suggest using them, but please don’t forget what these operations really are.</text:p>
      <text:p text:style-name="Text_20_body">For a more in depth explanation of the mul and div instructions, I will include those written by Tomasz Grysztar (creator of the FASM assembler) in the official “flat assembler 1.73 Programmer’s Manual”</text:p>
      <text:p text:style-name="Horizontal_20_Line"/>
      <text:p text:style-name="First_20_paragraph"><text:span text:style-name="T3">mul performs an unsigned multiplication of the operand and the accumulator. If the operand is a byte, the processor multiplies it by the contents of AL and returns the 16-bit result to AH and AL. If the operand is a word, the processor multiplies it by the contents of AX and returns the 32-bit result to DX and AX.</text:span></text:p>
      <text:p text:style-name="Text_20_body"><text:span text:style-name="T3">div performs an unsigned division of the accumulator by the operand. The dividend (the accumulator) is twice the size of the divisor (the operand), the quotient and remainder have the same size as the divisor. If divisor is byte, the dividend is taken from AX register, the quotient is stored in AL and the remainder is stored in AH. If divisor is word, the upper half of dividend is taken from DX, the lower half of dividend is taken from AX, the quotient is stored in AX and the remainder is stored in DX.</text:span></text:p>
      <text:p text:style-name="Horizontal_20_Line"/>
      <text:p text:style-name="First_20_paragraph">Perhaps you can see that Assembly language is nothing more than a fancy calculator, except better. This is because there is no question which order the operations take place in. There is no need for mnemonics like “<text:span text:style-name="T3">Please excuse my dear Aunt Sally</text:span>” to remind us “<text:span text:style-name="T3">Parentheses, Exponents, Multiplication and Division (from left to right), and Addition and Subtraction</text:span>”.</text:p>
      <text:p text:style-name="Text_20_body">There are still two more instructions before we can construct loops in Assembly programs.</text:p>
      <text:h text:style-name="Heading_20_2" text:outline-level="2"><text:bookmark-start text:name="cmp"/>cmp<text:bookmark-end text:name="cmp"/></text:h>
      <text:p text:style-name="First_20_paragraph">The cmp instruction compares two operands but does not do any math with them. They remain unchanged but modify flags in the processor that allow us to jump based on certain conditions.</text:p>
      <text:h text:style-name="Heading_20_2" text:outline-level="2"><text:bookmark-start text:name="jmp"/>jmp<text:bookmark-end text:name="jmp"/></text:h>
      <text:p text:style-name="First_20_paragraph">The jmp instruction jumps to another location regardless of any conditions. It has a family of other jump instructions that jump only if certain conditions are true. In fact many of them have multiple names for the same operation. For example je and jz both jump if the two numbers compared would be zero if they were subtracted. This would only be true if they are the same.</text:p>
      <text:p text:style-name="Text_20_body">Here is a small chart or table for the conditional jumps I use in my programs.</text:p>
      <text:h text:style-name="Heading_20_2" text:outline-level="2"><text:bookmark-start text:name="conditional-jumps-table"/>Conditional Jumps Table<text:bookmark-end text:name="conditional-jumps-table"/></text:h>
      <table:table table:name="Table2" table:style-name="Table2">
        <table:table-column table:style-name="Table2.A"/>
        <table:table-column table:style-name="Table2.B"/>
        <table:table-header-rows>
          <table:table-row>
            <table:table-cell table:style-name="TableHeaderRowCell" office:value-type="string">
              <text:p text:style-name="Table_20_Heading">Instruction</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je/jz</text:p>
          </table:table-cell>
          <table:table-cell table:style-name="TableRowCell" office:value-type="string">
            <text:p text:style-name="Table_20_Contents">jump if equal</text:p>
          </table:table-cell>
        </table:table-row>
        <table:table-row>
          <table:table-cell table:style-name="TableRowCell" office:value-type="string">
            <text:p text:style-name="Table_20_Contents">ja</text:p>
          </table:table-cell>
          <table:table-cell table:style-name="TableRowCell" office:value-type="string">
            <text:p text:style-name="Table_20_Contents">jump if above</text:p>
          </table:table-cell>
        </table:table-row>
        <table:table-row>
          <table:table-cell table:style-name="TableRowCell" office:value-type="string">
            <text:p text:style-name="Table_20_Contents">jb</text:p>
          </table:table-cell>
          <table:table-cell table:style-name="TableRowCell" office:value-type="string">
            <text:p text:style-name="Table_20_Contents">jump if below</text:p>
          </table:table-cell>
        </table:table-row>
        <table:table-row>
          <table:table-cell table:style-name="TableRowCell" office:value-type="string">
            <text:p text:style-name="Table_20_Contents">jne/jnz</text:p>
          </table:table-cell>
          <table:table-cell table:style-name="TableRowCell" office:value-type="string">
            <text:p text:style-name="Table_20_Contents">jump if not equal</text:p>
          </table:table-cell>
        </table:table-row>
        <table:table-row>
          <table:table-cell table:style-name="TableRowCell" office:value-type="string">
            <text:p text:style-name="Table_20_Contents">jna</text:p>
          </table:table-cell>
          <table:table-cell table:style-name="TableRowCell" office:value-type="string">
            <text:p text:style-name="Table_20_Contents">jump if not above</text:p>
          </table:table-cell>
        </table:table-row>
        <table:table-row>
          <table:table-cell table:style-name="TableRowCell" office:value-type="string">
            <text:p text:style-name="Table_20_Contents">jnb</text:p>
          </table:table-cell>
          <table:table-cell table:style-name="TableRowCell" office:value-type="string">
            <text:p text:style-name="Table_20_Contents">jump if not below</text:p>
          </table:table-cell>
        </table:table-row>
      </table:table>
      <text:p text:style-name="First_20_paragraph">Aside from those main 6 conditional jumps that I have memorized, there also exists jumps for signed/negative numbers which I have not not talked about yet in this book yet. A small table is below.</text:p>
      <text:h text:style-name="Heading_20_2" text:outline-level="2"><text:bookmark-start text:name="signed-number-jumps-table"/>Signed Number Jumps Table<text:bookmark-end text:name="signed-number-jumps-table"/></text:h>
      <table:table table:name="Table3" table:style-name="Table3">
        <table:table-column table:style-name="Table3.A"/>
        <table:table-column table:style-name="Table3.B"/>
        <table:table-header-rows>
          <table:table-row>
            <table:table-cell table:style-name="TableHeaderRowCell" office:value-type="string">
              <text:p text:style-name="Table_20_Heading">Instruction</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js</text:p>
          </table:table-cell>
          <table:table-cell table:style-name="TableRowCell" office:value-type="string">
            <text:p text:style-name="Table_20_Contents">jump if signed</text:p>
          </table:table-cell>
        </table:table-row>
        <table:table-row>
          <table:table-cell table:style-name="TableRowCell" office:value-type="string">
            <text:p text:style-name="Table_20_Contents">jns</text:p>
          </table:table-cell>
          <table:table-cell table:style-name="TableRowCell" office:value-type="string">
            <text:p text:style-name="Table_20_Contents">jump if not signed</text:p>
          </table:table-cell>
        </table:table-row>
        <table:table-row>
          <table:table-cell table:style-name="TableRowCell" office:value-type="string">
            <text:p text:style-name="Table_20_Contents">jg</text:p>
          </table:table-cell>
          <table:table-cell table:style-name="TableRowCell" office:value-type="string">
            <text:p text:style-name="Table_20_Contents">jump if greater</text:p>
          </table:table-cell>
        </table:table-row>
        <table:table-row>
          <table:table-cell table:style-name="TableRowCell" office:value-type="string">
            <text:p text:style-name="Table_20_Contents">jl</text:p>
          </table:table-cell>
          <table:table-cell table:style-name="TableRowCell" office:value-type="string">
            <text:p text:style-name="Table_20_Contents">jump if less</text:p>
          </table:table-cell>
        </table:table-row>
        <table:table-row>
          <table:table-cell table:style-name="TableRowCell" office:value-type="string">
            <text:p text:style-name="Table_20_Contents">jng</text:p>
          </table:table-cell>
          <table:table-cell table:style-name="TableRowCell" office:value-type="string">
            <text:p text:style-name="Table_20_Contents">jump if not greater</text:p>
          </table:table-cell>
        </table:table-row>
        <table:table-row>
          <table:table-cell table:style-name="TableRowCell" office:value-type="string">
            <text:p text:style-name="Table_20_Contents">jnl</text:p>
          </table:table-cell>
          <table:table-cell table:style-name="TableRowCell" office:value-type="string">
            <text:p text:style-name="Table_20_Contents">jump if not less</text:p>
          </table:table-cell>
        </table:table-row>
      </table:table>
      <text:p text:style-name="First_20_paragraph">Personally I don’t agree with the way negative numbers are represented in computers but I know that understanding the context of signed vs unsigned is important for more complex programs. Once again, I recommend the FASM programmers manual for details that I have excluded for the purpose of keeping this book short.</text:p>
      <text:p text:style-name="Text_20_body">However, I will be using the js and jns instructions in some programs in this book. It is important to understand that the Linux kernel returns negative numbers in the eax registers when there is an error. The most common case is when you try to open a filename that does not exist or that you don’t have permission to open even if it does exist. As an example, you would compare eax with 0 to update the flags and then jump according to the result.</text:p>
      <text:p text:style-name="P616">cmp eax,0 ;compare eax with zero to update the flags</text:p>
      <text:p text:style-name="P617">js error_yes</text:p>
      <text:p text:style-name="P618">jns error_no</text:p>
      <text:p text:style-name="First_20_paragraph">The Intel processors also have the “neg” instruction for converting between positive and negative. But for the most part, my programs do not use negative numbers and the first table for unsigned integer conditional jumps will be all you need.</text:p>
      <text:p text:style-name="Text_20_body">The following program can print a message telling you whether eax is less than , equal to, or more than ebx. Upon this foundation all the conditional jumps in my programs and functions are based.</text:p>
      <text:p text:style-name="P619">format ELF executable</text:p>
      <text:p text:style-name="P620">main:</text:p>
      <text:p text:style-name="P621"/>
      <text:p text:style-name="P622">mov dword [radix],10</text:p>
      <text:p text:style-name="P623">mov dword [int_width],1</text:p>
      <text:p text:style-name="P624"/>
      <text:p text:style-name="P625">mov eax,5</text:p>
      <text:p text:style-name="P626">mov ebx,8</text:p>
      <text:p text:style-name="P627">cmp eax,ebx</text:p>
      <text:p text:style-name="P628">jb less</text:p>
      <text:p text:style-name="P629">je same</text:p>
      <text:p text:style-name="P630">ja more</text:p>
      <text:p text:style-name="P631"/>
      <text:p text:style-name="P632">less:</text:p>
      <text:p text:style-name="P633">mov eax,string_less</text:p>
      <text:p text:style-name="P634">jmp the_end</text:p>
      <text:p text:style-name="P635">same:</text:p>
      <text:p text:style-name="P636">mov eax,string_same</text:p>
      <text:p text:style-name="P637">jmp the_end</text:p>
      <text:p text:style-name="P638">more:</text:p>
      <text:p text:style-name="P639">mov eax,string_more</text:p>
      <text:p text:style-name="P640">jmp the_end</text:p>
      <text:p text:style-name="P641"/>
      <text:p text:style-name="P642">the_end:</text:p>
      <text:p text:style-name="P643">call putstring</text:p>
      <text:p text:style-name="P644"/>
      <text:p text:style-name="P645">mov eax,1</text:p>
      <text:p text:style-name="P646">mov ebx,0</text:p>
      <text:p text:style-name="P647">int 80h</text:p>
      <text:p text:style-name="P648"/>
      <text:p text:style-name="P649">string_less db 'eax is less than ebx',0Ah,0</text:p>
      <text:p text:style-name="P650">string_same db 'eax is the same as ebx',0Ah,0</text:p>
      <text:p text:style-name="P651">string_more db 'eax is more than ebx',0Ah,0</text:p>
      <text:p text:style-name="P652"/>
      <text:p text:style-name="P653">include 'chastelib32.asm'</text:p>
      <text:p text:style-name="First_20_paragraph">Personally, I think that the Assembly system of conditional jumps makes a lot of sense. Other programming languages such as BASIC and C have “goto” statements that work like this. For example, <text:span text:style-name="Source_Text">if(eax&lt;ebx){goto less;}</text:span>.</text:p>
      <text:p text:style-name="Text_20_body">Modern programming languages tend to discourage the use of goto or not allow it at all. However, these languages still use jumps I have described in this section because it is required by the hardware. Both “if” and “while” statements are written by using the conditional jump statements most relevant to what you are trying to do.</text:p>
      <text:p text:style-name="Text_20_body">The only thing I have found difficult about jumps in assembly is remembering which acronym means which condition. However, since I created the chart in this chapter, now I can refer to it, and you can too! As long as I keep these six main types of conditions in my head and am working with unsigned numbers, I can write almost any assembly program from scratch.</text:p>
      <text:h text:style-name="Heading_20_2" text:outline-level="2"><text:bookmark-start text:name="pushpop"/>push/pop<text:bookmark-end text:name="pushpop"/></text:h>
      <text:p text:style-name="First_20_paragraph">The push and pop instructions are something you have already seen in my code. They operate on what is called the “stack”. Basically, when you push something, it is like pushing a box of cereal onto a shelf at Walmart. The last item pushed is at the front and will be the first item a customer sees. This is what is called a Last In First Out.</text:p>
      <text:p text:style-name="Text_20_body">Not only is the stack useful for saving the value of registers temporarily as I do, but without it, it would not be possible to have callable functions. When you call a function with “call”, it is the same as a “jmp” to that location except that it pushes the address where the program was before the call. The “ret” instruction returns to the location that called the function and then proceeds to instructions after it.</text:p>
      <text:p text:style-name="Text_20_body">The sp register, as I mentioned in chapter 1, is the stack pointer. Every time you push a value, it stores it at the address the stack pointer is pointing to and then subtracts the size of the native dword size. For example, this is always 16 bits in the context of DOS programming for 16 bit .com files. This means that you can use it with the other registers to save their value for later.</text:p>
      <text:p text:style-name="Text_20_body">In the next chapter, I will show a useful example of the push and pop instructions and explain a little bit more about this.</text:p>
      <text:h text:style-name="Heading_20_2" text:outline-level="2"><text:bookmark-start text:name="take-it-slow"/>Take it slow<text:bookmark-end text:name="take-it-slow"/></text:h>
      <text:p text:style-name="First_20_paragraph">I know I hit you with a lot of information in this chapter, but trust me, I am intentionally leaving out a lot because I don’t want this book to be the size of the Intel® 64 and IA-32 Architectures Software Developer Manuals.</text:p>
      <text:p text:style-name="Text_20_body"><text:a xlink:type="simple" xlink:href="https://www.intel.com/content/www/us/en/developer/articles/technical/intel-sdm.html" office:name=""><text:span text:style-name="Definition">https://www.intel.com/content/www/us/en/developer/articles/technical/intel-sdm.html</text:span></text:a></text:p>
      <text:p text:style-name="Text_20_body">There are hundreds of instructions for Intel machines and yet if you combine the instructions I have described in this chapter with the “call”,“int”, and “ret” instructions required for calling functions for input and output, you will see that it is possible to write almost any program I want with these instructions.</text:p>
      <text:p text:style-name="Text_20_body">I am sharing what I have learned from reading the Intel Manuals and the API references available for DOS so that you don’t have to spend as much time figuring these things out as I did. What I can tell you, though, is that the result was worth it because I have been able to write programs to accomplish tasks faster than my C programs could. At the same time, the Assembly versions took longer to write than the C versions did. This is the price I must pay to have high performing code.</text:p>
      <text:p text:style-name="Text_20_body">Also, there are some bitwise instructions by the names of AND,OR,XOR,NOT,SHL,SHR that are sometimes useful for making programs faster and smaller. However, these only make sense in the context of the Binary Numeral System and I suspect that the average reader of this book does not have the 25 years of experience in Binary math that I do.</text:p>
      <text:p text:style-name="Text_20_body">I will be explaining more about these operations in a later chapter because they help a lot when trying to optimize programs for size and speed. However they can make programming LOOK complicated and scare away potentially great new programmers who are just trying to learn to apply the 4 regular arithmetic operations of addition, subtraction, multiplication, and division which apply to all number bases.</text:p>
      <text:h text:style-name="Heading_20_1" text:outline-level="1"><text:bookmark-start text:name="chapter-7-open-and-close-system-calls"/>Chapter 7: Open and Close System Calls<text:bookmark-end text:name="chapter-7-open-and-close-system-calls"/></text:h>
      <text:p text:style-name="First_20_paragraph">In this chapter, I will be showing you two programs. One of them writes a message to a text file. The other will read a text file to find out what is inside it.</text:p>
      <text:h text:style-name="Heading_20_2" text:outline-level="2"><text:bookmark-start text:name="fasm-create-a-new-file"/>FASM Create a New File<text:bookmark-end text:name="fasm-create-a-new-file"/></text:h>
      <text:p text:style-name="P654">format ELF executable</text:p>
      <text:p text:style-name="P655">main:</text:p>
      <text:p text:style-name="P656"/>
      <text:p text:style-name="P657">mov dword [radix],10</text:p>
      <text:p text:style-name="P658">mov dword [int_width],1</text:p>
      <text:p text:style-name="P659"/>
      <text:p text:style-name="P660">;Linux system call to open a file</text:p>
      <text:p text:style-name="P661"/>
      <text:p text:style-name="P662">mov eax,5 <text:s text:c="9"/>;invoke SYS_OPEN (kernel opcode 5)</text:p>
      <text:p text:style-name="P663">mov ebx,filename <text:s text:c="2"/>;path to filename should be in eax before this function was called</text:p>
      <text:p text:style-name="P664">mov ecx,101o <text:s text:c="6"/>;flags (in base 8) for open mode 0101 = 0100 (O_CREAT) + 1 (O_WRONLY)</text:p>
      <text:p text:style-name="P665">mov edx,644o <text:s text:c="6"/>;permissions of the new file</text:p>
      <text:p text:style-name="P666">int 80h <text:s text:c="11"/>;call the kernel</text:p>
      <text:p text:style-name="P667"/>
      <text:p text:style-name="P668">mov [filedesc],eax</text:p>
      <text:p text:style-name="P669">call putint</text:p>
      <text:p text:style-name="P670">mov eax,string1</text:p>
      <text:p text:style-name="P671">call putstring</text:p>
      <text:p text:style-name="P672"/>
      <text:p text:style-name="P673">mov eax,string0 <text:s text:c="3"/>;mov to eax the address of string to write</text:p>
      <text:p text:style-name="P674">mov ecx,eax <text:s text:c="7"/>;pointer/address of string to write</text:p>
      <text:p text:style-name="P675">call strlen <text:s text:c="7"/>;get length of the string in eax</text:p>
      <text:p text:style-name="P676">mov edx,eax <text:s text:c="7"/>;copy length from eax to edx</text:p>
      <text:p text:style-name="P677">mov ebx,[filedesc] ;write to the file descriptor</text:p>
      <text:p text:style-name="P678">mov eax,4 <text:s text:c="9"/>;invoke SYS_WRITE (kernel opcode 4 on 32 bit systems)</text:p>
      <text:p text:style-name="P679">int 80h <text:s text:c="11"/>;system call to write the message</text:p>
      <text:p text:style-name="P680"/>
      <text:p text:style-name="P681">mov ebx,[filedesc] ;file number to close</text:p>
      <text:p text:style-name="P682">mov eax,6 <text:s text:c="9"/>;invoke SYS_CLOSE (kernel opcode 6)</text:p>
      <text:p text:style-name="P683">int 80h <text:s text:c="11"/>;call the kernel</text:p>
      <text:p text:style-name="P684"/>
      <text:p text:style-name="P685">mov eax,1</text:p>
      <text:p text:style-name="P686">mov ebx,0</text:p>
      <text:p text:style-name="P687">int 80h</text:p>
      <text:p text:style-name="P688"/>
      <text:p text:style-name="P689">filename db 'newfile.txt',0</text:p>
      <text:p text:style-name="P690">filedesc dd 0 ; file descriptor</text:p>
      <text:p text:style-name="P691"/>
      <text:p text:style-name="P692">string0 db 'This string writes to the file.',0Ah,0</text:p>
      <text:p text:style-name="P693">string1 db '=file descriptor',0Ah,0</text:p>
      <text:p text:style-name="P694"/>
      <text:p text:style-name="P695">;The strlen function gets the length of string in eax and returns it in eax</text:p>
      <text:p text:style-name="P696">;This is the same algorithm used in my putstring function</text:p>
      <text:p text:style-name="P697"/>
      <text:p text:style-name="P698">strlen:</text:p>
      <text:p text:style-name="P699"/>
      <text:p text:style-name="P700">push ebx</text:p>
      <text:p text:style-name="P701">mov ebx,eax ; copy eax to ebx. ebx will be used as index to the string</text:p>
      <text:p text:style-name="P702"/>
      <text:p text:style-name="P703">strlen_start: ; this loop finds the length of the string</text:p>
      <text:p text:style-name="P704"/>
      <text:p text:style-name="P705">cmp [ebx],byte 0 ; compare byte at address ebx with 0</text:p>
      <text:p text:style-name="P706">jz strlen_end ; if comparison was zero, jump to loop end</text:p>
      <text:p text:style-name="P707">inc ebx</text:p>
      <text:p text:style-name="P708">jmp strlen_start</text:p>
      <text:p text:style-name="P709"/>
      <text:p text:style-name="P710">strlen_end:</text:p>
      <text:p text:style-name="P711">sub ebx,eax ;subtract start pointer from current pointer to get length of string</text:p>
      <text:p text:style-name="P712">mov eax,ebx ;copy the string length back to eax</text:p>
      <text:p text:style-name="P713">pop ebx</text:p>
      <text:p text:style-name="P714"/>
      <text:p text:style-name="P715">ret</text:p>
      <text:p text:style-name="P716"/>
      <text:p text:style-name="P717">include 'chastelib32.asm'</text:p>
      <text:h text:style-name="Heading_20_2" text:outline-level="2"><text:bookmark-start text:name="syscall-reference"/>Syscall Reference<text:bookmark-end text:name="syscall-reference"/></text:h>
      <text:p text:style-name="First_20_paragraph">This link will help you understand the numbers you need to include for the open and close system calls.</text:p>
      <text:p text:style-name="Text_20_body"><text:a xlink:type="simple" xlink:href="https://www.chromium.org/chromium-os/developer-library/reference/linux-constants/syscalls/#x86-32-bit" office:name=""><text:span text:style-name="Definition">https://www.chromium.org/chromium-os/developer-library/reference/linux-constants/syscalls/#x86-32-bit</text:span></text:a></text:p>
      <text:p text:style-name="Text_20_body">Additionally, on most Linux systems you can see the manual pages for open and close with these commands.</text:p>
      <text:p text:style-name="P718">man 2 open</text:p>
      <text:p text:style-name="P719">man 2 close</text:p>
      <text:p text:style-name="First_20_paragraph">The manual pages, while helpful for C programmers are not very helpful for Assembly programmers. To find out which numbers are associated with which constants, you need to file the file which contains them.</text:p>
      <text:p text:style-name="Text_20_body">Use this command find the filename containing file control constants.</text:p>
      <text:p text:style-name="P720">find /usr/include -name "fcntl-linux.h"</text:p>
      <text:p text:style-name="First_20_paragraph">The file might be in slightly different locations on different systems, but it will contain the following values plus more that are not applicable to this chapter.</text:p>
      <table:table table:name="Table4" table:style-name="Table4">
        <table:table-column table:style-name="Table4.A"/>
        <table:table-column table:style-name="Table4.B"/>
        <table:table-header-rows>
          <table:table-row>
            <table:table-cell table:style-name="TableHeaderRowCell" office:value-type="string">
              <text:p text:style-name="Table_20_Heading">Constant</text:p>
            </table:table-cell>
            <table:table-cell table:style-name="TableHeaderRowCell" office:value-type="string">
              <text:p text:style-name="Table_20_Heading">Octal Value</text:p>
            </table:table-cell>
          </table:table-row>
        </table:table-header-rows>
        <table:table-row>
          <table:table-cell table:style-name="TableRowCell" office:value-type="string">
            <text:p text:style-name="Table_20_Contents">O_RDONLY</text:p>
          </table:table-cell>
          <table:table-cell table:style-name="TableRowCell" office:value-type="string">
            <text:p text:style-name="Table_20_Contents">00</text:p>
          </table:table-cell>
        </table:table-row>
        <table:table-row>
          <table:table-cell table:style-name="TableRowCell" office:value-type="string">
            <text:p text:style-name="Table_20_Contents">O_WRONLY</text:p>
          </table:table-cell>
          <table:table-cell table:style-name="TableRowCell" office:value-type="string">
            <text:p text:style-name="Table_20_Contents">01</text:p>
          </table:table-cell>
        </table:table-row>
        <table:table-row>
          <table:table-cell table:style-name="TableRowCell" office:value-type="string">
            <text:p text:style-name="Table_20_Contents">O_RDWR</text:p>
          </table:table-cell>
          <table:table-cell table:style-name="TableRowCell" office:value-type="string">
            <text:p text:style-name="Table_20_Contents">02</text:p>
          </table:table-cell>
        </table:table-row>
        <table:table-row>
          <table:table-cell table:style-name="TableRowCell" office:value-type="string">
            <text:p text:style-name="Table_20_Contents">O_CREAT</text:p>
          </table:table-cell>
          <table:table-cell table:style-name="TableRowCell" office:value-type="string">
            <text:p text:style-name="Table_20_Contents">0100</text:p>
          </table:table-cell>
        </table:table-row>
      </table:table>
      <text:p text:style-name="First_20_paragraph">The next example is a bit more complicated than the last. It includes more error checking because when you are trying to open a file, there is a chance that the file doesn’t exist.</text:p>
      <text:p text:style-name="Text_20_body">This next program will attempt to open the “newfile.txt” that we created with the last one. This means that if you renamed or deleted it, then it will print an error message because it couldn’t open a file that doesn’t exist.</text:p>
      <text:h text:style-name="Heading_20_2" text:outline-level="2"><text:bookmark-start text:name="fasm-open-existing-file"/>FASM Open Existing File<text:bookmark-end text:name="fasm-open-existing-file"/></text:h>
      <text:p text:style-name="P721">format ELF executable</text:p>
      <text:p text:style-name="P722">main:</text:p>
      <text:p text:style-name="P723"/>
      <text:p text:style-name="P724">mov dword [radix],10</text:p>
      <text:p text:style-name="P725">mov dword [int_width],1</text:p>
      <text:p text:style-name="P726"/>
      <text:p text:style-name="P727">;Linux system call to open an existing file</text:p>
      <text:p text:style-name="P728"/>
      <text:p text:style-name="P729">mov eax,5 <text:s text:c="9"/>;invoke SYS_OPEN (kernel opcode 5)</text:p>
      <text:p text:style-name="P730">mov ebx,filename <text:s text:c="2"/>;path to filename should be in eax before this function was called</text:p>
      <text:p text:style-name="P731">mov ecx,0 <text:s text:c="9"/>;flags for open mode 0=O_RDONLY</text:p>
      <text:p text:style-name="P732">mov edx,0 <text:s text:c="9"/>;permissions irrelevant because we are opening a file that exists</text:p>
      <text:p text:style-name="P733">int 80h <text:s text:c="11"/>;call the kernel</text:p>
      <text:p text:style-name="P734"/>
      <text:p text:style-name="P735">push eax <text:s text:c="10"/>;save eax on the stack</text:p>
      <text:p text:style-name="P736">mov [filedesc],eax ;also copy file descriptor to memory</text:p>
      <text:p text:style-name="P737">call putint</text:p>
      <text:p text:style-name="P738">mov eax,string1</text:p>
      <text:p text:style-name="P739">call putstring</text:p>
      <text:p text:style-name="P740">pop eax <text:s text:c="11"/>;restore eax from the stack</text:p>
      <text:p text:style-name="P741"/>
      <text:p text:style-name="P742">cmp eax,0 ;compare eax with zero to update flags</text:p>
      <text:p text:style-name="P743">jns cat <text:s text:c="2"/>;if eax is not negative/signed there was no error</text:p>
      <text:p text:style-name="P744"/>
      <text:p text:style-name="P745">;Otherwise, if it was signed, then this code will display an error message.</text:p>
      <text:p text:style-name="P746"/>
      <text:p text:style-name="P747">mov eax,file_error</text:p>
      <text:p text:style-name="P748">call putstring</text:p>
      <text:p text:style-name="P749"/>
      <text:p text:style-name="P750">jmp the_end ;end the program because we failed at opening the file</text:p>
      <text:p text:style-name="P751"/>
      <text:p text:style-name="P752">cat:</text:p>
      <text:p text:style-name="P753"/>
      <text:p text:style-name="P754">mov edx,1 <text:s text:c="11"/>;number of bytes to read</text:p>
      <text:p text:style-name="P755">mov ecx,tempbyte <text:s text:c="4"/>;address to store the bytes</text:p>
      <text:p text:style-name="P756">mov ebx,[filedesc] <text:s text:c="2"/>;move the opened file descriptor into EBX</text:p>
      <text:p text:style-name="P757">mov eax,3 <text:s text:c="11"/>;invoke SYS_READ (kernel opcode 3 on 32 bit systems)</text:p>
      <text:p text:style-name="P758">int 80h <text:s text:c="13"/>;call the kernel</text:p>
      <text:p text:style-name="P759"/>
      <text:p text:style-name="P760">cmp eax,0</text:p>
      <text:p text:style-name="P761">jnz print_byte ;if more than zero bytes read, proceed to display</text:p>
      <text:p text:style-name="P762">jmp the_end ;otherwise, end the program</text:p>
      <text:p text:style-name="P763"/>
      <text:p text:style-name="P764">;this point is reached if file was read from successfully</text:p>
      <text:p text:style-name="P765"/>
      <text:p text:style-name="P766">print_byte:</text:p>
      <text:p text:style-name="P767"/>
      <text:p text:style-name="P768">mov edx,1 <text:s text:c="11"/>;number of bytes to write</text:p>
      <text:p text:style-name="P769">mov ecx,tempbyte <text:s text:c="4"/>;address of the bytes</text:p>
      <text:p text:style-name="P770">mov ebx,1 <text:s text:c="11"/>;write to standard out instead of the file descriptor we read from</text:p>
      <text:p text:style-name="P771">mov eax,4 <text:s text:c="11"/>;invoke SYS_WRITE (kernel opcode 4 on 32 bit systems)</text:p>
      <text:p text:style-name="P772">int 80h <text:s text:c="13"/>;call the kernel</text:p>
      <text:p text:style-name="P773"/>
      <text:p text:style-name="P774">jmp cat</text:p>
      <text:p text:style-name="P775"/>
      <text:p text:style-name="P776">cat_end:</text:p>
      <text:p text:style-name="P777"/>
      <text:p text:style-name="P778">mov ebx,[filedesc] ;file number to close</text:p>
      <text:p text:style-name="P779">mov eax,6 <text:s text:c="9"/>;invoke SYS_CLOSE (kernel opcode 6)</text:p>
      <text:p text:style-name="P780">int 80h <text:s text:c="11"/>;call the kernel</text:p>
      <text:p text:style-name="P781"/>
      <text:p text:style-name="P782">the_end:</text:p>
      <text:p text:style-name="P783">mov eax,1</text:p>
      <text:p text:style-name="P784">mov ebx,0</text:p>
      <text:p text:style-name="P785">int 80h</text:p>
      <text:p text:style-name="P786"/>
      <text:p text:style-name="P787">tempbyte db 0</text:p>
      <text:p text:style-name="P788">filename db 'newfile.txt',0</text:p>
      <text:p text:style-name="P789">filedesc dd 0 ; file descriptor</text:p>
      <text:p text:style-name="P790">file_error db 'error while opening file',0Ah,0</text:p>
      <text:p text:style-name="P791"/>
      <text:p text:style-name="P792">string1 db '=file descriptor',0Ah,0</text:p>
      <text:p text:style-name="P793"/>
      <text:p text:style-name="P794">include 'chastelib32.asm'</text:p>
      <text:p text:style-name="First_20_paragraph">Another thing you may have noticed if you assembled and ran these two programs in this chapter is that they both print the number of the file descriptor. If you see it print a huge number over 4 billion, then it is probably a negative number that indicates an error has occurred. In the program for opening an existing file, I used the “jns” instruction which means “Jump if Not Signed”.</text:p>
      <text:p text:style-name="Text_20_body">I haven’t described negative numbers in this book yet because it can confuse newcomers. However, these negative numbers are used by the Linux operating system to describe errors that can happen in some system calls.</text:p>
      <text:p text:style-name="Text_20_body">Specifically in the case of the “open” call, a file might not exist or we might not have permission to open it because it belongs to a different user. Either way, we can’t open it.</text:p>
      <text:p text:style-name="Text_20_body">This chapter may have only introduced two new programs, but it also introduced 3 system calls. I already described the write call when I used it in creating the putstring function from chapter 4. This gives us the four fundamental file functions of the Linux Kernel</text:p>
      <table:table table:name="Table5" table:style-name="Table5">
        <table:table-column table:style-name="Table5.A"/>
        <table:table-column table:style-name="Table5.B"/>
        <table:table-header-rows>
          <table:table-row>
            <table:table-cell table:style-name="TableHeaderRowCell" office:value-type="string">
              <text:p text:style-name="Table_20_Heading">Call Name</text:p>
            </table:table-cell>
            <table:table-cell table:style-name="TableHeaderRowCell" office:value-type="string">
              <text:p text:style-name="Table_20_Heading">Call Number</text:p>
            </table:table-cell>
          </table:table-row>
        </table:table-header-rows>
        <table:table-row>
          <table:table-cell table:style-name="TableRowCell" office:value-type="string">
            <text:p text:style-name="Table_20_Contents">read</text:p>
          </table:table-cell>
          <table:table-cell table:style-name="TableRowCell" office:value-type="string">
            <text:p text:style-name="Table_20_Contents">3</text:p>
          </table:table-cell>
        </table:table-row>
        <table:table-row>
          <table:table-cell table:style-name="TableRowCell" office:value-type="string">
            <text:p text:style-name="Table_20_Contents">write</text:p>
          </table:table-cell>
          <table:table-cell table:style-name="TableRowCell" office:value-type="string">
            <text:p text:style-name="Table_20_Contents">4</text:p>
          </table:table-cell>
        </table:table-row>
        <table:table-row>
          <table:table-cell table:style-name="TableRowCell" office:value-type="string">
            <text:p text:style-name="Table_20_Contents">open</text:p>
          </table:table-cell>
          <table:table-cell table:style-name="TableRowCell" office:value-type="string">
            <text:p text:style-name="Table_20_Contents">5</text:p>
          </table:table-cell>
        </table:table-row>
        <table:table-row>
          <table:table-cell table:style-name="TableRowCell" office:value-type="string">
            <text:p text:style-name="Table_20_Contents">close</text:p>
          </table:table-cell>
          <table:table-cell table:style-name="TableRowCell" office:value-type="string">
            <text:p text:style-name="Table_20_Contents">6</text:p>
          </table:table-cell>
        </table:table-row>
      </table:table>
      <text:p text:style-name="First_20_paragraph">When I introduced the write call in chapter 4, I was writing to standard output (file descriptor 1). However, from the perspective of the Linux kernel, stdout is just a special case of a file. Standard input is file descriptor 0 and it can be used to get information from the user with the keyboard.</text:p>
      <text:p text:style-name="Text_20_body">However, when getting user input, error checking must be carefully done, even more so than when reading from another file. This is because humans are unpredictable and you have to plan for every possible input they may produce.</text:p>
      <text:p text:style-name="Text_20_body">Getting user input will be explained in the next chapter. For now, just look over the examples in this chapter and think about the fact that all programs are just made of system calls for reading and writing files. You can open files, write to them, read from them, and close them.</text:p>
      <text:h text:style-name="Heading_20_1" text:outline-level="1"><text:bookmark-start text:name="chapter-8-user-input"/>Chapter 8: User Input<text:bookmark-end text:name="chapter-8-user-input"/></text:h>
      <text:p text:style-name="First_20_paragraph">The first seven chapters have been about teaching the basics of Assembly and getting output of strings and numbers to the screen. All those steps were required for learning Assembly. However, at some point, when you have a program that is meant to do something, you need to have a way for other people, especially those who are not programmers, to be able to give input to direct what the program does.</text:p>
      <text:p text:style-name="Text_20_body">There are two main ways of doing this in a console program. The first way is have the program ask for the user to type something from the keyboard and then wait until they write something and press enter. The next program will achieve this. Copy this and try it out and then I will explain after the code how it works.</text:p>
      <text:h text:style-name="Heading_20_2" text:outline-level="2"><text:bookmark-start text:name="fasm-keyboard-input"/>FASM Keyboard Input<text:bookmark-end text:name="fasm-keyboard-input"/></text:h>
      <text:p text:style-name="P795">format ELF executable</text:p>
      <text:p text:style-name="P796"/>
      <text:p text:style-name="P797">main:</text:p>
      <text:p text:style-name="P798"/>
      <text:p text:style-name="P799">mov dword [radix],10</text:p>
      <text:p text:style-name="P800">mov dword [int_width],1</text:p>
      <text:p text:style-name="P801"/>
      <text:p text:style-name="P802">loop_input:</text:p>
      <text:p text:style-name="P803"/>
      <text:p text:style-name="P804">mov eax,string0</text:p>
      <text:p text:style-name="P805">call putstring</text:p>
      <text:p text:style-name="P806"/>
      <text:p text:style-name="P807">call getstring</text:p>
      <text:p text:style-name="P808"/>
      <text:p text:style-name="P809">mov esi,eax <text:s text:c="4"/>;mov the string address in eax to esi</text:p>
      <text:p text:style-name="P810">mov edi,string3 ;mov the "exit" string address to edi</text:p>
      <text:p text:style-name="P811">call strcmp <text:s text:c="4"/>;call the function to compare the strings and return eax</text:p>
      <text:p text:style-name="P812">cmp eax,0 <text:s text:c="6"/>;if eax is 0, the strings are the same</text:p>
      <text:p text:style-name="P813">jz the_end <text:s text:c="5"/>;go to the_end if the user typed "exit"</text:p>
      <text:p text:style-name="P814"/>
      <text:p text:style-name="P815">mov eax,string1</text:p>
      <text:p text:style-name="P816">call putstring</text:p>
      <text:p text:style-name="P817"/>
      <text:p text:style-name="P818">mov eax,buf</text:p>
      <text:p text:style-name="P819">call putstring</text:p>
      <text:p text:style-name="P820">call putline</text:p>
      <text:p text:style-name="P821"/>
      <text:p text:style-name="P822">mov eax,string2</text:p>
      <text:p text:style-name="P823">call putstring</text:p>
      <text:p text:style-name="P824"/>
      <text:p text:style-name="P825">mov eax,[count]</text:p>
      <text:p text:style-name="P826">call putint</text:p>
      <text:p text:style-name="P827">call putline</text:p>
      <text:p text:style-name="P828"/>
      <text:p text:style-name="P829">jmp loop_input</text:p>
      <text:p text:style-name="P830"/>
      <text:p text:style-name="P831">the_end:</text:p>
      <text:p text:style-name="P832">mov eax,1</text:p>
      <text:p text:style-name="P833">mov ebx,0</text:p>
      <text:p text:style-name="P834">int 80h</text:p>
      <text:p text:style-name="P835"/>
      <text:p text:style-name="P836">string0 db 'Enter a string from the keyboard: ',0</text:p>
      <text:p text:style-name="P837">string1 db 'string: ',0</text:p>
      <text:p text:style-name="P838">string2 db 'length: ',0</text:p>
      <text:p text:style-name="P839">string3 db 'exit',0</text:p>
      <text:p text:style-name="P840"/>
      <text:p text:style-name="P841">buf db 0x100 dup '?'</text:p>
      <text:p text:style-name="P842">count dd 0</text:p>
      <text:p text:style-name="P843"/>
      <text:p text:style-name="P844">getstring:</text:p>
      <text:p text:style-name="P845"/>
      <text:p text:style-name="P846">mov [count],0 ;set count of characters read during this function to zero</text:p>
      <text:p text:style-name="P847">mov edx,1 <text:s text:c="4"/>;number of bytes to read</text:p>
      <text:p text:style-name="P848">mov ecx,buf <text:s text:c="2"/>;address to store the bytes</text:p>
      <text:p text:style-name="P849"/>
      <text:p text:style-name="P850">getstring_chars:</text:p>
      <text:p text:style-name="P851"/>
      <text:p text:style-name="P852">mov ebx,0 <text:s text:c="4"/>;read from stdin</text:p>
      <text:p text:style-name="P853">mov eax,3 <text:s text:c="4"/>;invoke SYS_READ (kernel opcode 3)</text:p>
      <text:p text:style-name="P854">int 80h <text:s text:c="6"/>;call the kernel</text:p>
      <text:p text:style-name="P855"/>
      <text:p text:style-name="P856">cmp eax,1 <text:s text:c="4"/>;was 1 character read?</text:p>
      <text:p text:style-name="P857">jnz getstring_end ; if not, then end this loop</text:p>
      <text:p text:style-name="P858"/>
      <text:p text:style-name="P859">mov al,[ecx] <text:s text:c="1"/>;mov last character read into al register</text:p>
      <text:p text:style-name="P860"/>
      <text:p text:style-name="P861">;check if this character is in the proper range to be part of the string</text:p>
      <text:p text:style-name="P862"/>
      <text:p text:style-name="P863">cmp al,0x20 <text:s text:c="5"/>;compare with 0x20 (space)</text:p>
      <text:p text:style-name="P864">jb getstring_end ;jump if below to getstring_end label</text:p>
      <text:p text:style-name="P865">cmp al,0x7E <text:s text:c="5"/>;compare with 0x7E (tilde)</text:p>
      <text:p text:style-name="P866">ja getstring_end ;jump if above to getstring_end label</text:p>
      <text:p text:style-name="P867"/>
      <text:p text:style-name="P868">;if neither jump happened, keep the character and</text:p>
      <text:p text:style-name="P869"/>
      <text:p text:style-name="P870">inc [count] <text:s text:c="2"/>;increment how many characters we have read</text:p>
      <text:p text:style-name="P871">inc ecx <text:s text:c="6"/>;increment address where next byte is read from</text:p>
      <text:p text:style-name="P872">jmp getstring_chars ;jump back to start of loop and keep reading</text:p>
      <text:p text:style-name="P873"/>
      <text:p text:style-name="P874">getstring_end:</text:p>
      <text:p text:style-name="P875"/>
      <text:p text:style-name="P876">mov byte[ecx],0 ;terminate this string with a zero</text:p>
      <text:p text:style-name="P877"/>
      <text:p text:style-name="P878">mov eax,buf ;mov the buffer address to eax for returning the string</text:p>
      <text:p text:style-name="P879"/>
      <text:p text:style-name="P880">ret</text:p>
      <text:p text:style-name="P881"/>
      <text:p text:style-name="P882">;strcmp compares the string at esi to the one at edi</text:p>
      <text:p text:style-name="P883">;eax returns 0 if the strings are the same and 1 if different</text:p>
      <text:p text:style-name="P884">;the algorithm is simple but I will explain it for those who are confused</text:p>
      <text:p text:style-name="P885"/>
      <text:p text:style-name="P886">;eax is initialized to zero</text:p>
      <text:p text:style-name="P887">;a byte from each string is loaded into the al and bl registers</text:p>
      <text:p text:style-name="P888">;the bytes are compared. if they are different, then we jump to the end</text:p>
      <text:p text:style-name="P889">;However, if they are the same, then we check if one of them is zero</text:p>
      <text:p text:style-name="P890">;for this purpose it doesn't matter whether we compare al or bl with zero</text:p>
      <text:p text:style-name="P891">;because it is known that they are the same if the jnz did not take place</text:p>
      <text:p text:style-name="P892">;if it is zero, this also jumps to the end of the function</text:p>
      <text:p text:style-name="P893">;If neither jump took place, then we jump to the start of the loop</text:p>
      <text:p text:style-name="P894">;but when the function finally ends bl will be subtracted from al</text:p>
      <text:p text:style-name="P895">;this ensures that the function returns zero if the final characters are the same</text:p>
      <text:p text:style-name="P896">;ebx,esi,and edi are preserved but eax is the return value</text:p>
      <text:p text:style-name="P897">;also, the sub instruction at the end of the function also updates the flags</text:p>
      <text:p text:style-name="P898">;so you can "jz" or "jnz" to a label after calling this function based on results</text:p>
      <text:p text:style-name="P899"/>
      <text:p text:style-name="P900">strcmp:</text:p>
      <text:p text:style-name="P901"/>
      <text:p text:style-name="P902">push ebx</text:p>
      <text:p text:style-name="P903">push esi</text:p>
      <text:p text:style-name="P904">push edi</text:p>
      <text:p text:style-name="P905"/>
      <text:p text:style-name="P906">mov eax,0</text:p>
      <text:p text:style-name="P907"/>
      <text:p text:style-name="P908">strcmp_start:</text:p>
      <text:p text:style-name="P909"/>
      <text:p text:style-name="P910">;read a byte from each string</text:p>
      <text:p text:style-name="P911">mov al,[edi]</text:p>
      <text:p text:style-name="P912">mov bl,[esi]</text:p>
      <text:p text:style-name="P913">cmp al,bl</text:p>
      <text:p text:style-name="P914">jnz strcmp_end</text:p>
      <text:p text:style-name="P915"/>
      <text:p text:style-name="P916">cmp al,0</text:p>
      <text:p text:style-name="P917">jz strcmp_end</text:p>
      <text:p text:style-name="P918"/>
      <text:p text:style-name="P919">inc edi</text:p>
      <text:p text:style-name="P920">inc esi</text:p>
      <text:p text:style-name="P921"/>
      <text:p text:style-name="P922">jmp strcmp_start</text:p>
      <text:p text:style-name="P923"/>
      <text:p text:style-name="P924">strcmp_end:</text:p>
      <text:p text:style-name="P925">sub al,bl</text:p>
      <text:p text:style-name="P926"/>
      <text:p text:style-name="P927">pop edi</text:p>
      <text:p text:style-name="P928">pop esi</text:p>
      <text:p text:style-name="P929">pop ebx</text:p>
      <text:p text:style-name="P930"/>
      <text:p text:style-name="P931">ret</text:p>
      <text:p text:style-name="P932"/>
      <text:p text:style-name="P933">include 'chastelib32.asm'</text:p>
      <text:p text:style-name="First_20_paragraph">The getstring function uses a read system call to read from file descriptor 0 which represents standard input or the keyboard. It reads one character each time with a loop and starts at an address labeled “buf” which was declared as a global variable of 256 bytes which were initialized with question marks. I also defined a variable named count which was used to automatically count how many bytes were read.</text:p>
      <text:p text:style-name="P934">buf db 0x100 dup '?'</text:p>
      <text:p text:style-name="P935">count dd 0</text:p>
      <text:p text:style-name="First_20_paragraph">But I feel that the part of this function that needs the most explaining is this section:</text:p>
      <text:p text:style-name="P936">cmp al,0x20 <text:s text:c="5"/>;compare with 0x20 (space)</text:p>
      <text:p text:style-name="P937">jb getstring_end ;jump if below to getstring_end label</text:p>
      <text:p text:style-name="P938">cmp al,0x7E <text:s text:c="5"/>;compare with 0x7E (tilde)</text:p>
      <text:p text:style-name="P939">ja getstring_end ;jump if above to getstring_end label</text:p>
      <text:p text:style-name="First_20_paragraph">Because this range of characters from space to tilde is what I have identified as the acceptable range of characters. There is no standard way that makes sense for all strings. For example, someone may want to make a getstring function that only accepts capital letters or that only accepts numbers 0 to 9. I can’t say that there is one way that is the best.</text:p>
      <text:p text:style-name="Text_20_body">The program listed above will keep running the loop until the user types “exit” as the string. Each time after it gets the string, it compares the what the user entered to the “exit” string. If the strcmp function returns 0, it means the two strings are the same.</text:p>
      <text:p text:style-name="Text_20_body">This particular variant of strcmp is based off of the C function of the same name. You may also remember that I wrote a strlen function for the first example in chapter 7 when I had a string that I wanted to write to a new file.</text:p>
      <text:p text:style-name="Text_20_body">I believe that using conventional names of C functions is a good idea because C programmers who read my books will already be familiar with that function and what it does in the C programming language.</text:p>
      <text:p text:style-name="Text_20_body">In any case, “exit” was the perfect name for a command to “exit” the program. It is also how you log out of a Linux terminal and is the official name for the system call that exits every program in this book!</text:p>
      <text:p text:style-name="Text_20_body">Although using the keyboard for input during a running program is a great interactive way of doing things, there is one way that I enjoy even more. The next program is one that I wrote long before I started writing this book and has been referred to as “chastearg” on my blog and the Flat Assembler Forum. It prints the command line arguments when you add them after the name of the program.</text:p>
      <text:h text:style-name="Heading_20_2" text:outline-level="2"><text:bookmark-start text:name="fasm-command-line-arguments"/>FASM Command Line Arguments<text:bookmark-end text:name="fasm-command-line-arguments"/></text:h>
      <text:p text:style-name="P940">format ELF executable</text:p>
      <text:p text:style-name="P941">entry main</text:p>
      <text:p text:style-name="P942"/>
      <text:p text:style-name="P943">include 'chastelib32.asm'</text:p>
      <text:p text:style-name="P944"/>
      <text:p text:style-name="P945">main:</text:p>
      <text:p text:style-name="P946"/>
      <text:p text:style-name="P947">pop eax <text:s text:c="13"/>;pop the number of arguments from the stack</text:p>
      <text:p text:style-name="P948">mov [argc],eax <text:s text:c="6"/>;save the argument count for later</text:p>
      <text:p text:style-name="P949"/>
      <text:p text:style-name="P950">pop eax <text:s text:c="13"/>;pop argument 0 (name of the program)</text:p>
      <text:p text:style-name="P951">dec [argc] <text:s text:c="10"/>;subtract 1 from argument count</text:p>
      <text:p text:style-name="P952"/>
      <text:p text:style-name="P953">putarg:</text:p>
      <text:p text:style-name="P954"/>
      <text:p text:style-name="P955">cmp [argc],0 <text:s text:c="8"/>;check for remaining arguments</text:p>
      <text:p text:style-name="P956">jz putarg_end <text:s text:c="7"/>;if none, end the loop and stop printing</text:p>
      <text:p text:style-name="P957">pop eax <text:s text:c="13"/>;pop the next argument off the stack</text:p>
      <text:p text:style-name="P958">call putstring <text:s text:c="6"/>;print the string and a new line</text:p>
      <text:p text:style-name="P959">call putline</text:p>
      <text:p text:style-name="P960">dec [argc] <text:s text:c="10"/>;subtract 1 from argument count</text:p>
      <text:p text:style-name="P961">jmp putarg <text:s text:c="10"/>;jump to the beginning of the loop</text:p>
      <text:p text:style-name="P962"/>
      <text:p text:style-name="P963">putarg_end:</text:p>
      <text:p text:style-name="P964"/>
      <text:p text:style-name="P965">mov eax, 1 <text:s text:c="10"/>; invoke SYS_EXIT (kernel opcode 1)</text:p>
      <text:p text:style-name="P966">mov ebx, 0 <text:s text:c="10"/>; return 0 status on exit - 'No Errors'</text:p>
      <text:p text:style-name="P967">int 0x80</text:p>
      <text:p text:style-name="P968"/>
      <text:p text:style-name="P969">argc dd 0</text:p>
      <text:h text:style-name="Heading_20_2" text:outline-level="2"><text:bookmark-start text:name="what-is-a-command-line-argument"/>What is a Command Line Argument?<text:bookmark-end text:name="what-is-a-command-line-argument"/></text:h>
      <text:p text:style-name="First_20_paragraph">People who come from a Windows environment may not even know what a command line argument is because they are used to pointing and clicking with a mouse. You can’t enter an argument this way. For clarification on this topic, here is some terminal text to clarify what arguments are.</text:p>
      <text:p text:style-name="P970">fasm main.asm</text:p>
      <text:p text:style-name="P971">flat assembler <text:s text:c="1"/>version 1.73.30 <text:s text:c="1"/>(16384 kilobytes memory)</text:p>
      <text:p text:style-name="P972">2 passes, 481 bytes.</text:p>
      <text:p text:style-name="P973">chmod +x main</text:p>
      <text:p text:style-name="P974">./main this program has command line arguments</text:p>
      <text:p text:style-name="P975">this</text:p>
      <text:p text:style-name="P976">program</text:p>
      <text:p text:style-name="P977">has</text:p>
      <text:p text:style-name="P978">command</text:p>
      <text:p text:style-name="P979">line</text:p>
      <text:p text:style-name="P980">arguments</text:p>
      <text:p text:style-name="First_20_paragraph">When we run fasm and give it the name of the Assembly file we want to assemble, the file is an argument or an option we provide to it. In the above example, main.asm is the file I provide to fasm as an argument.</text:p>
      <text:p text:style-name="Text_20_body">After the file is assembled, I run the chmod command with the arguments “+x” and “main” which adds the execution permission to the main executable that was just created.</text:p>
      <text:p text:style-name="Text_20_body">Finally, running “./main” followed by more words on the same line causes Linux to interpret them as arguments. They are pushed onto the stack.</text:p>
      <text:p text:style-name="Text_20_body">When a program begins on Linux, you can access the number of how many arguments were passed to the program by getting the first number you pop off the stack. In the chastearg program, there is a loop that keeps track of how many arguments are left. While there are some remaining, it keeps popping them into the eax register and calling putstring until there are none left.</text:p>
      <text:h text:style-name="Heading_20_2" text:outline-level="2"><text:bookmark-start text:name="arguments-vs-keyboard-input"/>Arguments vs Keyboard Input<text:bookmark-end text:name="arguments-vs-keyboard-input"/></text:h>
      <text:p text:style-name="First_20_paragraph">The primary difference between input from the keyboard during a program and passing arguments is that the arguments do not stop the execution of a program and wait for anything. If you have an install script which is meant to compile and install a large program, it is better not to pause it for any reason unless an error happens. Arguments are best in this case so that someone can pass information to it that they want the program to know.</text:p>
      <text:p text:style-name="Text_20_body">Keyboard input does have a benefit though. For example, suppose that you ask the user to input a number and then they accidentally input a string that is not recognizable as a number. With keyboard input, you can tell them they made a mistake and ask them to try again. With arguments, you cannot edit them during the program because they are only pushed at the start when the program is run from the terminal.</text:p>
      <text:p text:style-name="Text_20_body">Only you can decide which of these methods your program needs, but I hope that my explanation and my strcmp function is helpful for you when you try to write a program that needs input to do different things conditionally.</text:p>
      <text:p text:style-name="Text_20_body">Later in this book, I will present a calculator written in Assembly language that builds from this chapter’s keyboard input loop. However, we are not ready for that until I teach you how to separate regular strings from numbers. That will be the subject of the next chapter and I can promise you it is simultaneously the hardest task but also the most useful feature you will need for writing any program that has to read numbers.</text:p>
      <text:h text:style-name="Heading_20_1" text:outline-level="1"><text:bookmark-start text:name="chapter-9-numbers-and-strings"/>Chapter 9: Numbers and Strings<text:bookmark-end text:name="chapter-9-numbers-and-strings"/></text:h>
      <text:p text:style-name="First_20_paragraph">One of the things about Assembly language, and programming in general, is that everything is really a number at the lowest level. Strings are not some magical thing that is different from a number. The very first program in this book declared a “Hello World!” string which was printed with the Linux Write system call.</text:p>
      <text:p text:style-name="Text_20_body">Here is the program again so that I can explain more of what is happening behind the scenes when assembling source files with FASM.</text:p>
      <text:p text:style-name="P981">format ELF executable</text:p>
      <text:p text:style-name="P982"/>
      <text:p text:style-name="P983">mov eax,4 <text:s text:c="2"/>; invoke SYS_WRITE (kernel opcode 4 on 32 bit systems)</text:p>
      <text:p text:style-name="P984">mov ebx,1 <text:s text:c="2"/>; write to the STDOUT file</text:p>
      <text:p text:style-name="P985">mov ecx,msg ; pointer/address of string to write</text:p>
      <text:p text:style-name="P986">mov edx,13 <text:s text:c="1"/>; number of bytes to write</text:p>
      <text:p text:style-name="P987">int 80h</text:p>
      <text:p text:style-name="P988"/>
      <text:p text:style-name="P989">mov eax,1 <text:s text:c="2"/>; function SYS_EXIT (kernel opcode 1 on 32 bit systems)</text:p>
      <text:p text:style-name="P990">mov ebx,0 <text:s text:c="2"/>; return 0 status on exit - 'No Errors'</text:p>
      <text:p text:style-name="P991">int 80h</text:p>
      <text:p text:style-name="P992"/>
      <text:p text:style-name="P993">msg db 'Hello World!',0Ah,0</text:p>
      <text:p text:style-name="First_20_paragraph">Specifically, the line here is what we need to understand:</text:p>
      <text:p text:style-name="P994">msg db 'Hello World!',0Ah,0</text:p>
      <text:p text:style-name="First_20_paragraph">Here we see that “msg” is the label used for this data location. A colon (:) is optional and not required for data declaration labels.</text:p>
      <text:p text:style-name="Text_20_body">The “db” keyword says that we are going to define 1 or more bytes to be sent to the assembled output file.</text:p>
      <text:p text:style-name="Text_20_body">The message was written in quotes as a convenience that FASM allows. However, these characters translate directly to 8-bit bytes. You can replace the line with the following equivalent and the program will print the same message because the data is the same thing.</text:p>
      <text:p text:style-name="P995">msg db 0x48,0x65,0x6C,0x6C,0x6F,0x20,0x57,0x6F,0x72,0x6C,0x64,0x21,0x0A,0x00</text:p>
      <text:p text:style-name="First_20_paragraph">What you see above are Hexadecimal constants that begin with “0x” to tell the assembler that we are about to defined numbers as hexadecimal (base sixteen) rather than decimal (base ten). You can also define constants in hex the same way in the C programming language.</text:p>
      <text:p text:style-name="Text_20_body">The data declaration statements for integers in FASM are the following.</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Constant</text:p>
            </table:table-cell>
            <table:table-cell table:style-name="TableHeaderRowCell" office:value-type="string">
              <text:p text:style-name="Table_20_Heading">Size</text:p>
            </table:table-cell>
            <table:table-cell table:style-name="TableHeaderRowCell" office:value-type="string">
              <text:p text:style-name="Table_20_Heading">datatype name</text:p>
            </table:table-cell>
          </table:table-row>
        </table:table-header-rows>
        <table:table-row>
          <table:table-cell table:style-name="TableRowCell" office:value-type="string">
            <text:p text:style-name="Table_20_Contents">db</text:p>
          </table:table-cell>
          <table:table-cell table:style-name="TableRowCell" office:value-type="string">
            <text:p text:style-name="Table_20_Contents">1</text:p>
          </table:table-cell>
          <table:table-cell table:style-name="TableRowCell" office:value-type="string">
            <text:p text:style-name="Table_20_Contents">byte</text:p>
          </table:table-cell>
        </table:table-row>
        <table:table-row>
          <table:table-cell table:style-name="TableRowCell" office:value-type="string">
            <text:p text:style-name="Table_20_Contents">dw</text:p>
          </table:table-cell>
          <table:table-cell table:style-name="TableRowCell" office:value-type="string">
            <text:p text:style-name="Table_20_Contents">2</text:p>
          </table:table-cell>
          <table:table-cell table:style-name="TableRowCell" office:value-type="string">
            <text:p text:style-name="Table_20_Contents">word</text:p>
          </table:table-cell>
        </table:table-row>
        <table:table-row>
          <table:table-cell table:style-name="TableRowCell" office:value-type="string">
            <text:p text:style-name="Table_20_Contents">dd</text:p>
          </table:table-cell>
          <table:table-cell table:style-name="TableRowCell" office:value-type="string">
            <text:p text:style-name="Table_20_Contents">4</text:p>
          </table:table-cell>
          <table:table-cell table:style-name="TableRowCell" office:value-type="string">
            <text:p text:style-name="Table_20_Contents">dword</text:p>
          </table:table-cell>
        </table:table-row>
        <table:table-row>
          <table:table-cell table:style-name="TableRowCell" office:value-type="string">
            <text:p text:style-name="Table_20_Contents">dq</text:p>
          </table:table-cell>
          <table:table-cell table:style-name="TableRowCell" office:value-type="string">
            <text:p text:style-name="Table_20_Contents">8</text:p>
          </table:table-cell>
          <table:table-cell table:style-name="TableRowCell" office:value-type="string">
            <text:p text:style-name="Table_20_Contents">qword</text:p>
          </table:table-cell>
        </table:table-row>
      </table:table>
      <text:p text:style-name="First_20_paragraph">Carefully defining the correct size of data is important for Assembly. Otherwise you will not be able to load the data into a register. For example:</text:p>
      <text:p text:style-name="Text_20_body">You can load the <text:span text:style-name="T1">al</text:span> and <text:span text:style-name="T1">ah</text:span> registers with something declared with a <text:span text:style-name="T1">db</text:span> statement.</text:p>
      <text:p text:style-name="Text_20_body">You can load the <text:span text:style-name="T1">ax</text:span> register with something declared with a <text:span text:style-name="T1">dw</text:span> statement.</text:p>
      <text:p text:style-name="Text_20_body">You can load the <text:span text:style-name="T1">eax</text:span> register with something declared with a <text:span text:style-name="T1">dd</text:span> statement.</text:p>
      <text:p text:style-name="Text_20_body">You can load the <text:span text:style-name="T1">rax</text:span> register with something declared with a <text:span text:style-name="T1">dq</text:span> statement. However, this would work only if using 64-bit programming mode (this will be a subject of a future book).</text:p>
      <text:h text:style-name="Heading_20_2" text:outline-level="2"><text:bookmark-start text:name="why-is-this-important"/>Why is this important?<text:bookmark-end text:name="why-is-this-important"/></text:h>
      <text:p text:style-name="First_20_paragraph">You might see the importance of this, but if you are still clueless as to why we need to know the size or type of integers, you have to consider that the wrong type of data will not work at all for the system calls. At best, the program will do something unexpected, and at worst, it will refuse to assemble at all.</text:p>
      <text:p text:style-name="Text_20_body">But the main reason I brought this up is because when we get input from a user, as I showed in the last chapter, we need to know that a string is a bunch of numbers.</text:p>
      <text:p text:style-name="Text_20_body">The programmer can define data for the program in the source code, but the user expects to type in the numbers from the keyboard. If you go back to the <text:a xlink:type="simple" xlink:href="#digit-character-table" office:name=""><text:span text:style-name="Definition">Digit Character Table</text:span></text:a> in chapter 5, you can see which character from the keyboard translate to actual byte values. This information will provide needed context both for the intstr function that was described in chapter 5, but also for the reverse function I am going to give you next!</text:p>
      <text:p text:style-name="Text_20_body">I present to you the “strint” function which will be required for the next program!</text:p>
      <text:h text:style-name="Heading_20_2" text:outline-level="2"><text:bookmark-start text:name="strint-function"/>strint function<text:bookmark-end text:name="strint-function"/></text:h>
      <text:p text:style-name="P996">;this function converts a string pointed to by eax into an integer returned in eax instead</text:p>
      <text:p text:style-name="P997">;it is a little complicated because it has to account for whether the character in</text:p>
      <text:p text:style-name="P998">;a string is a decimal digit 0 to 9, or an alphabet character for bases higher than ten</text:p>
      <text:p text:style-name="P999">;it also checks for both uppercase and lowercase letters for bases 11 to 36</text:p>
      <text:p text:style-name="P1000">;finally, it checks if that letter makes sense for the base.</text:p>
      <text:p text:style-name="P1001">;For example, G to Z cannot be used in hexadecimal, only A to F can</text:p>
      <text:p text:style-name="P1002">;The purpose of writing this function was to be able to accept user input as integers</text:p>
      <text:p text:style-name="P1003">;This function is improved with error checking and uses the new strint_error variable</text:p>
      <text:p text:style-name="P1004">;The program can check this value after the call and see how many errors happened.</text:p>
      <text:p text:style-name="P1005"/>
      <text:p text:style-name="P1006">strint_error db 0 ;declare a byte variable that keeps track of errors</text:p>
      <text:p text:style-name="P1007"/>
      <text:p text:style-name="P1008">strint:</text:p>
      <text:p text:style-name="P1009"/>
      <text:p text:style-name="P1010">mov ebx,eax ;copy string address from eax to ebx because eax will be replaced soon!</text:p>
      <text:p text:style-name="P1011">mov eax,0</text:p>
      <text:p text:style-name="P1012">mov [strint_error],0 ;set errors to 0 at the start of this function</text:p>
      <text:p text:style-name="P1013"/>
      <text:p text:style-name="P1014">read_strint:</text:p>
      <text:p text:style-name="P1015">mov ecx,0 ; zero ecx so only lower 8 bits are used</text:p>
      <text:p text:style-name="P1016">mov cl,[ebx]</text:p>
      <text:p text:style-name="P1017">inc ebx</text:p>
      <text:p text:style-name="P1018">cmp cl,0 ; compare byte at address edx with 0</text:p>
      <text:p text:style-name="P1019">jz strint_end ; if comparison was zero, this is the end of string</text:p>
      <text:p text:style-name="P1020"/>
      <text:p text:style-name="P1021">;if char is below '0' or above '9', it is outside the range of these and is not a digit</text:p>
      <text:p text:style-name="P1022">cmp cl,'0'</text:p>
      <text:p text:style-name="P1023">jb not_digit</text:p>
      <text:p text:style-name="P1024">cmp cl,'9'</text:p>
      <text:p text:style-name="P1025">ja not_digit</text:p>
      <text:p text:style-name="P1026"/>
      <text:p text:style-name="P1027">;but if it is a digit, then correct and process the character</text:p>
      <text:p text:style-name="P1028">is_digit:</text:p>
      <text:p text:style-name="P1029">sub cl,'0'</text:p>
      <text:p text:style-name="P1030">jmp process_char</text:p>
      <text:p text:style-name="P1031"/>
      <text:p text:style-name="P1032">not_digit:</text:p>
      <text:p text:style-name="P1033">;it isn't a digit, but it could an alphabet character which is a digit in a higher base</text:p>
      <text:p text:style-name="P1034"/>
      <text:p text:style-name="P1035">;if char is below 'A' or above 'Z', it is outside the range of these and is not capital letter</text:p>
      <text:p text:style-name="P1036">cmp cl,'A'</text:p>
      <text:p text:style-name="P1037">jb not_upper</text:p>
      <text:p text:style-name="P1038">cmp cl,'Z'</text:p>
      <text:p text:style-name="P1039">ja not_upper</text:p>
      <text:p text:style-name="P1040"/>
      <text:p text:style-name="P1041">is_upper:</text:p>
      <text:p text:style-name="P1042">sub cl,'A'</text:p>
      <text:p text:style-name="P1043">add cl,10</text:p>
      <text:p text:style-name="P1044">jmp process_char</text:p>
      <text:p text:style-name="P1045"/>
      <text:p text:style-name="P1046">not_upper:</text:p>
      <text:p text:style-name="P1047"/>
      <text:p text:style-name="P1048">;if char is below 'a' or above 'z', it is outside the range of these and is not lowercase letter</text:p>
      <text:p text:style-name="P1049">cmp cl,'a'</text:p>
      <text:p text:style-name="P1050">jb not_lower</text:p>
      <text:p text:style-name="P1051">cmp cl,'z'</text:p>
      <text:p text:style-name="P1052">ja not_lower</text:p>
      <text:p text:style-name="P1053"/>
      <text:p text:style-name="P1054">is_lower:</text:p>
      <text:p text:style-name="P1055">sub cl,'a'</text:p>
      <text:p text:style-name="P1056">add cl,10</text:p>
      <text:p text:style-name="P1057">jmp process_char</text:p>
      <text:p text:style-name="P1058"/>
      <text:p text:style-name="P1059">not_lower:</text:p>
      <text:p text:style-name="P1060"/>
      <text:p text:style-name="P1061">;if we have reached this point, result invalid and end function with error</text:p>
      <text:p text:style-name="P1062">jmp strint_end_error</text:p>
      <text:p text:style-name="P1063"/>
      <text:p text:style-name="P1064">process_char:</text:p>
      <text:p text:style-name="P1065"/>
      <text:p text:style-name="P1066">cmp ecx,[radix] ;compare char with radix</text:p>
      <text:p text:style-name="P1067">jnb strint_end_error ;if this value is above or equal to radix, it is too high despite being a valid digit/alpha</text:p>
      <text:p text:style-name="P1068"/>
      <text:p text:style-name="P1069">mov edx,0 ;zero edx because it is used in mul sometimes</text:p>
      <text:p text:style-name="P1070">mul dword [radix] ;mul eax with radix</text:p>
      <text:p text:style-name="P1071">add eax,ecx</text:p>
      <text:p text:style-name="P1072"/>
      <text:p text:style-name="P1073">jmp read_strint ;jump back and continue the loop if nothing has exited it</text:p>
      <text:p text:style-name="P1074"/>
      <text:p text:style-name="P1075">strint_end_error: ;we jump here if there was an error with one of the chars</text:p>
      <text:p text:style-name="P1076">inc [strint_error] ;increment error counter because char invalid</text:p>
      <text:p text:style-name="P1077"/>
      <text:p text:style-name="P1078">strint_end: ;we jump here when no errors happened</text:p>
      <text:p text:style-name="P1079"/>
      <text:p text:style-name="P1080">ret</text:p>
      <text:p text:style-name="First_20_paragraph">The reason that strint is such a big function is because it has to account for every possible character that could be typed by a user as either standard input or as part of the command line arguments.</text:p>
      <text:p text:style-name="Text_20_body">It moves the eax to ebx to be used as an index register. We will keep reading from the address that ebx points to and incrementing it.</text:p>
      <text:p text:style-name="Text_20_body">After eax is moved to ebx, it is set to zero so that it can be the receiving number that we return from the function.</text:p>
      <text:p text:style-name="Text_20_body">It then begins the loop which checks for 3 kinds of data.</text:p>
      <text:list text:style-name="L8">
        <text:list-item>
          <text:p text:style-name="P1081">characters in the range ‘0’ to ‘9’ for decimal digits</text:p>
        </text:list-item>
        <text:list-item>
          <text:p text:style-name="P1081">characters in the range ‘A’ to ‘Z’ for uppercase letter digits of higher bases</text:p>
        </text:list-item>
        <text:list-item>
          <text:p text:style-name="P1081">characters in the range ‘a’ to ‘z’ for lowercase letter digits of higher bases</text:p>
        </text:list-item>
      </text:list>
      <text:p text:style-name="First_20_paragraph">Anything that does not meet these strict ranges of characters will result in the function ending. There are two times when this will happen.</text:p>
      <text:p text:style-name="Text_20_body">The first time is this code near the start of the “read_strint” loop</text:p>
      <text:p text:style-name="P1082">cmp cl,0 ; compare byte at address edx with 0</text:p>
      <text:p text:style-name="P1083">jz strint_end ; if comparison was zero, this is the end of string</text:p>
      <text:p text:style-name="First_20_paragraph">The second time is when ecx was converted to a number based on the value of the digits or letters but that number is invalid for the radix. For example, A to F is valid for hexadecimal but not decimal. Letters G to Z are valid for base 36 but not for hexadecimal.</text:p>
      <text:p text:style-name="P1084">cmp ecx,[radix] ;compare char with radix</text:p>
      <text:p text:style-name="P1085">jnb strint_end ;if this value is above or equal to radix, it is too high despite being a valid digit/alpha</text:p>
      <text:p text:style-name="First_20_paragraph">During each run of the “read_strint” loop, the ecx register is set to 0 and then the lowest part of it, cl, is used to get the character at [ebx] and then perform the math to transform the valid characters into the actual value we need. This value is then added to eax after we multiply eax by the radix.</text:p>
      <text:p text:style-name="P1086">mov edx,0 ;zero edx because it is used in mul sometimes</text:p>
      <text:p text:style-name="P1087">mul dword [radix] ;mul eax with radix</text:p>
      <text:p text:style-name="P1088">add eax,ecx</text:p>
      <text:p text:style-name="First_20_paragraph">This function uses a lot of conditional jumps and is bigger than the other 3 core functions of chastelib. However, it was written specifically for turning command line arguments into numbers so that I could create mathematical programs based on them.</text:p>
      <text:p text:style-name="Text_20_body">To conclude this chapter, I will show you a small program that interprets the command line arguments as numbers and adds them all together!</text:p>
      <text:h text:style-name="Heading_20_2" text:outline-level="2"><text:bookmark-start text:name="fasm-add-arguments"/>FASM Add Arguments<text:bookmark-end text:name="fasm-add-arguments"/></text:h>
      <text:p text:style-name="P1089">format ELF executable</text:p>
      <text:p text:style-name="P1090">entry main</text:p>
      <text:p text:style-name="P1091"/>
      <text:p text:style-name="P1092">include 'chastelib32.asm'</text:p>
      <text:p text:style-name="P1093"/>
      <text:p text:style-name="P1094">main:</text:p>
      <text:p text:style-name="P1095"/>
      <text:p text:style-name="P1096">mov dword[radix],10 <text:s text:c="3"/>;I can choose the radix for integer output!</text:p>
      <text:p text:style-name="P1097">mov dword[int_width],1 ;and the width of each integer for padded zeros</text:p>
      <text:p text:style-name="P1098"/>
      <text:p text:style-name="P1099">pop eax <text:s text:c="15"/>;pop the number of arguments from the stack</text:p>
      <text:p text:style-name="P1100">mov [argc],eax <text:s text:c="8"/>;save the argument count for later</text:p>
      <text:p text:style-name="P1101"/>
      <text:p text:style-name="P1102">pop eax <text:s text:c="15"/>;pop argument 0 (name of the program)</text:p>
      <text:p text:style-name="P1103">dec [argc] <text:s text:c="12"/>;subtract 1 from argument count</text:p>
      <text:p text:style-name="P1104"/>
      <text:p text:style-name="P1105">mov ebp,0 <text:s text:c="13"/>;use the ebp register as our sum</text:p>
      <text:p text:style-name="P1106"/>
      <text:p text:style-name="P1107">addarg:</text:p>
      <text:p text:style-name="P1108"/>
      <text:p text:style-name="P1109">cmp [argc],0 <text:s text:c="10"/>;check for remaining arguments</text:p>
      <text:p text:style-name="P1110">jz addarg_end <text:s text:c="9"/>;if none, end the loop and stop printing</text:p>
      <text:p text:style-name="P1111">pop eax <text:s text:c="15"/>;pop the next argument off the stack</text:p>
      <text:p text:style-name="P1112">call strint</text:p>
      <text:p text:style-name="P1113">add ebp,eax <text:s text:c="11"/>;add the converted number to our sum in ebp</text:p>
      <text:p text:style-name="P1114">dec [argc] <text:s text:c="12"/>;subtract 1 from argument count</text:p>
      <text:p text:style-name="P1115">jmp addarg <text:s text:c="12"/>;jump to the beginning of the loop</text:p>
      <text:p text:style-name="P1116"/>
      <text:p text:style-name="P1117">addarg_end:</text:p>
      <text:p text:style-name="P1118"/>
      <text:p text:style-name="P1119">mov eax,ebp</text:p>
      <text:p text:style-name="P1120">call putint_and_line <text:s text:c="2"/>;print the string and a new line</text:p>
      <text:p text:style-name="P1121"/>
      <text:p text:style-name="P1122">mov eax, 1 <text:s text:c="12"/>; invoke SYS_EXIT (kernel opcode 1)</text:p>
      <text:p text:style-name="P1123">mov ebx, 0 <text:s text:c="12"/>; return 0 status on exit - 'No Errors'</text:p>
      <text:p text:style-name="P1124">int 0x80</text:p>
      <text:p text:style-name="P1125"/>
      <text:p text:style-name="P1126">argc dd 0</text:p>
      <text:p text:style-name="First_20_paragraph">In case you can’t tell, this program is the same as the <text:a xlink:type="simple" xlink:href="#fasm-command-line-arguments" office:name=""><text:span text:style-name="Definition">FASM Command Line Arguments</text:span></text:a> program with a few additions (see what I did there?) for extracting a number from each argument and adding it to he ebp register to be used as the final sum.</text:p>
      <text:p text:style-name="Text_20_body">Here is what it looks like when I run the program from my terminal.</text:p>
      <text:p text:style-name="P1127">~/git/Chastity-Code-Cookbook/work$ ./main 1</text:p>
      <text:p text:style-name="P1128">1</text:p>
      <text:p text:style-name="P1129">~/git/Chastity-Code-Cookbook/work$ ./main 1 2</text:p>
      <text:p text:style-name="P1130">3</text:p>
      <text:p text:style-name="P1131">~/git/Chastity-Code-Cookbook/work$ ./main 1 2 3</text:p>
      <text:p text:style-name="P1132">6</text:p>
      <text:p text:style-name="P1133">~/git/Chastity-Code-Cookbook/work$ ./main 1 2 3 4</text:p>
      <text:p text:style-name="P1134">10</text:p>
      <text:p text:style-name="P1135">~/git/Chastity-Code-Cookbook/work$ ./main 1 2 3 4 5</text:p>
      <text:p text:style-name="P1136">15</text:p>
      <text:p text:style-name="P1137">~/git/Chastity-Code-Cookbook/work$ ./main 1 2 3 4 5 6</text:p>
      <text:p text:style-name="P1138">21</text:p>
      <text:p text:style-name="P1139">~/git/Chastity-Code-Cookbook/work$ ./main 1 2 3 4 5 6 7</text:p>
      <text:p text:style-name="P1140">28</text:p>
      <text:p text:style-name="P1141">~/git/Chastity-Code-Cookbook/work$ ./main 1 2 3 4 5 6 7 8</text:p>
      <text:p text:style-name="P1142">36</text:p>
      <text:p text:style-name="P1143">chastity@chastity-um250:~/git/Chastity-Code-Cookbook/work$ </text:p>
      <text:p text:style-name="First_20_paragraph">Now I can use this program as a super fast method to add numbers from my terminal. But why stop there? Why not build an assembly program that can do all the 4 arithmetic operations?</text:p>
      <text:p text:style-name="Text_20_body">With a little more work, it is possible! In the next chapter, I will prove it to you!</text:p>
      <text:h text:style-name="Heading_20_1" text:outline-level="1"><text:bookmark-start text:name="chapter-10-stack-based-calculator"/>Chapter 10: Stack Based Calculator<text:bookmark-end text:name="chapter-10-stack-based-calculator"/></text:h>
      <text:p text:style-name="First_20_paragraph">The program I will present in this chapter is a Stack Based Calculator. This calculator uses a format that is sometimes called Postfix Notation or Reverse Polish Notation.</text:p>
      <text:p text:style-name="Text_20_body">For a basic breakdown, if you had the chastack program assembled and in your path, you could use this simple expression of adding two numbers 6 and 7:</text:p>
      <text:p text:style-name="P1144">chastack 6 7 add</text:p>
      <text:p text:style-name="First_20_paragraph">You would get 13 as a result. You can also do</text:p>
      <text:p text:style-name="P1145">chastack 6 7 mul</text:p>
      <text:p text:style-name="First_20_paragraph">And you will get 42.</text:p>
      <text:p text:style-name="Text_20_body">You may not appreciate this notation because you are probably used to infix notation that you were taught in school. However, a statement such as “3+4*5” confuses humans because they have to remember that the multiplication is supposed to happen before the addition. It is natural to assume that the operations happen from left to right because it is our reading order in English speaking countries. But 3+4*5 is not 35 as my mind would assume(3+4 equals 7 and then times 5 equals 35). The convention that society follows says that the answer is 23 due to the 4*5 making 20 and then adding the 3.</text:p>
      <text:p text:style-name="Text_20_body">Postfix notation solves this problem and allows you to choose which order the operations take place. For example, with some commands for chastack, you can do either this:</text:p>
      <text:p text:style-name="P1146">chastack 3 4 add 5 mul</text:p>
      <text:p text:style-name="First_20_paragraph">This command pushes 3 and 4 to the stack, adds them to get 7, then pushes 5 to the stack and multiplies it by the 7 already on the stack. The result will be 35 because we chose this order of operations.</text:p>
      <text:p text:style-name="Text_20_body">or you can do:</text:p>
      <text:p text:style-name="P1147">chastack 3 4 5 mul add</text:p>
      <text:p text:style-name="First_20_paragraph">In the above example, the numbers are the same but the mul command multiplies the 4 and 5 together to get 20, then it adds the 20 to the 3. The result is 23.</text:p>
      <text:p text:style-name="Text_20_body">Using the stack this way allows us to specify which numbers are on the top of the stack at any point and which operation is used on them.</text:p>
      <text:p text:style-name="Text_20_body">For more information on RPN notation, read the Wikipedia article.</text:p>
      <text:p text:style-name="Text_20_body"><text:a xlink:type="simple" xlink:href="https://en.wikipedia.org/wiki/Reverse_Polish_notation" office:name=""><text:span text:style-name="Definition">https://en.wikipedia.org/wiki/Reverse_Polish_notation</text:span></text:a></text:p>
      <text:p text:style-name="Text_20_body">Anyway, the source code is below, and I hope that it helps you understand why this notation is so easy to use.</text:p>
      <text:h text:style-name="Heading_20_2" text:outline-level="2"><text:bookmark-start text:name="fasm-chastack"/>FASM chastack<text:bookmark-end text:name="fasm-chastack"/></text:h>
      <text:p text:style-name="P1148">format ELF executable</text:p>
      <text:p text:style-name="P1149">entry main</text:p>
      <text:p text:style-name="P1150"/>
      <text:p text:style-name="P1151">include 'chastelib32.asm'</text:p>
      <text:p text:style-name="P1152"/>
      <text:p text:style-name="P1153">main:</text:p>
      <text:p text:style-name="P1154"/>
      <text:p text:style-name="P1155">mov dword[radix],10 <text:s text:c="3"/>;I can choose the radix for integer output!</text:p>
      <text:p text:style-name="P1156">mov dword[int_width],1 ;and the width of each integer for padded zeros</text:p>
      <text:p text:style-name="P1157"/>
      <text:p text:style-name="P1158">mov ebp,chastack <text:s text:c="6"/>;mov the address of the beginning of the stack to ebp registers</text:p>
      <text:p text:style-name="P1159"/>
      <text:p text:style-name="P1160">pop eax <text:s text:c="15"/>;pop the number of arguments from the stack</text:p>
      <text:p text:style-name="P1161">dec eax <text:s text:c="15"/>;subtract 1 because the program name will be unused</text:p>
      <text:p text:style-name="P1162">mov [argc],eax <text:s text:c="8"/>;save the argument count for later</text:p>
      <text:p text:style-name="P1163">pop ebx <text:s text:c="15"/>;pop argument 0 (name of the program, we don't use it)</text:p>
      <text:p text:style-name="P1164">cmp eax,0</text:p>
      <text:p text:style-name="P1165">jnz usearg <text:s text:c="12"/>;if arguments are available, use the main loop</text:p>
      <text:p text:style-name="P1166"/>
      <text:p text:style-name="P1167">mov eax,string_help</text:p>
      <text:p text:style-name="P1168">call putstring</text:p>
      <text:p text:style-name="P1169"/>
      <text:p text:style-name="P1170">usearg:</text:p>
      <text:p text:style-name="P1171"/>
      <text:p text:style-name="P1172">cmp [argc],0 <text:s text:c="9"/>;check for remaining arguments</text:p>
      <text:p text:style-name="P1173">jz usearg_end <text:s text:c="8"/>;if none, end the loop and stop printing</text:p>
      <text:p text:style-name="P1174">pop esi <text:s text:c="14"/>;pop the next argument off the stack to esi for string comparison</text:p>
      <text:p text:style-name="P1175">dec [argc] <text:s text:c="11"/>;subtract 1 from argument count</text:p>
      <text:p text:style-name="P1176"/>
      <text:p text:style-name="P1177">;Now we process the string we got from the stack</text:p>
      <text:p text:style-name="P1178">;First, we will try testing for commands</text:p>
      <text:p text:style-name="P1179">;If any of the predefined strings match the string in esi</text:p>
      <text:p text:style-name="P1180">;We jump to the label for that command</text:p>
      <text:p text:style-name="P1181"/>
      <text:p text:style-name="P1182">mov edi,string_add</text:p>
      <text:p text:style-name="P1183">call strcmp</text:p>
      <text:p text:style-name="P1184">jz command_add</text:p>
      <text:p text:style-name="P1185"/>
      <text:p text:style-name="P1186">mov edi,string_sub</text:p>
      <text:p text:style-name="P1187">call strcmp</text:p>
      <text:p text:style-name="P1188">jz command_sub</text:p>
      <text:p text:style-name="P1189"/>
      <text:p text:style-name="P1190">mov edi,string_mul</text:p>
      <text:p text:style-name="P1191">call strcmp</text:p>
      <text:p text:style-name="P1192">jz command_mul</text:p>
      <text:p text:style-name="P1193"/>
      <text:p text:style-name="P1194">mov edi,string_div</text:p>
      <text:p text:style-name="P1195">call strcmp</text:p>
      <text:p text:style-name="P1196">jz command_div</text:p>
      <text:p text:style-name="P1197"/>
      <text:p text:style-name="P1198">mov edi,string_rem</text:p>
      <text:p text:style-name="P1199">call strcmp</text:p>
      <text:p text:style-name="P1200">jz command_rem</text:p>
      <text:p text:style-name="P1201"/>
      <text:p text:style-name="P1202">;The default command is to turn the argument into a number and push to stack</text:p>
      <text:p text:style-name="P1203"/>
      <text:p text:style-name="P1204">command_num:</text:p>
      <text:p text:style-name="P1205"/>
      <text:p text:style-name="P1206">mov eax,esi <text:s text:c="9"/>;mov the string to eax for processing numbers</text:p>
      <text:p text:style-name="P1207">call strint <text:s text:c="9"/>;try to get a number from the string pointed to by eax</text:p>
      <text:p text:style-name="P1208">cmp [strint_error],0 ;did we have zero errors in the strint function?</text:p>
      <text:p text:style-name="P1209">jz num_push <text:s text:c="9"/>;if there were no errors, push this to stack</text:p>
      <text:p text:style-name="P1210"/>
      <text:p text:style-name="P1211">mov eax,string_err</text:p>
      <text:p text:style-name="P1212">call putstring</text:p>
      <text:p text:style-name="P1213">mov eax,esi</text:p>
      <text:p text:style-name="P1214">call putstring</text:p>
      <text:p text:style-name="P1215">call putline</text:p>
      <text:p text:style-name="P1216">jmp num_push_end ;skip the push because this can't be used</text:p>
      <text:p text:style-name="P1217"/>
      <text:p text:style-name="P1218">num_push: <text:s text:c="7"/>;push the number to the fake stack</text:p>
      <text:p text:style-name="P1219">add ebp,4</text:p>
      <text:p text:style-name="P1220">mov [ebp],eax</text:p>
      <text:p text:style-name="P1221">num_push_end:</text:p>
      <text:p text:style-name="P1222"/>
      <text:p text:style-name="P1223">jmp usearg</text:p>
      <text:p text:style-name="P1224"/>
      <text:p text:style-name="P1225">;These are the labels and code for each of the commands</text:p>
      <text:p text:style-name="P1226">;When a command is done, we jump back to the beginning of the loop</text:p>
      <text:p text:style-name="P1227"/>
      <text:p text:style-name="P1228">command_add:</text:p>
      <text:p text:style-name="P1229">mov eax,[ebp]</text:p>
      <text:p text:style-name="P1230">sub ebp,4</text:p>
      <text:p text:style-name="P1231">add [ebp],eax</text:p>
      <text:p text:style-name="P1232">jmp usearg</text:p>
      <text:p text:style-name="P1233"/>
      <text:p text:style-name="P1234">command_sub:</text:p>
      <text:p text:style-name="P1235">mov eax,[ebp]</text:p>
      <text:p text:style-name="P1236">sub ebp,4</text:p>
      <text:p text:style-name="P1237">sub [ebp],eax</text:p>
      <text:p text:style-name="P1238">jmp usearg</text:p>
      <text:p text:style-name="P1239"/>
      <text:p text:style-name="P1240">command_mul:</text:p>
      <text:p text:style-name="P1241">mov ebx,[ebp]</text:p>
      <text:p text:style-name="P1242">sub ebp,4</text:p>
      <text:p text:style-name="P1243">mov eax,[ebp]</text:p>
      <text:p text:style-name="P1244">mov edx,0 <text:s text:c="4"/>;zero edx before multiply</text:p>
      <text:p text:style-name="P1245">mul ebx <text:s text:c="6"/>;multiply eax with value in ebx</text:p>
      <text:p text:style-name="P1246">mov [ebp],eax</text:p>
      <text:p text:style-name="P1247">jmp usearg</text:p>
      <text:p text:style-name="P1248"/>
      <text:p text:style-name="P1249">command_div:</text:p>
      <text:p text:style-name="P1250">mov ebx,[ebp]</text:p>
      <text:p text:style-name="P1251">sub ebp,4</text:p>
      <text:p text:style-name="P1252">mov eax,[ebp]</text:p>
      <text:p text:style-name="P1253">mov edx,0 ;zero edx before divide</text:p>
      <text:p text:style-name="P1254">div ebx <text:s text:c="2"/>;divide eax with value in ebx</text:p>
      <text:p text:style-name="P1255">mov [ebp],eax ;store quotient on stack</text:p>
      <text:p text:style-name="P1256">jmp usearg</text:p>
      <text:p text:style-name="P1257"/>
      <text:p text:style-name="P1258">command_rem:</text:p>
      <text:p text:style-name="P1259">mov ebx,[ebp]</text:p>
      <text:p text:style-name="P1260">sub ebp,4</text:p>
      <text:p text:style-name="P1261">mov eax,[ebp]</text:p>
      <text:p text:style-name="P1262">mov edx,0 ;zero edx before divide</text:p>
      <text:p text:style-name="P1263">div ebx <text:s text:c="2"/>;divide eax with value in ebx</text:p>
      <text:p text:style-name="P1264">mov [ebp],edx ;store remainder on stack</text:p>
      <text:p text:style-name="P1265">jmp usearg</text:p>
      <text:p text:style-name="P1266"/>
      <text:p text:style-name="P1267">usearg_end:</text:p>
      <text:p text:style-name="P1268"/>
      <text:p text:style-name="P1269">putstack:</text:p>
      <text:p text:style-name="P1270">cmp ebp,chastack ;is ebp equal to the address of stack start?</text:p>
      <text:p text:style-name="P1271">jz putstack_end <text:s text:c="1"/>;if it is, end the putstack loop</text:p>
      <text:p text:style-name="P1272"/>
      <text:p text:style-name="P1273">mov eax,[ebp]</text:p>
      <text:p text:style-name="P1274">sub ebp,4</text:p>
      <text:p text:style-name="P1275"/>
      <text:p text:style-name="P1276">call putint_and_line</text:p>
      <text:p text:style-name="P1277"/>
      <text:p text:style-name="P1278">jmp putstack</text:p>
      <text:p text:style-name="P1279">putstack_end:</text:p>
      <text:p text:style-name="P1280"/>
      <text:p text:style-name="P1281">mov eax,1 <text:s text:c="7"/>;exit (kernel opcode 1 on 32 bit systems)</text:p>
      <text:p text:style-name="P1282">mov ebx,0 <text:s text:c="7"/>;return 0 status on exit - 'No Errors'</text:p>
      <text:p text:style-name="P1283">int 80h <text:s text:c="9"/>;system call for 32-bit Linux kernel</text:p>
      <text:p text:style-name="P1284"/>
      <text:p text:style-name="P1285">argc dd 0</text:p>
      <text:p text:style-name="P1286"/>
      <text:p text:style-name="P1287">string_err db 'Error: invalid number or command: ',0 ;Generic error message</text:p>
      <text:p text:style-name="P1288">string_add db 'add',0</text:p>
      <text:p text:style-name="P1289">string_sub db 'sub',0</text:p>
      <text:p text:style-name="P1290">string_mul db 'mul',0</text:p>
      <text:p text:style-name="P1291">string_div db 'div',0</text:p>
      <text:p text:style-name="P1292">string_rem db 'rem',0</text:p>
      <text:p text:style-name="P1293"/>
      <text:p text:style-name="P1294">string_help db 'chastack is a stack based command line calculator',0xA</text:p>
      <text:p text:style-name="P1295"><text:s text:c="12"/>db 'Numbers are pushed on the stack and commands can do math.',0xA</text:p>
      <text:p text:style-name="P1296"><text:s text:c="12"/>db 'Commands are add,sub,mul,div,rem',0xA</text:p>
      <text:p text:style-name="P1297"><text:s text:c="12"/>db 'Example: "chastack 3 4 5 add mul"',0xA,0,0</text:p>
      <text:p text:style-name="P1298"/>
      <text:p text:style-name="P1299">;strcmp compares the string at esi to the one at edi</text:p>
      <text:p text:style-name="P1300">;eax returns 0 if the strings are the same and 1 if different</text:p>
      <text:p text:style-name="P1301">;the algorithm is simple but I will explain it for those who are confused</text:p>
      <text:p text:style-name="P1302"/>
      <text:p text:style-name="P1303">;eax is initialized to zero</text:p>
      <text:p text:style-name="P1304">;a byte from each string is loaded into the al and bl registers</text:p>
      <text:p text:style-name="P1305">;the bytes are compared. if they are different, then we jump to the end</text:p>
      <text:p text:style-name="P1306">;However, if they are the same, then we check if one of them is zero</text:p>
      <text:p text:style-name="P1307">;for this purpose it doesn't matter whether we compare al or bl with zero</text:p>
      <text:p text:style-name="P1308">;because it is known that they are the same if the jnz did not take place</text:p>
      <text:p text:style-name="P1309">;if it is zero, this also jumps to the end of the function</text:p>
      <text:p text:style-name="P1310">;If neither jump took place, then we jump to the start of the loop</text:p>
      <text:p text:style-name="P1311">;but when the function finally ends bl will be subtracted from al</text:p>
      <text:p text:style-name="P1312">;this ensures that the function returns zero if the final characters are the same</text:p>
      <text:p text:style-name="P1313">;ebx,esi,and edi are preserved but eax is the return value</text:p>
      <text:p text:style-name="P1314">;also, the sub instruction at the end of the function also updates the flags</text:p>
      <text:p text:style-name="P1315">;so you can "jz" or "jnz" to a label after calling this function based on results</text:p>
      <text:p text:style-name="P1316"/>
      <text:p text:style-name="P1317">strcmp:</text:p>
      <text:p text:style-name="P1318"/>
      <text:p text:style-name="P1319">push ebx</text:p>
      <text:p text:style-name="P1320">push esi</text:p>
      <text:p text:style-name="P1321">push edi</text:p>
      <text:p text:style-name="P1322"/>
      <text:p text:style-name="P1323">mov eax,0</text:p>
      <text:p text:style-name="P1324"/>
      <text:p text:style-name="P1325">strcmp_start:</text:p>
      <text:p text:style-name="P1326"/>
      <text:p text:style-name="P1327">;read a byte from each string</text:p>
      <text:p text:style-name="P1328">mov al,[edi]</text:p>
      <text:p text:style-name="P1329">mov bl,[esi]</text:p>
      <text:p text:style-name="P1330">cmp al,bl</text:p>
      <text:p text:style-name="P1331">jnz strcmp_end</text:p>
      <text:p text:style-name="P1332"/>
      <text:p text:style-name="P1333">cmp al,0</text:p>
      <text:p text:style-name="P1334">jz strcmp_end</text:p>
      <text:p text:style-name="P1335"/>
      <text:p text:style-name="P1336">inc edi</text:p>
      <text:p text:style-name="P1337">inc esi</text:p>
      <text:p text:style-name="P1338"/>
      <text:p text:style-name="P1339">jmp strcmp_start</text:p>
      <text:p text:style-name="P1340"/>
      <text:p text:style-name="P1341">strcmp_end:</text:p>
      <text:p text:style-name="P1342">sub al,bl</text:p>
      <text:p text:style-name="P1343"/>
      <text:p text:style-name="P1344">pop edi</text:p>
      <text:p text:style-name="P1345">pop esi</text:p>
      <text:p text:style-name="P1346">pop ebx</text:p>
      <text:p text:style-name="P1347"/>
      <text:p text:style-name="P1348">ret</text:p>
      <text:p text:style-name="P1349"/>
      <text:p text:style-name="P1350">;because the actual hardware stack is used to process the command line arguments.</text:p>
      <text:p text:style-name="P1351">;I allocate memory for a virtual stack that we can index as if it was the real stack</text:p>
      <text:p text:style-name="P1352">;I name it "chastack" for Chastity's stack.</text:p>
      <text:p text:style-name="P1353"/>
      <text:p text:style-name="P1354">db 6 dup 0 ;extra padding bytes</text:p>
      <text:p text:style-name="P1355">chastack: rd 0x100</text:p>
      <text:p text:style-name="First_20_paragraph">One thing that seems odd about this program is that the virtual stack I use increases the ebp pointer when numbers are added to the stack and decreases them when numbers are removed. This is opposite of the way the real hardware stack works on Intel machines. In any case, the result is basically the same.</text:p>
      <text:p text:style-name="Text_20_body">The program pushes each number from the command line arguments onto the stack. It uses the strint_error variable to determine whether the strint function failed. If there was even one invalid character, it will print an error message.</text:p>
      <text:p text:style-name="Text_20_body">However, it checks for strings matching one of the commands “add,”sub”, “mul”, “div”, or “rem”. If any of these are encountered by the string comparison function (strcmp), it will use the top two numbers on the stack for that operation and then leave the result.</text:p>
      <text:p text:style-name="Text_20_body">The program usually achieves this by moving the top memory locations into registers, decrememting ebp, and then operating those register and storing the result on the stack.</text:p>
      <text:p text:style-name="Text_20_body">This program heavily depends on the concept of a stack as well as the strint function for getting a number from a string or checking the strings for commands with strcmp. This kind of calculator is easer to write than an infix notation because a program has a harder time figuring out “Please excuse my dear Aunt Sally” than it does a simple linear order of operations left to right.</text:p>
      <text:p text:style-name="Text_20_body">The main difference my calculator has is that it uses names of assembly instructions as the operators, with the exception of “rem”, which gets the remainder from a div instruction when it is stored in the edx register. Using these three letter words is convenient in the context of a book on Assembly language.</text:p>
      <text:p text:style-name="Text_20_body">There are entire programming languages like Forth, dc, STOIC, and Factor which use the concept of a stack to perform math in this order. Really, the stack is just a special case of an array which can be implemented in any programming language, but is more easily understood in Assembly.</text:p>
      <text:p text:style-name="Text_20_body">When I wrote this program, I wanted to use the real stack for doing the math, but that doesn’t work when the arguments have to be popped off the stack in the first place to operate the calculator.</text:p>
      <text:p text:style-name="Text_20_body">Though it could be said that a program which read from standard input or a file would be able to use the real stack in the way I intended, but it would not be as convenient as one that can be scripted with arguments as the one I have presented in this chapter.</text:p>
      <text:p text:style-name="Text_20_body">Whether you like my calculator or not, you have to admit that this has all the elements expected of a standard Linux command line tool.</text:p>
      <text:list text:style-name="L9">
        <text:list-item>
          <text:p text:style-name="P1356">input via command arguments so a user can direct the program for what they need.</text:p>
        </text:list-item>
        <text:list-item>
          <text:p text:style-name="P1356">output so the user can see the result</text:p>
        </text:list-item>
        <text:list-item>
          <text:p text:style-name="P1356">error handling so that the programmer or user can see when something is wrong</text:p>
        </text:list-item>
        <text:list-item>
          <text:p text:style-name="P1356">A proper exit condition for the program to avoid an infinite loop. In this case, running out of arguments.</text:p>
        </text:list-item>
      </text:list>
      <text:p text:style-name="First_20_paragraph">Before I end this chapter, I will include the contents of the “chastelib32.asm” file that was included in the chastack program.</text:p>
      <text:h text:style-name="Heading_20_2" text:outline-level="2"><text:bookmark-start text:name="chastelib32.asm"/>chastelib32.asm<text:bookmark-end text:name="chastelib32.asm"/></text:h>
      <text:p text:style-name="P1357">; chastelib assembly header file for 32 bit Linux</text:p>
      <text:p text:style-name="P1358">; This file is where I keep the source of my most important Assembly functions</text:p>
      <text:p text:style-name="P1359">; These are my string and integer output and conversion routines.</text:p>
      <text:p text:style-name="P1360"/>
      <text:p text:style-name="P1361">; To simplify documentation. The Accumulator/Arithmetic register</text:p>
      <text:p text:style-name="P1362">; (ax,eax,rax) depending on bit size shall be referred to as register A</text:p>
      <text:p text:style-name="P1363">; for the description of these core functions because the A register</text:p>
      <text:p text:style-name="P1364">; is treated special both by the Intel company and my code;</text:p>
      <text:p text:style-name="P1365"/>
      <text:p text:style-name="P1366">; putstring; Prints a zero terminated string from the address pointer to by A register.</text:p>
      <text:p text:style-name="P1367">; intstr; <text:s text:c="3"/>Converts the number in A into a zero terminated string and points A to that address</text:p>
      <text:p text:style-name="P1368">; putint; <text:s text:c="3"/>Prints the integer in A by calling intstr and then putstring.</text:p>
      <text:p text:style-name="P1369">; strint; <text:s text:c="3"/>Converts the zero terminated string into an integer and sets A to that value</text:p>
      <text:p text:style-name="P1370"><text:s text:c="3"/></text:p>
      <text:p text:style-name="P1371">; Now, the source of the functions begins, with comments included for parts that I felt needed explanation.</text:p>
      <text:p text:style-name="P1372"/>
      <text:p text:style-name="P1373">putstring:</text:p>
      <text:p text:style-name="P1374"/>
      <text:p text:style-name="P1375">push eax</text:p>
      <text:p text:style-name="P1376">push ebx</text:p>
      <text:p text:style-name="P1377">push ecx</text:p>
      <text:p text:style-name="P1378">push edx</text:p>
      <text:p text:style-name="P1379"/>
      <text:p text:style-name="P1380">mov ebx,eax <text:s text:c="12"/>;copy eax to ebx to be used as index to the string</text:p>
      <text:p text:style-name="P1381"/>
      <text:p text:style-name="P1382">putstring_strlen_start: ;this loop finds the length of the string as part of the putstring function</text:p>
      <text:p text:style-name="P1383"/>
      <text:p text:style-name="P1384">cmp [ebx],byte 0 <text:s text:c="7"/>;compare byte at address ebx with 0</text:p>
      <text:p text:style-name="P1385">jz putstring_strlen_end ;if comparison was zero, jump to loop end because we have found the length</text:p>
      <text:p text:style-name="P1386">inc ebx</text:p>
      <text:p text:style-name="P1387">jmp putstring_strlen_start</text:p>
      <text:p text:style-name="P1388"/>
      <text:p text:style-name="P1389">putstring_strlen_end:</text:p>
      <text:p text:style-name="P1390">sub ebx,eax ;subtract start pointer from current pointer to get length of string</text:p>
      <text:p text:style-name="P1391"/>
      <text:p text:style-name="P1392">;Write string using Linux Write system call.</text:p>
      <text:p text:style-name="P1393">;Reference for 32 bit x86 syscalls is below.</text:p>
      <text:p text:style-name="P1394">;https://www.chromium.org/chromium-os/developer-library/reference/linux-constants/syscalls/#x86-32-bit</text:p>
      <text:p text:style-name="P1395"/>
      <text:p text:style-name="P1396">mov edx,ebx <text:s text:c="5"/>;number of bytes to write</text:p>
      <text:p text:style-name="P1397">mov ecx,eax <text:s text:c="5"/>;pointer/address of string to write</text:p>
      <text:p text:style-name="P1398">mov ebx,1 <text:s text:c="7"/>;write to the STDOUT file</text:p>
      <text:p text:style-name="P1399">mov eax,4 <text:s text:c="7"/>;write (kernel opcode 4 on 32 bit systems)</text:p>
      <text:p text:style-name="P1400">int 80h <text:s text:c="9"/>;system call for 32-bit Linux kernel</text:p>
      <text:p text:style-name="P1401"/>
      <text:p text:style-name="P1402">pop edx</text:p>
      <text:p text:style-name="P1403">pop ecx</text:p>
      <text:p text:style-name="P1404">pop ebx</text:p>
      <text:p text:style-name="P1405">pop eax</text:p>
      <text:p text:style-name="P1406"/>
      <text:p text:style-name="P1407">ret ;this is the end of the putstring function return to calling location</text:p>
      <text:p text:style-name="P1408"/>
      <text:p text:style-name="P1409">; This is the location in memory where digits are written to by the intstr function</text:p>
      <text:p text:style-name="P1410">; The string of bytes and settings such as the radix and width are global variables defined below.</text:p>
      <text:p text:style-name="P1411"/>
      <text:p text:style-name="P1412">int_string db 32 dup '?' ;reserve bytes for characters string for 32-bit binary integer</text:p>
      <text:p text:style-name="P1413"/>
      <text:p text:style-name="P1414">int_string_end db 0 ;zero byte terminator for the integer string</text:p>
      <text:p text:style-name="P1415"/>
      <text:p text:style-name="P1416">radix dd 2 <text:s text:c="4"/>;radix or base for integer output. 2=binary, 8=octal, 10=decimal, 16=hexadecimal</text:p>
      <text:p text:style-name="P1417">int_width dd 8 ;default width of integers. Extra zeros prefixed if more than 1</text:p>
      <text:p text:style-name="P1418"/>
      <text:p text:style-name="P1419">;this function creates a string of the integer in eax</text:p>
      <text:p text:style-name="P1420">;it uses the above radix variable to determine base from 2 to 36</text:p>
      <text:p text:style-name="P1421">;it then loads eax with the address of the string</text:p>
      <text:p text:style-name="P1422">;this means that it can be used with the putstring function</text:p>
      <text:p text:style-name="P1423"/>
      <text:p text:style-name="P1424">intstr:</text:p>
      <text:p text:style-name="P1425"/>
      <text:p text:style-name="P1426">mov ebx,int_string_end-1 ;find address of lowest digit(just before the newline 0Ah)</text:p>
      <text:p text:style-name="P1427">mov ecx,1</text:p>
      <text:p text:style-name="P1428"/>
      <text:p text:style-name="P1429">digits_start:</text:p>
      <text:p text:style-name="P1430"/>
      <text:p text:style-name="P1431">mov edx,0;</text:p>
      <text:p text:style-name="P1432">div dword [radix]</text:p>
      <text:p text:style-name="P1433">cmp edx,10</text:p>
      <text:p text:style-name="P1434">jb decimal_digit</text:p>
      <text:p text:style-name="P1435">jnb hexadecimal_digit</text:p>
      <text:p text:style-name="P1436"/>
      <text:p text:style-name="P1437">decimal_digit: ;we go here if it is only a digit 0 to 9</text:p>
      <text:p text:style-name="P1438">add edx,'0'</text:p>
      <text:p text:style-name="P1439">jmp save_digit</text:p>
      <text:p text:style-name="P1440"/>
      <text:p text:style-name="P1441">hexadecimal_digit:</text:p>
      <text:p text:style-name="P1442">sub edx,10</text:p>
      <text:p text:style-name="P1443">add edx,'A'</text:p>
      <text:p text:style-name="P1444"/>
      <text:p text:style-name="P1445">save_digit:</text:p>
      <text:p text:style-name="P1446"/>
      <text:p text:style-name="P1447">mov [ebx],dl</text:p>
      <text:p text:style-name="P1448">cmp eax,0</text:p>
      <text:p text:style-name="P1449">jz intstr_end</text:p>
      <text:p text:style-name="P1450">dec ebx</text:p>
      <text:p text:style-name="P1451">inc ecx</text:p>
      <text:p text:style-name="P1452">jmp digits_start</text:p>
      <text:p text:style-name="P1453"/>
      <text:p text:style-name="P1454">intstr_end:</text:p>
      <text:p text:style-name="P1455"/>
      <text:p text:style-name="P1456">prefix_zeros:</text:p>
      <text:p text:style-name="P1457">cmp ecx,[int_width]</text:p>
      <text:p text:style-name="P1458">jnb end_zeros</text:p>
      <text:p text:style-name="P1459">dec ebx</text:p>
      <text:p text:style-name="P1460">mov [ebx],byte '0'</text:p>
      <text:p text:style-name="P1461">inc ecx</text:p>
      <text:p text:style-name="P1462">jmp prefix_zeros</text:p>
      <text:p text:style-name="P1463">end_zeros:</text:p>
      <text:p text:style-name="P1464"/>
      <text:p text:style-name="P1465">mov eax,ebx ;point eax register to this string for putstring</text:p>
      <text:p text:style-name="P1466"/>
      <text:p text:style-name="P1467">ret</text:p>
      <text:p text:style-name="P1468"/>
      <text:p text:style-name="P1469">;function to print string form of whatever integer is in eax</text:p>
      <text:p text:style-name="P1470">;The radix determines which number base the string form takes.</text:p>
      <text:p text:style-name="P1471">;Anything from 2 to 36 is a valid radix</text:p>
      <text:p text:style-name="P1472">;in practice though, only bases 2,8,10,and 16 will make sense to other programmers</text:p>
      <text:p text:style-name="P1473">;this function does not process anything by itself but calls the combination of my other</text:p>
      <text:p text:style-name="P1474">;functions in the order I intended them to be used.</text:p>
      <text:p text:style-name="P1475"/>
      <text:p text:style-name="P1476">putint: </text:p>
      <text:p text:style-name="P1477"/>
      <text:p text:style-name="P1478">push eax</text:p>
      <text:p text:style-name="P1479">push ebx</text:p>
      <text:p text:style-name="P1480">push ecx</text:p>
      <text:p text:style-name="P1481">push edx</text:p>
      <text:p text:style-name="P1482"/>
      <text:p text:style-name="P1483">call intstr</text:p>
      <text:p text:style-name="P1484">call putstring</text:p>
      <text:p text:style-name="P1485"/>
      <text:p text:style-name="P1486">pop edx</text:p>
      <text:p text:style-name="P1487">pop ecx</text:p>
      <text:p text:style-name="P1488">pop ebx</text:p>
      <text:p text:style-name="P1489">pop eax</text:p>
      <text:p text:style-name="P1490"/>
      <text:p text:style-name="P1491">ret</text:p>
      <text:p text:style-name="P1492"/>
      <text:p text:style-name="P1493">;this function converts a string pointed to by eax into an integer returned in eax instead</text:p>
      <text:p text:style-name="P1494">;it is a little complicated because it has to account for whether the character in</text:p>
      <text:p text:style-name="P1495">;a string is a decimal digit 0 to 9, or an alphabet character for bases higher than ten</text:p>
      <text:p text:style-name="P1496">;it also checks for both uppercase and lowercase letters for bases 11 to 36</text:p>
      <text:p text:style-name="P1497">;finally, it checks if that letter makes sense for the base.</text:p>
      <text:p text:style-name="P1498">;For example, G to Z cannot be used in hexadecimal, only A to F can</text:p>
      <text:p text:style-name="P1499">;The purpose of writing this function was to be able to accept user input as integers</text:p>
      <text:p text:style-name="P1500">;This function is improved with error checking and uses the new strint_error variable</text:p>
      <text:p text:style-name="P1501">;The program can check this value after the call and see how many errors happened.</text:p>
      <text:p text:style-name="P1502"/>
      <text:p text:style-name="P1503">strint_error db 0 ;declare a byte variable that keeps track of errors</text:p>
      <text:p text:style-name="P1504"/>
      <text:p text:style-name="P1505">strint:</text:p>
      <text:p text:style-name="P1506"/>
      <text:p text:style-name="P1507">mov ebx,eax ;copy string address from eax to ebx because eax will be replaced soon!</text:p>
      <text:p text:style-name="P1508">mov eax,0</text:p>
      <text:p text:style-name="P1509">mov byte[strint_error],0 ;set errors to 0 at the start of this function</text:p>
      <text:p text:style-name="P1510"/>
      <text:p text:style-name="P1511">read_strint:</text:p>
      <text:p text:style-name="P1512">mov ecx,0 <text:s text:c="2"/>;zero ecx so only lower 8 bits are used</text:p>
      <text:p text:style-name="P1513">mov cl,[ebx]</text:p>
      <text:p text:style-name="P1514">inc ebx</text:p>
      <text:p text:style-name="P1515">cmp cl,0 <text:s text:c="3"/>;compare this byte with 0</text:p>
      <text:p text:style-name="P1516">jz strint_end ; if comparison was zero, this is the end of string</text:p>
      <text:p text:style-name="P1517"/>
      <text:p text:style-name="P1518">;if char is below '0' or above '9', it is outside the range of these and is not a digit</text:p>
      <text:p text:style-name="P1519">cmp cl,'0'</text:p>
      <text:p text:style-name="P1520">jb not_digit</text:p>
      <text:p text:style-name="P1521">cmp cl,'9'</text:p>
      <text:p text:style-name="P1522">ja not_digit</text:p>
      <text:p text:style-name="P1523"/>
      <text:p text:style-name="P1524">;but if it is a digit, then correct and process the character</text:p>
      <text:p text:style-name="P1525">is_digit:</text:p>
      <text:p text:style-name="P1526">sub cl,'0'</text:p>
      <text:p text:style-name="P1527">jmp process_char</text:p>
      <text:p text:style-name="P1528"/>
      <text:p text:style-name="P1529">not_digit:</text:p>
      <text:p text:style-name="P1530">;it isn't a decimal digit, but it could be perhaps an alphabet character</text:p>
      <text:p text:style-name="P1531">;which could be a digit in a higher base like hexadecimal</text:p>
      <text:p text:style-name="P1532">;we will check for that possibility next</text:p>
      <text:p text:style-name="P1533"/>
      <text:p text:style-name="P1534">;if char is below 'A' or above 'Z', it is outside the range of these and is not capital letter</text:p>
      <text:p text:style-name="P1535">cmp cl,'A'</text:p>
      <text:p text:style-name="P1536">jb not_upper</text:p>
      <text:p text:style-name="P1537">cmp cl,'Z'</text:p>
      <text:p text:style-name="P1538">ja not_upper</text:p>
      <text:p text:style-name="P1539"/>
      <text:p text:style-name="P1540">is_upper:</text:p>
      <text:p text:style-name="P1541">sub cl,'A'</text:p>
      <text:p text:style-name="P1542">add cl,10</text:p>
      <text:p text:style-name="P1543">jmp process_char</text:p>
      <text:p text:style-name="P1544"/>
      <text:p text:style-name="P1545">not_upper:</text:p>
      <text:p text:style-name="P1546"/>
      <text:p text:style-name="P1547">;if char is below 'a' or above 'z', it is outside the range of these and is not lowercase letter</text:p>
      <text:p text:style-name="P1548">cmp cl,'a'</text:p>
      <text:p text:style-name="P1549">jb not_lower</text:p>
      <text:p text:style-name="P1550">cmp cl,'z'</text:p>
      <text:p text:style-name="P1551">ja not_lower</text:p>
      <text:p text:style-name="P1552"/>
      <text:p text:style-name="P1553">is_lower:</text:p>
      <text:p text:style-name="P1554">sub cl,'a'</text:p>
      <text:p text:style-name="P1555">add cl,10</text:p>
      <text:p text:style-name="P1556">jmp process_char</text:p>
      <text:p text:style-name="P1557"/>
      <text:p text:style-name="P1558">not_lower:</text:p>
      <text:p text:style-name="P1559"/>
      <text:p text:style-name="P1560">;if we have reached this point, result invalid and end function with error</text:p>
      <text:p text:style-name="P1561">jmp strint_end_error</text:p>
      <text:p text:style-name="P1562"/>
      <text:p text:style-name="P1563">process_char:</text:p>
      <text:p text:style-name="P1564"/>
      <text:p text:style-name="P1565">cmp ecx,[radix] ;compare char with radix</text:p>
      <text:p text:style-name="P1566">jnb strint_end_error ;if this value is above or equal to radix, it is too high despite being a valid digit/alpha</text:p>
      <text:p text:style-name="P1567"/>
      <text:p text:style-name="P1568">mov edx,0 ;zero edx because it is used in mul sometimes</text:p>
      <text:p text:style-name="P1569">mul dword [radix] ;mul eax with radix</text:p>
      <text:p text:style-name="P1570">add eax,ecx</text:p>
      <text:p text:style-name="P1571"/>
      <text:p text:style-name="P1572">jmp read_strint ;jump back and continue the loop if nothing has exited it</text:p>
      <text:p text:style-name="P1573"/>
      <text:p text:style-name="P1574">strint_end_error: <text:s text:c="1"/>;we jump here if there was an error with one of the chars</text:p>
      <text:p text:style-name="P1575">inc byte[strint_error] ;increment error counter because char invalid</text:p>
      <text:p text:style-name="P1576"/>
      <text:p text:style-name="P1577">strint_end: ;we jump here when no errors happened</text:p>
      <text:p text:style-name="P1578"/>
      <text:p text:style-name="P1579">ret</text:p>
      <text:p text:style-name="P1580"/>
      <text:p text:style-name="P1581">;The utility functions below simply print a space or a newline.</text:p>
      <text:p text:style-name="P1582">;these help me save code when printing lots of strings and integers.</text:p>
      <text:p text:style-name="P1583"/>
      <text:p text:style-name="P1584">space db ' ',0 ;a string containing only a space</text:p>
      <text:p text:style-name="P1585"/>
      <text:p text:style-name="P1586">putspace:</text:p>
      <text:p text:style-name="P1587">push eax</text:p>
      <text:p text:style-name="P1588">mov eax,space</text:p>
      <text:p text:style-name="P1589">call putstring</text:p>
      <text:p text:style-name="P1590">pop eax</text:p>
      <text:p text:style-name="P1591">ret</text:p>
      <text:p text:style-name="P1592"/>
      <text:p text:style-name="P1593">line db 0Ah,0 ;a string containing only a newline</text:p>
      <text:p text:style-name="P1594"/>
      <text:p text:style-name="P1595">;the next function which pushes eax to the stack</text:p>
      <text:p text:style-name="P1596">;moves the address of the line string and prints it with putstring</text:p>
      <text:p text:style-name="P1597">;then it pops the original value of eax back from the stack before the function returns</text:p>
      <text:p text:style-name="P1598">;this allows me to print a newline anywhere in the code without a single register changing</text:p>
      <text:p text:style-name="P1599"/>
      <text:p text:style-name="P1600">putline:</text:p>
      <text:p text:style-name="P1601">push eax</text:p>
      <text:p text:style-name="P1602">mov eax,line</text:p>
      <text:p text:style-name="P1603">call putstring</text:p>
      <text:p text:style-name="P1604">pop eax</text:p>
      <text:p text:style-name="P1605">ret</text:p>
      <text:p text:style-name="P1606"/>
      <text:p text:style-name="P1607">;a function for printing a single character that is the value of al</text:p>
      <text:p text:style-name="P1608"/>
      <text:p text:style-name="P1609">char: db 0,0</text:p>
      <text:p text:style-name="P1610"/>
      <text:p text:style-name="P1611">putchar:</text:p>
      <text:p text:style-name="P1612">push eax</text:p>
      <text:p text:style-name="P1613">mov [char],al</text:p>
      <text:p text:style-name="P1614">mov eax,char</text:p>
      <text:p text:style-name="P1615">call putstring</text:p>
      <text:p text:style-name="P1616">pop eax</text:p>
      <text:p text:style-name="P1617">ret</text:p>
      <text:p text:style-name="P1618"/>
      <text:p text:style-name="P1619">;a small function just for the common operation of</text:p>
      <text:p text:style-name="P1620">;printing an integer followed by a space</text:p>
      <text:p text:style-name="P1621">;this saves a few bytes in the assembled code</text:p>
      <text:p text:style-name="P1622">;by reducing the number of function calls in the main program</text:p>
      <text:p text:style-name="P1623"/>
      <text:p text:style-name="P1624">putint_and_space:</text:p>
      <text:p text:style-name="P1625">call putint</text:p>
      <text:p text:style-name="P1626">call putspace</text:p>
      <text:p text:style-name="P1627">ret</text:p>
      <text:p text:style-name="P1628"/>
      <text:p text:style-name="P1629">;a small function just for the common operation of</text:p>
      <text:p text:style-name="P1630">;printing an integer followed by a line feed</text:p>
      <text:p text:style-name="P1631">;this saves a few bytes in the assembled code</text:p>
      <text:p text:style-name="P1632">;by reducing the number of function calls in the main program</text:p>
      <text:p text:style-name="P1633"/>
      <text:p text:style-name="P1634">putint_and_line:</text:p>
      <text:p text:style-name="P1635">call putint</text:p>
      <text:p text:style-name="P1636">call putline</text:p>
      <text:p text:style-name="P1637">ret</text:p>
      <text:p text:style-name="P1638"/>
      <text:p text:style-name="P1639">;a small function just for the common operation of</text:p>
      <text:p text:style-name="P1640">;printing a string followed by a line feed</text:p>
      <text:p text:style-name="P1641">;this saves a few bytes in the assembled code</text:p>
      <text:p text:style-name="P1642">;by reducing the number of function calls in the main program</text:p>
      <text:p text:style-name="P1643">;it also means we don't need to include a newline in every string!</text:p>
      <text:p text:style-name="P1644"/>
      <text:p text:style-name="P1645">putstr_and_line:</text:p>
      <text:p text:style-name="P1646">call putstring</text:p>
      <text:p text:style-name="P1647">call putline</text:p>
      <text:p text:style-name="P1648">ret</text:p>
      <text:p text:style-name="First_20_paragraph">That header file will be reused in most other programs in this book.</text:p>
      <text:h text:style-name="Heading_20_1" text:outline-level="1"><text:bookmark-start text:name="chapter-11-a-note-on-portability"/>Chapter 11 A Note on Portability<text:bookmark-end text:name="chapter-11-a-note-on-portability"/></text:h>
      <text:p text:style-name="First_20_paragraph">Assembly has a bad reputation for not being portable. However, portability is not as hard to achieve with Assembly language as it used to be.</text:p>
      <text:p text:style-name="Text_20_body">First, almost all machines you will buy in a store contain either Intel chips or ARM chips. This means that the number of processors we need to be concerned with is very limited.</text:p>
      <text:p text:style-name="Text_20_body">I can’t speak about ARM Assembly because the only working machine I have with an ARM CPU can’t connect to the internet (long story). However, because of the dominance of Intel on desktop and laptop PCs, everything in this book will apply to most users.</text:p>
      <text:p text:style-name="Text_20_body">Second, I am not concerned with porting between operating systems because Linux and other Unix-Like systems use the same set of system calls. Linux is free in the sense of Libre (freedom) and gratis (no cost) because distros can be downloaded and copied to CDs, DVDs, bootable USB drives, and even run in PC emulators like QEMU.</text:p>
      <text:p text:style-name="Text_20_body">Third, I have successfully ported software from Assembly to both DOS and Windows because only the system calls need to be rewritten that conform to the operating system API. The programs in the DOS edition of Assembly Arithmetic Algorithms all started out as Linux programs originally, for example.</text:p>
      <text:p text:style-name="Text_20_body">But in this chapter, I want to talk about a specific portability issue: Portability between 32-bit and 64-bit modes. These two modes of loading and running a program are both supported by the FASM assembler. A future book will focus on the particulars of 64 bit Assembly programming for Linux, but you can consider this chapter a preview and a migration guide if you have a program that you need to convert from running in 32 bit mode to 64 bit mode.</text:p>
      <text:h text:style-name="Heading_20_2" text:outline-level="2"><text:bookmark-start text:name="difference-between-32-and-64-bit-modes"/>Difference between 32 and 64 bit modes<text:bookmark-end text:name="difference-between-32-and-64-bit-modes"/></text:h>
      <text:p text:style-name="First_20_paragraph">The 8 general purpose registers are extended to 64 bits. The E is changed to R. Therefore, they are the same as described in chapter 1 except each of them are 64-bits.</text:p>
      <text:list text:style-name="L10">
        <text:list-item>
          <text:p text:style-name="P1649">RAX: The Accumulator Register</text:p>
        </text:list-item>
        <text:list-item>
          <text:p text:style-name="P1649">RBX: The Base Register</text:p>
        </text:list-item>
        <text:list-item>
          <text:p text:style-name="P1649">RCX: The Count Register</text:p>
        </text:list-item>
        <text:list-item>
          <text:p text:style-name="P1649">RDX: The Data Register</text:p>
        </text:list-item>
        <text:list-item>
          <text:p text:style-name="P1649">RSI: The Source Index</text:p>
        </text:list-item>
        <text:list-item>
          <text:p text:style-name="P1649">RDI: the Destination index</text:p>
        </text:list-item>
        <text:list-item>
          <text:p text:style-name="P1649">RBP: The Base Pointer</text:p>
        </text:list-item>
        <text:list-item>
          <text:p text:style-name="P1649">RSP: The Stack Pointer</text:p>
        </text:list-item>
      </text:list>
      <text:p text:style-name="First_20_paragraph">Besides these 8 registers, which can be used in the same way as their equivalent E?? 32 bit-names, there are also 8 more 64 bit registers named R8 to R15. You can think of them as extra storage space available to you in 64 bit mode.</text:p>
      <text:p text:style-name="Text_20_body">The pusha/pushad and popa/popad instructions no longer exist in 64 bit mode. I haven’t mentioned these instructions before nor have I used these in any of my programs because I was aware that it would break compatibility with 64-bit code.</text:p>
      <text:p text:style-name="Text_20_body">But for historical purposes, what these instructions could do in 16 and 32 bit modes was push or pop all the 8 general purpose registers at the same time. This means that instead of pushing and popping eax,ebx,ecx,edx each on separate lines, I could have just replaced it with pusha at the beginning of a function and popa at the end of a function.</text:p>
      <text:p text:style-name="Text_20_body">Doing such a thing would have reduced the size of my programs by a few bytes, but when I wrote this book I prioritized portability between the 3 platforms that matter to me.</text:p>
      <text:list text:style-name="L11">
        <text:list-item>
          <text:p text:style-name="P1650">16-bit DOS (available via emulators on every computer)</text:p>
        </text:list-item>
        <text:list-item>
          <text:p text:style-name="P1650">32-bit Linux (the convention used in this book)</text:p>
        </text:list-item>
        <text:list-item>
          <text:p text:style-name="P1650">64-bit Linux (used for a future book and special programs)</text:p>
        </text:list-item>
      </text:list>
      <text:p text:style-name="First_20_paragraph">For the most part, I can port any program between these platforms fairly easily with only a few small changes.</text:p>
      <text:h text:style-name="Heading_20_2" text:outline-level="2"><text:bookmark-start text:name="converting-32-to-64-bit-mode"/>Converting 32 to 64 bit mode<text:bookmark-end text:name="converting-32-to-64-bit-mode"/></text:h>
      <text:p text:style-name="First_20_paragraph">Step 1: Replace every ‘e’ in register names to ‘r’. This makes them switch to the full 64 bit register. This is very easy.</text:p>
      <text:p text:style-name="Text_20_body">Step 2: Change the system call convention to the new 64 bit mode which uses different registers but has the same calls available.</text:p>
      <text:p text:style-name="Text_20_body">Between these two basic steps, step 2 is a lot harder. To make this easy, I have created some tables and information on the arguments required.</text:p>
      <text:h text:style-name="Heading_20_2" text:outline-level="2"><text:bookmark-start text:name="chastitys-linux-system-call-table"/>Chastity’s Linux System Call Table<text:bookmark-end text:name="chastitys-linux-system-call-table"/></text:h>
      <text:p text:style-name="First_20_paragraph">The following tables show the main 6 system calls that all of my programs use. 32 bit calls are accessed with “int 0x80” to call the kernel with an interrupt. 64 bit calls are accessed with the “syscall” instruction. As long as you load the right data into the registers described, you can use these calls for useful programs.</text:p>
      <text:h text:style-name="Heading_20_2" text:outline-level="2"><text:bookmark-start text:name="bit-intel-system-calls-for-linux"/>32-bit Intel System Calls for Linux<text:bookmark-end text:name="bit-intel-system-calls-for-linux"/></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HeaderRowCell" office:value-type="string">
              <text:p text:style-name="Table_20_Heading">Number</text:p>
            </table:table-cell>
            <table:table-cell table:style-name="TableHeaderRowCell" office:value-type="string">
              <text:p text:style-name="Table_20_Heading">Name</text:p>
            </table:table-cell>
            <table:table-cell table:style-name="TableHeaderRowCell" office:value-type="string">
              <text:p text:style-name="Table_20_Heading">eax</text:p>
            </table:table-cell>
            <table:table-cell table:style-name="TableHeaderRowCell" office:value-type="string">
              <text:p text:style-name="Table_20_Heading">ebx</text:p>
            </table:table-cell>
            <table:table-cell table:style-name="TableHeaderRowCell" office:value-type="string">
              <text:p text:style-name="Table_20_Heading">ecx</text:p>
            </table:table-cell>
            <table:table-cell table:style-name="TableHeaderRowCell" office:value-type="string">
              <text:p text:style-name="Table_20_Heading">edx</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xit</text:p>
          </table:table-cell>
          <table:table-cell table:style-name="TableRowCell" office:value-type="string">
            <text:p text:style-name="Table_20_Contents">0x01</text:p>
          </table:table-cell>
          <table:table-cell table:style-name="TableRowCell" office:value-type="string">
            <text:p text:style-name="Table_20_Contents">statu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read</text:p>
          </table:table-cell>
          <table:table-cell table:style-name="TableRowCell" office:value-type="string">
            <text:p text:style-name="Table_20_Contents">0x03</text:p>
          </table:table-cell>
          <table:table-cell table:style-name="TableRowCell" office:value-type="string">
            <text:p text:style-name="Table_20_Contents">fd</text:p>
          </table:table-cell>
          <table:table-cell table:style-name="TableRowCell" office:value-type="string">
            <text:p text:style-name="Table_20_Contents">buf</text:p>
          </table:table-cell>
          <table:table-cell table:style-name="TableRowCell" office:value-type="string">
            <text:p text:style-name="Table_20_Contents">count</text:p>
          </table:table-cell>
        </table:table-row>
        <table:table-row>
          <table:table-cell table:style-name="TableRowCell" office:value-type="string">
            <text:p text:style-name="Table_20_Contents">4</text:p>
          </table:table-cell>
          <table:table-cell table:style-name="TableRowCell" office:value-type="string">
            <text:p text:style-name="Table_20_Contents">write</text:p>
          </table:table-cell>
          <table:table-cell table:style-name="TableRowCell" office:value-type="string">
            <text:p text:style-name="Table_20_Contents">0x04</text:p>
          </table:table-cell>
          <table:table-cell table:style-name="TableRowCell" office:value-type="string">
            <text:p text:style-name="Table_20_Contents">fd</text:p>
          </table:table-cell>
          <table:table-cell table:style-name="TableRowCell" office:value-type="string">
            <text:p text:style-name="Table_20_Contents">buf</text:p>
          </table:table-cell>
          <table:table-cell table:style-name="TableRowCell" office:value-type="string">
            <text:p text:style-name="Table_20_Contents">count</text:p>
          </table:table-cell>
        </table:table-row>
        <table:table-row>
          <table:table-cell table:style-name="TableRowCell" office:value-type="string">
            <text:p text:style-name="Table_20_Contents">5</text:p>
          </table:table-cell>
          <table:table-cell table:style-name="TableRowCell" office:value-type="string">
            <text:p text:style-name="Table_20_Contents">open</text:p>
          </table:table-cell>
          <table:table-cell table:style-name="TableRowCell" office:value-type="string">
            <text:p text:style-name="Table_20_Contents">0x05</text:p>
          </table:table-cell>
          <table:table-cell table:style-name="TableRowCell" office:value-type="string">
            <text:p text:style-name="Table_20_Contents">filename</text:p>
          </table:table-cell>
          <table:table-cell table:style-name="TableRowCell" office:value-type="string">
            <text:p text:style-name="Table_20_Contents">flags</text:p>
          </table:table-cell>
          <table:table-cell table:style-name="TableRowCell" office:value-type="string">
            <text:p text:style-name="Table_20_Contents">mode</text:p>
          </table:table-cell>
        </table:table-row>
        <table:table-row>
          <table:table-cell table:style-name="TableRowCell" office:value-type="string">
            <text:p text:style-name="Table_20_Contents">6</text:p>
          </table:table-cell>
          <table:table-cell table:style-name="TableRowCell" office:value-type="string">
            <text:p text:style-name="Table_20_Contents">close</text:p>
          </table:table-cell>
          <table:table-cell table:style-name="TableRowCell" office:value-type="string">
            <text:p text:style-name="Table_20_Contents">0x06</text:p>
          </table:table-cell>
          <table:table-cell table:style-name="TableRowCell" office:value-type="string">
            <text:p text:style-name="Table_20_Contents">f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lseek</text:p>
          </table:table-cell>
          <table:table-cell table:style-name="TableRowCell" office:value-type="string">
            <text:p text:style-name="Table_20_Contents">0x13</text:p>
          </table:table-cell>
          <table:table-cell table:style-name="TableRowCell" office:value-type="string">
            <text:p text:style-name="Table_20_Contents">fd</text:p>
          </table:table-cell>
          <table:table-cell table:style-name="TableRowCell" office:value-type="string">
            <text:p text:style-name="Table_20_Contents">offset</text:p>
          </table:table-cell>
          <table:table-cell table:style-name="TableRowCell" office:value-type="string">
            <text:p text:style-name="Table_20_Contents">whence</text:p>
          </table:table-cell>
        </table:table-row>
      </table:table>
      <text:h text:style-name="Heading_20_2" text:outline-level="2"><text:bookmark-start text:name="bit-intel-system-calls-for-linux-1"/>64-bit Intel System Calls for Linux<text:bookmark-end text:name="bit-intel-system-calls-for-linux-1"/></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HeaderRowCell" office:value-type="string">
              <text:p text:style-name="Table_20_Heading">Number</text:p>
            </table:table-cell>
            <table:table-cell table:style-name="TableHeaderRowCell" office:value-type="string">
              <text:p text:style-name="Table_20_Heading">Name</text:p>
            </table:table-cell>
            <table:table-cell table:style-name="TableHeaderRowCell" office:value-type="string">
              <text:p text:style-name="Table_20_Heading">rax</text:p>
            </table:table-cell>
            <table:table-cell table:style-name="TableHeaderRowCell" office:value-type="string">
              <text:p text:style-name="Table_20_Heading">rdi</text:p>
            </table:table-cell>
            <table:table-cell table:style-name="TableHeaderRowCell" office:value-type="string">
              <text:p text:style-name="Table_20_Heading">rsi</text:p>
            </table:table-cell>
            <table:table-cell table:style-name="TableHeaderRowCell" office:value-type="string">
              <text:p text:style-name="Table_20_Heading">rdx</text:p>
            </table:table-cell>
          </table:table-row>
        </table:table-header-rows>
        <table:table-row>
          <table:table-cell table:style-name="TableRowCell" office:value-type="string">
            <text:p text:style-name="Table_20_Contents">60</text:p>
          </table:table-cell>
          <table:table-cell table:style-name="TableRowCell" office:value-type="string">
            <text:p text:style-name="Table_20_Contents">exit</text:p>
          </table:table-cell>
          <table:table-cell table:style-name="TableRowCell" office:value-type="string">
            <text:p text:style-name="Table_20_Contents">0x3C</text:p>
          </table:table-cell>
          <table:table-cell table:style-name="TableRowCell" office:value-type="string">
            <text:p text:style-name="Table_20_Contents">statu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text:p>
          </table:table-cell>
          <table:table-cell table:style-name="TableRowCell" office:value-type="string">
            <text:p text:style-name="Table_20_Contents">read</text:p>
          </table:table-cell>
          <table:table-cell table:style-name="TableRowCell" office:value-type="string">
            <text:p text:style-name="Table_20_Contents">0x00</text:p>
          </table:table-cell>
          <table:table-cell table:style-name="TableRowCell" office:value-type="string">
            <text:p text:style-name="Table_20_Contents">fd</text:p>
          </table:table-cell>
          <table:table-cell table:style-name="TableRowCell" office:value-type="string">
            <text:p text:style-name="Table_20_Contents">buf</text:p>
          </table:table-cell>
          <table:table-cell table:style-name="TableRowCell" office:value-type="string">
            <text:p text:style-name="Table_20_Contents">count</text:p>
          </table:table-cell>
        </table:table-row>
        <table:table-row>
          <table:table-cell table:style-name="TableRowCell" office:value-type="string">
            <text:p text:style-name="Table_20_Contents">1</text:p>
          </table:table-cell>
          <table:table-cell table:style-name="TableRowCell" office:value-type="string">
            <text:p text:style-name="Table_20_Contents">write</text:p>
          </table:table-cell>
          <table:table-cell table:style-name="TableRowCell" office:value-type="string">
            <text:p text:style-name="Table_20_Contents">0x01</text:p>
          </table:table-cell>
          <table:table-cell table:style-name="TableRowCell" office:value-type="string">
            <text:p text:style-name="Table_20_Contents">fd</text:p>
          </table:table-cell>
          <table:table-cell table:style-name="TableRowCell" office:value-type="string">
            <text:p text:style-name="Table_20_Contents">buf</text:p>
          </table:table-cell>
          <table:table-cell table:style-name="TableRowCell" office:value-type="string">
            <text:p text:style-name="Table_20_Contents">count</text:p>
          </table:table-cell>
        </table:table-row>
        <table:table-row>
          <table:table-cell table:style-name="TableRowCell" office:value-type="string">
            <text:p text:style-name="Table_20_Contents">2</text:p>
          </table:table-cell>
          <table:table-cell table:style-name="TableRowCell" office:value-type="string">
            <text:p text:style-name="Table_20_Contents">open</text:p>
          </table:table-cell>
          <table:table-cell table:style-name="TableRowCell" office:value-type="string">
            <text:p text:style-name="Table_20_Contents">0x02</text:p>
          </table:table-cell>
          <table:table-cell table:style-name="TableRowCell" office:value-type="string">
            <text:p text:style-name="Table_20_Contents">filename</text:p>
          </table:table-cell>
          <table:table-cell table:style-name="TableRowCell" office:value-type="string">
            <text:p text:style-name="Table_20_Contents">flags</text:p>
          </table:table-cell>
          <table:table-cell table:style-name="TableRowCell" office:value-type="string">
            <text:p text:style-name="Table_20_Contents">mode</text:p>
          </table:table-cell>
        </table:table-row>
        <table:table-row>
          <table:table-cell table:style-name="TableRowCell" office:value-type="string">
            <text:p text:style-name="Table_20_Contents">3</text:p>
          </table:table-cell>
          <table:table-cell table:style-name="TableRowCell" office:value-type="string">
            <text:p text:style-name="Table_20_Contents">close</text:p>
          </table:table-cell>
          <table:table-cell table:style-name="TableRowCell" office:value-type="string">
            <text:p text:style-name="Table_20_Contents">0x03</text:p>
          </table:table-cell>
          <table:table-cell table:style-name="TableRowCell" office:value-type="string">
            <text:p text:style-name="Table_20_Contents">f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lseek</text:p>
          </table:table-cell>
          <table:table-cell table:style-name="TableRowCell" office:value-type="string">
            <text:p text:style-name="Table_20_Contents">0x08</text:p>
          </table:table-cell>
          <table:table-cell table:style-name="TableRowCell" office:value-type="string">
            <text:p text:style-name="Table_20_Contents">fd</text:p>
          </table:table-cell>
          <table:table-cell table:style-name="TableRowCell" office:value-type="string">
            <text:p text:style-name="Table_20_Contents">offset</text:p>
          </table:table-cell>
          <table:table-cell table:style-name="TableRowCell" office:value-type="string">
            <text:p text:style-name="Table_20_Contents">whence</text:p>
          </table:table-cell>
        </table:table-row>
      </table:table>
      <text:p text:style-name="First_20_paragraph">The following names for the arguments are based on the Linux manual pages for those system calls. You can access the same from any Linux distro. For example, “man 2 write” will show the C function signature for the write call.</text:p>
      <text:p text:style-name="Text_20_body"><text:span text:style-name="T1">status</text:span> for exit call is a byte number from 0 to 255 to be returned to the operating system. Shell scripts use this to know if something went wrong when running the program. By convention, a return of 0 means no errors happened.</text:p>
      <text:p text:style-name="Text_20_body"><text:span text:style-name="T1">fd</text:span> refers to a number which is used as a file descriptor. fd 0 is stdin and fd 1 is stdout. Other file descriptors are returned from an open call. Any fd is returned in the eax register in Assembly language. This same fd must be saved somewhere and used whenever you want to read, write, close, or lseek using the file you opened.</text:p>
      <text:p text:style-name="Text_20_body"><text:span text:style-name="T1">buf</text:span> refers to pointer which will be read into with a read call or written from using a write call.</text:p>
      <text:p text:style-name="Text_20_body"><text:span text:style-name="T1">count</text:span> refers to how many bytes are going to be read or written with the read or write calls.</text:p>
      <text:h text:style-name="Heading_20_3" text:outline-level="3"><text:bookmark-start text:name="values-for-the-flags-argument-to-open."/>Values for the flags argument to open.<text:bookmark-end text:name="values-for-the-flags-argument-to-open."/></text:h>
      <text:p text:style-name="P1651">O_RDONLY <text:s text:c="2"/>00</text:p>
      <text:p text:style-name="P1652">O_WRONLY <text:s text:c="2"/>01</text:p>
      <text:p text:style-name="P1653">O_RDWR <text:s text:c="4"/>02</text:p>
      <text:p text:style-name="P1654">O_CREAT <text:s text:c="1"/>0100</text:p>
      <text:h text:style-name="Heading_20_3" text:outline-level="3"><text:bookmark-start text:name="values-for-the-mode-argument-to-open."/>Values for the mode argument to open.<text:bookmark-end text:name="values-for-the-mode-argument-to-open."/></text:h>
      <text:list text:style-name="L12">
        <text:list-item>
          <text:p text:style-name="P1655">S_IRWXU 00700 user (file owner) has read, write, and execute permission</text:p>
        </text:list-item>
        <text:list-item>
          <text:p text:style-name="P1655">S_IRUSR 00400 user has read permission</text:p>
        </text:list-item>
        <text:list-item>
          <text:p text:style-name="P1655">S_IWUSR 00200 user has write permission</text:p>
        </text:list-item>
        <text:list-item>
          <text:p text:style-name="P1655">S_IXUSR 00100 user has execute permission</text:p>
        </text:list-item>
        <text:list-item>
          <text:p text:style-name="P1655">S_IRWXG 00070 group has read, write, and execute permission</text:p>
        </text:list-item>
        <text:list-item>
          <text:p text:style-name="P1655">S_IRGRP 00040 group has read permission</text:p>
        </text:list-item>
        <text:list-item>
          <text:p text:style-name="P1655">S_IWGRP 00020 group has write permission</text:p>
        </text:list-item>
        <text:list-item>
          <text:p text:style-name="P1655">S_IXGRP 00010 group has execute permission</text:p>
        </text:list-item>
        <text:list-item>
          <text:p text:style-name="P1655">S_IRWXO 00007 others have read, write, and execute permission</text:p>
        </text:list-item>
        <text:list-item>
          <text:p text:style-name="P1655">S_IROTH 00004 others have read permission</text:p>
        </text:list-item>
        <text:list-item>
          <text:p text:style-name="P1655">S_IWOTH 00002 others have write permission</text:p>
        </text:list-item>
        <text:list-item>
          <text:p text:style-name="P1655">S_IXOTH 00001 others have execute permission</text:p>
        </text:list-item>
      </text:list>
      <text:p text:style-name="First_20_paragraph"><text:span text:style-name="T1">offset</text:span> is the address you want to go to in the file. It is used in the lseek call and depends on the <text:span text:style-name="T1">whence</text:span> argument</text:p>
      <text:h text:style-name="Heading_20_3" text:outline-level="3"><text:bookmark-start text:name="values-for-the-whence-argument-to-lseek."/>Values for the whence argument to lseek.<text:bookmark-end text:name="values-for-the-whence-argument-to-lseek."/></text:h>
      <text:list text:style-name="L13">
        <text:list-item>
          <text:p text:style-name="P1656">SEEK_SET 0 Seek from beginning of file.</text:p>
        </text:list-item>
        <text:list-item>
          <text:p text:style-name="P1656">SEEK_CUR 1 Seek from current position.</text:p>
        </text:list-item>
        <text:list-item>
          <text:p text:style-name="P1656">SEEK_END 2 Seek from end of file.</text:p>
        </text:list-item>
      </text:list>
      <text:p text:style-name="First_20_paragraph">Numbers used for file flags or modes are prefixed with zeros because they are octal constants and this is how they are represented in the C Programming Language. However, in Assembly, you need to look up your Assembler’s rules for octal constants. For example, in FASM, they must end with the letter ‘o’.</text:p>
      <text:h text:style-name="Heading_20_2" text:outline-level="2"><text:bookmark-start text:name="actual-conversion-example"/>Actual Conversion Example<text:bookmark-end text:name="actual-conversion-example"/></text:h>
      <text:p text:style-name="First_20_paragraph">I realize that the information in my tables and decriptions of data for them won’t work for everyone. You need a real example to see how it is possible to convert a program to 64 bit. Therefore, I present to you the 64-bit Linux edition of the chastack program in the last chapter. I have ensured that each line of both the 32-bit and 64-bit source files are doing the exact same thing.</text:p>
      <text:h text:style-name="Heading_20_2" text:outline-level="2"><text:bookmark-start text:name="fasm-chastack-64-bit"/>FASM chastack 64-bit<text:bookmark-end text:name="fasm-chastack-64-bit"/></text:h>
      <text:p text:style-name="P1657">format ELF64 executable</text:p>
      <text:p text:style-name="P1658">entry main</text:p>
      <text:p text:style-name="P1659"/>
      <text:p text:style-name="P1660">include 'chastelib64.asm'</text:p>
      <text:p text:style-name="P1661"/>
      <text:p text:style-name="P1662">main:</text:p>
      <text:p text:style-name="P1663"/>
      <text:p text:style-name="P1664">mov qword[radix],10 <text:s text:c="3"/>;I can choose the radix for integer output!</text:p>
      <text:p text:style-name="P1665">mov qword[int_width],1 ;and the width of each integer for padded zeros</text:p>
      <text:p text:style-name="P1666"/>
      <text:p text:style-name="P1667">mov rbp,chastack <text:s text:c="6"/>;mov the address of the beginning of the stack to rbp registers</text:p>
      <text:p text:style-name="P1668"/>
      <text:p text:style-name="P1669">pop rax <text:s text:c="15"/>;pop the number of arguments from the stack</text:p>
      <text:p text:style-name="P1670">dec rax <text:s text:c="15"/>;subtract 1 because the program name will be unused</text:p>
      <text:p text:style-name="P1671">mov [argc],rax <text:s text:c="8"/>;save the argument count for later</text:p>
      <text:p text:style-name="P1672">pop rbx <text:s text:c="15"/>;pop argument 0 (name of the program, we don't use it)</text:p>
      <text:p text:style-name="P1673">cmp rax,0</text:p>
      <text:p text:style-name="P1674">jnz usearg <text:s text:c="12"/>;if arguments are available, use the main loop</text:p>
      <text:p text:style-name="P1675"/>
      <text:p text:style-name="P1676">mov rax,string_help</text:p>
      <text:p text:style-name="P1677">call putstring</text:p>
      <text:p text:style-name="P1678"/>
      <text:p text:style-name="P1679">usearg:</text:p>
      <text:p text:style-name="P1680"/>
      <text:p text:style-name="P1681">cmp [argc],0 <text:s text:c="9"/>;check for remaining arguments</text:p>
      <text:p text:style-name="P1682">jz usearg_end <text:s text:c="8"/>;if none, end the loop and stop printing</text:p>
      <text:p text:style-name="P1683">pop rsi <text:s text:c="14"/>;pop the next argument off the stack to rsi for string comparison</text:p>
      <text:p text:style-name="P1684">dec [argc] <text:s text:c="11"/>;subtract 1 from argument count</text:p>
      <text:p text:style-name="P1685"/>
      <text:p text:style-name="P1686">;Now we process the string we got from the stack</text:p>
      <text:p text:style-name="P1687">;First, we will try testing for commands</text:p>
      <text:p text:style-name="P1688">;If any of the predefined strings match the string in rsi</text:p>
      <text:p text:style-name="P1689">;We jump to the label for that command</text:p>
      <text:p text:style-name="P1690"/>
      <text:p text:style-name="P1691">mov rdi,string_add</text:p>
      <text:p text:style-name="P1692">call strcmp</text:p>
      <text:p text:style-name="P1693">jz command_add</text:p>
      <text:p text:style-name="P1694"/>
      <text:p text:style-name="P1695">mov rdi,string_sub</text:p>
      <text:p text:style-name="P1696">call strcmp</text:p>
      <text:p text:style-name="P1697">jz command_sub</text:p>
      <text:p text:style-name="P1698"/>
      <text:p text:style-name="P1699">mov rdi,string_mul</text:p>
      <text:p text:style-name="P1700">call strcmp</text:p>
      <text:p text:style-name="P1701">jz command_mul</text:p>
      <text:p text:style-name="P1702"/>
      <text:p text:style-name="P1703">mov rdi,string_div</text:p>
      <text:p text:style-name="P1704">call strcmp</text:p>
      <text:p text:style-name="P1705">jz command_div</text:p>
      <text:p text:style-name="P1706"/>
      <text:p text:style-name="P1707">mov rdi,string_rem</text:p>
      <text:p text:style-name="P1708">call strcmp</text:p>
      <text:p text:style-name="P1709">jz command_rem</text:p>
      <text:p text:style-name="P1710"/>
      <text:p text:style-name="P1711">;The default command is to turn the argument into a number and push to stack</text:p>
      <text:p text:style-name="P1712"/>
      <text:p text:style-name="P1713">command_num:</text:p>
      <text:p text:style-name="P1714"/>
      <text:p text:style-name="P1715">mov rax,rsi <text:s text:c="9"/>;mov the string to rax for processing numbers</text:p>
      <text:p text:style-name="P1716">call strint <text:s text:c="9"/>;try to get a number from the string pointed to by rax</text:p>
      <text:p text:style-name="P1717">cmp [strint_error],0 ;did we have zero errors in the strint function?</text:p>
      <text:p text:style-name="P1718">jz num_push <text:s text:c="9"/>;if there were no errors, push this to stack</text:p>
      <text:p text:style-name="P1719"/>
      <text:p text:style-name="P1720">mov rax,string_err</text:p>
      <text:p text:style-name="P1721">call putstring</text:p>
      <text:p text:style-name="P1722">mov rax,rsi</text:p>
      <text:p text:style-name="P1723">call putstring</text:p>
      <text:p text:style-name="P1724">call putline</text:p>
      <text:p text:style-name="P1725">jmp num_push_end ;skip the push because this can't be used</text:p>
      <text:p text:style-name="P1726"/>
      <text:p text:style-name="P1727">num_push: <text:s text:c="7"/>;push the number to the fake stack</text:p>
      <text:p text:style-name="P1728">add rbp,8</text:p>
      <text:p text:style-name="P1729">mov [rbp],rax</text:p>
      <text:p text:style-name="P1730">num_push_end:</text:p>
      <text:p text:style-name="P1731"/>
      <text:p text:style-name="P1732">jmp usearg</text:p>
      <text:p text:style-name="P1733"/>
      <text:p text:style-name="P1734">;These are the labels and code for each of the commands</text:p>
      <text:p text:style-name="P1735">;When a command is done, we jump back to the beginning of the loop</text:p>
      <text:p text:style-name="P1736"/>
      <text:p text:style-name="P1737">command_add:</text:p>
      <text:p text:style-name="P1738">mov rax,[rbp]</text:p>
      <text:p text:style-name="P1739">sub rbp,8</text:p>
      <text:p text:style-name="P1740">add [rbp],rax</text:p>
      <text:p text:style-name="P1741">jmp usearg</text:p>
      <text:p text:style-name="P1742"/>
      <text:p text:style-name="P1743">command_sub:</text:p>
      <text:p text:style-name="P1744">mov rax,[rbp]</text:p>
      <text:p text:style-name="P1745">sub rbp,8</text:p>
      <text:p text:style-name="P1746">sub [rbp],rax</text:p>
      <text:p text:style-name="P1747">jmp usearg</text:p>
      <text:p text:style-name="P1748"/>
      <text:p text:style-name="P1749">command_mul:</text:p>
      <text:p text:style-name="P1750">mov rbx,[rbp]</text:p>
      <text:p text:style-name="P1751">sub rbp,8</text:p>
      <text:p text:style-name="P1752">mov rax,[rbp]</text:p>
      <text:p text:style-name="P1753">mov rdx,0 <text:s text:c="4"/>;zero rdx before multiply</text:p>
      <text:p text:style-name="P1754">mul rbx <text:s text:c="6"/>;multiply rax with value in rbx</text:p>
      <text:p text:style-name="P1755">mov [rbp],rax</text:p>
      <text:p text:style-name="P1756">jmp usearg</text:p>
      <text:p text:style-name="P1757"/>
      <text:p text:style-name="P1758">command_div:</text:p>
      <text:p text:style-name="P1759">mov rbx,[rbp]</text:p>
      <text:p text:style-name="P1760">sub rbp,8</text:p>
      <text:p text:style-name="P1761">mov rax,[rbp]</text:p>
      <text:p text:style-name="P1762">mov rdx,0 ;zero rdx before divide</text:p>
      <text:p text:style-name="P1763">div rbx <text:s text:c="2"/>;divide rax with value in rbx</text:p>
      <text:p text:style-name="P1764">mov [rbp],rax ;store quotient on stack</text:p>
      <text:p text:style-name="P1765">jmp usearg</text:p>
      <text:p text:style-name="P1766"/>
      <text:p text:style-name="P1767">command_rem:</text:p>
      <text:p text:style-name="P1768">mov rbx,[rbp]</text:p>
      <text:p text:style-name="P1769">sub rbp,8</text:p>
      <text:p text:style-name="P1770">mov rax,[rbp]</text:p>
      <text:p text:style-name="P1771">mov rdx,0 ;zero rdx before divide</text:p>
      <text:p text:style-name="P1772">div rbx <text:s text:c="2"/>;divide rax with value in rbx</text:p>
      <text:p text:style-name="P1773">mov [rbp],rdx ;store remainder on stack</text:p>
      <text:p text:style-name="P1774">jmp usearg</text:p>
      <text:p text:style-name="P1775"/>
      <text:p text:style-name="P1776">usearg_end:</text:p>
      <text:p text:style-name="P1777"/>
      <text:p text:style-name="P1778">putstack:</text:p>
      <text:p text:style-name="P1779">cmp rbp,chastack ;is rbp equal to the address of stack start?</text:p>
      <text:p text:style-name="P1780">jz putstack_end <text:s text:c="1"/>;if it is, end the putstack loop</text:p>
      <text:p text:style-name="P1781"/>
      <text:p text:style-name="P1782">mov rax,[rbp]</text:p>
      <text:p text:style-name="P1783">sub rbp,8</text:p>
      <text:p text:style-name="P1784"/>
      <text:p text:style-name="P1785">call putint_and_line</text:p>
      <text:p text:style-name="P1786"/>
      <text:p text:style-name="P1787">jmp putstack</text:p>
      <text:p text:style-name="P1788">putstack_end:</text:p>
      <text:p text:style-name="P1789"/>
      <text:p text:style-name="P1790">mov rax,0x3C <text:s text:c="4"/>;exit (kernel opcode 0x3C on 64 bit systems) (60 decimal)</text:p>
      <text:p text:style-name="P1791">mov rdi,0 <text:s text:c="7"/>;return 0 status on exit - 'No Errors'</text:p>
      <text:p text:style-name="P1792">syscall <text:s text:c="9"/>;system call for 64-bit Linux kernel</text:p>
      <text:p text:style-name="P1793"/>
      <text:p text:style-name="P1794">argc dq 0</text:p>
      <text:p text:style-name="P1795"/>
      <text:p text:style-name="P1796">string_err db 'Error: invalid number or command: ',0 ;Generic error message</text:p>
      <text:p text:style-name="P1797">string_add db 'add',0</text:p>
      <text:p text:style-name="P1798">string_sub db 'sub',0</text:p>
      <text:p text:style-name="P1799">string_mul db 'mul',0</text:p>
      <text:p text:style-name="P1800">string_div db 'div',0</text:p>
      <text:p text:style-name="P1801">string_rem db 'rem',0</text:p>
      <text:p text:style-name="P1802"/>
      <text:p text:style-name="P1803">string_help db 'chastack is a stack based command line calculator',0xA</text:p>
      <text:p text:style-name="P1804"><text:s text:c="12"/>db 'Numbers are pushed on the stack and commands can do math.',0xA</text:p>
      <text:p text:style-name="P1805"><text:s text:c="12"/>db 'Commands are add,sub,mul,div,rem',0xA</text:p>
      <text:p text:style-name="P1806"><text:s text:c="12"/>db 'Example: "chastack 3 4 5 add mul"',0xA,0,0</text:p>
      <text:p text:style-name="P1807"/>
      <text:p text:style-name="P1808">;strcmp compares the string at rsi to the one at rdi</text:p>
      <text:p text:style-name="P1809">;rax returns 0 if the strings are the same and 1 if different</text:p>
      <text:p text:style-name="P1810">;the algorithm is simple but I will explain it for those who are confused</text:p>
      <text:p text:style-name="P1811"/>
      <text:p text:style-name="P1812">;rax is initialized to zero</text:p>
      <text:p text:style-name="P1813">;a byte from each string is loaded into the al and bl registers</text:p>
      <text:p text:style-name="P1814">;the bytes are compared. if they are different, then we jump to the end</text:p>
      <text:p text:style-name="P1815">;However, if they are the same, then we check if one of them is zero</text:p>
      <text:p text:style-name="P1816">;for this purpose it doesn't matter whether we compare al or bl with zero</text:p>
      <text:p text:style-name="P1817">;because it is known that they are the same if the jnz did not take place</text:p>
      <text:p text:style-name="P1818">;if it is zero, this also jumps to the end of the function</text:p>
      <text:p text:style-name="P1819">;If neither jump took place, then we jump to the start of the loop</text:p>
      <text:p text:style-name="P1820">;but when the function finally ends bl will be subtracted from al</text:p>
      <text:p text:style-name="P1821">;this ensures that the function returns zero if the final characters are the same</text:p>
      <text:p text:style-name="P1822">;rbx,rsi,and rdi are preserved but rax is the return value</text:p>
      <text:p text:style-name="P1823">;also, the sub instruction at the end of the function also updates the flags</text:p>
      <text:p text:style-name="P1824">;so you can "jz" or "jnz" to a label after calling this function based on results</text:p>
      <text:p text:style-name="P1825"/>
      <text:p text:style-name="P1826">strcmp:</text:p>
      <text:p text:style-name="P1827"/>
      <text:p text:style-name="P1828">push rbx</text:p>
      <text:p text:style-name="P1829">push rsi</text:p>
      <text:p text:style-name="P1830">push rdi</text:p>
      <text:p text:style-name="P1831"/>
      <text:p text:style-name="P1832">mov rax,0</text:p>
      <text:p text:style-name="P1833"/>
      <text:p text:style-name="P1834">strcmp_start:</text:p>
      <text:p text:style-name="P1835"/>
      <text:p text:style-name="P1836">;read a byte from each string</text:p>
      <text:p text:style-name="P1837">mov al,[rdi]</text:p>
      <text:p text:style-name="P1838">mov bl,[rsi]</text:p>
      <text:p text:style-name="P1839">cmp al,bl</text:p>
      <text:p text:style-name="P1840">jnz strcmp_end</text:p>
      <text:p text:style-name="P1841"/>
      <text:p text:style-name="P1842">cmp al,0</text:p>
      <text:p text:style-name="P1843">jz strcmp_end</text:p>
      <text:p text:style-name="P1844"/>
      <text:p text:style-name="P1845">inc rdi</text:p>
      <text:p text:style-name="P1846">inc rsi</text:p>
      <text:p text:style-name="P1847"/>
      <text:p text:style-name="P1848">jmp strcmp_start</text:p>
      <text:p text:style-name="P1849"/>
      <text:p text:style-name="P1850">strcmp_end:</text:p>
      <text:p text:style-name="P1851">sub al,bl</text:p>
      <text:p text:style-name="P1852"/>
      <text:p text:style-name="P1853">pop rdi</text:p>
      <text:p text:style-name="P1854">pop rsi</text:p>
      <text:p text:style-name="P1855">pop rbx</text:p>
      <text:p text:style-name="P1856"/>
      <text:p text:style-name="P1857">ret</text:p>
      <text:p text:style-name="P1858"/>
      <text:p text:style-name="P1859">;because the actual hardware stack is used to process the command line arguments.</text:p>
      <text:p text:style-name="P1860">;I allocate memory for a virtual stack that we can index as if it was the real stack</text:p>
      <text:p text:style-name="P1861">;I name it "chastack" for Chastity's stack.</text:p>
      <text:p text:style-name="P1862"/>
      <text:p text:style-name="P1863">db 6 dup 0 ;extra padding bytes</text:p>
      <text:p text:style-name="P1864">chastack: rq 0x100</text:p>
      <text:h text:style-name="Heading_20_2" text:outline-level="2"><text:bookmark-start text:name="chastelib64.asm"/>chastelib64.asm<text:bookmark-end text:name="chastelib64.asm"/></text:h>
      <text:p text:style-name="P1865">; chastelib assembly header file for 64 bit Linux</text:p>
      <text:p text:style-name="P1866">; This file is where I keep the source of my most important Assembly functions</text:p>
      <text:p text:style-name="P1867">; These are my string and integer output and conversion routines.</text:p>
      <text:p text:style-name="P1868"/>
      <text:p text:style-name="P1869">; To simplify documentation. The Accumulator/Arithmetic register</text:p>
      <text:p text:style-name="P1870">; (ax,eax,rax) depending on bit size shall be referred to as register A</text:p>
      <text:p text:style-name="P1871">; for the description of these core functions because the A register</text:p>
      <text:p text:style-name="P1872">; is treated special both by the Intel company and my code;</text:p>
      <text:p text:style-name="P1873"/>
      <text:p text:style-name="P1874">; putstring; Prints a zero terminated string from the address pointer to by A register.</text:p>
      <text:p text:style-name="P1875">; intstr; <text:s text:c="3"/>Converts the number in A into a zero terminated string and points A to that address</text:p>
      <text:p text:style-name="P1876">; putint; <text:s text:c="3"/>Prints the integer in A by calling intstr and then putstring.</text:p>
      <text:p text:style-name="P1877">; strint; <text:s text:c="3"/>Converts the zero terminated string into an integer and sets A to that value</text:p>
      <text:p text:style-name="P1878"><text:s text:c="3"/></text:p>
      <text:p text:style-name="P1879">; Now, the source of the functions begins, with comments included for parts that I felt needed explanation.</text:p>
      <text:p text:style-name="P1880"/>
      <text:p text:style-name="P1881">putstring:</text:p>
      <text:p text:style-name="P1882"/>
      <text:p text:style-name="P1883">push rax</text:p>
      <text:p text:style-name="P1884">push rbx</text:p>
      <text:p text:style-name="P1885">push rcx</text:p>
      <text:p text:style-name="P1886">push rdx</text:p>
      <text:p text:style-name="P1887"/>
      <text:p text:style-name="P1888">mov rbx,rax <text:s text:c="12"/>;copy eax to ebx to be used as index to the string</text:p>
      <text:p text:style-name="P1889"/>
      <text:p text:style-name="P1890">putstring_strlen_start: ;this loop finds the length of the string as part of the putstring function</text:p>
      <text:p text:style-name="P1891"/>
      <text:p text:style-name="P1892">cmp [rbx],byte 0 <text:s text:c="7"/>;compare byte at address rbx with 0</text:p>
      <text:p text:style-name="P1893">jz putstring_strlen_end ;if comparison was zero, jump to loop end because we have found the length</text:p>
      <text:p text:style-name="P1894">inc rbx</text:p>
      <text:p text:style-name="P1895">jmp putstring_strlen_start</text:p>
      <text:p text:style-name="P1896"/>
      <text:p text:style-name="P1897">putstring_strlen_end:</text:p>
      <text:p text:style-name="P1898">sub rbx,rax ;subtract start pointer from current pointer to get length of string</text:p>
      <text:p text:style-name="P1899"/>
      <text:p text:style-name="P1900">;Write string using Linux Write system call.</text:p>
      <text:p text:style-name="P1901">;Reference for 64 bit x86 syscalls is below.</text:p>
      <text:p text:style-name="P1902">;https://www.chromium.org/chromium-os/developer-library/reference/linux-constants/syscalls/#x86_64-64-bit</text:p>
      <text:p text:style-name="P1903"/>
      <text:p text:style-name="P1904">mov rdx,rbx <text:s text:c="5"/>;number of bytes to write</text:p>
      <text:p text:style-name="P1905">mov rsi,rax <text:s text:c="5"/>;pointer/address of string to write</text:p>
      <text:p text:style-name="P1906">mov rdi,1 <text:s text:c="7"/>;write to the STDOUT file</text:p>
      <text:p text:style-name="P1907">mov rax,1 <text:s text:c="7"/>;write (kernel opcode 1 on 64 bit systems)</text:p>
      <text:p text:style-name="P1908">syscall <text:s text:c="9"/>;system call for 64-bit Linux kernel</text:p>
      <text:p text:style-name="P1909"/>
      <text:p text:style-name="P1910">pop rdx</text:p>
      <text:p text:style-name="P1911">pop rcx</text:p>
      <text:p text:style-name="P1912">pop rbx</text:p>
      <text:p text:style-name="P1913">pop rax</text:p>
      <text:p text:style-name="P1914"/>
      <text:p text:style-name="P1915">ret ;this is the end of the putstring function return to calling location</text:p>
      <text:p text:style-name="P1916"/>
      <text:p text:style-name="P1917">; This is the location in memory where digits are written to by the intstr function</text:p>
      <text:p text:style-name="P1918">; The string of bytes and settings such as the radix and width are global variables defined below.</text:p>
      <text:p text:style-name="P1919"/>
      <text:p text:style-name="P1920">int_string db 64 dup '?' ;reserve bytes for characters string for 64-bit binary integer</text:p>
      <text:p text:style-name="P1921"/>
      <text:p text:style-name="P1922">int_string_end db 0 ;zero byte terminator for the integer string</text:p>
      <text:p text:style-name="P1923"/>
      <text:p text:style-name="P1924">radix dq 2 <text:s text:c="4"/>;radix or base for integer output. 2=binary, 8=octal, 10=decimal, 16=hexadecimal</text:p>
      <text:p text:style-name="P1925">int_width dq 8 ;default width of integers. Extra zeros prefixed if more than 1</text:p>
      <text:p text:style-name="P1926"/>
      <text:p text:style-name="P1927">;this function creates a string of the integer in rax</text:p>
      <text:p text:style-name="P1928">;it uses the above radix variable to determine base from 2 to 36</text:p>
      <text:p text:style-name="P1929">;it then loads rax with the address of the string</text:p>
      <text:p text:style-name="P1930">;this means that it can be used with the putstring function</text:p>
      <text:p text:style-name="P1931"/>
      <text:p text:style-name="P1932">intstr:</text:p>
      <text:p text:style-name="P1933"/>
      <text:p text:style-name="P1934">mov rbx,int_string_end-1 ;find address of lowest digit(just before the newline 0Ah)</text:p>
      <text:p text:style-name="P1935">mov rcx,1</text:p>
      <text:p text:style-name="P1936"/>
      <text:p text:style-name="P1937">digits_start:</text:p>
      <text:p text:style-name="P1938"/>
      <text:p text:style-name="P1939">mov rdx,0;</text:p>
      <text:p text:style-name="P1940">div qword [radix]</text:p>
      <text:p text:style-name="P1941">cmp rdx,10</text:p>
      <text:p text:style-name="P1942">jb decimal_digit</text:p>
      <text:p text:style-name="P1943">jnb hexadecimal_digit</text:p>
      <text:p text:style-name="P1944"/>
      <text:p text:style-name="P1945">decimal_digit: ;we go here if it is only a digit 0 to 9</text:p>
      <text:p text:style-name="P1946">add rdx,'0'</text:p>
      <text:p text:style-name="P1947">jmp save_digit</text:p>
      <text:p text:style-name="P1948"/>
      <text:p text:style-name="P1949">hexadecimal_digit:</text:p>
      <text:p text:style-name="P1950">sub rdx,10</text:p>
      <text:p text:style-name="P1951">add rdx,'A'</text:p>
      <text:p text:style-name="P1952"/>
      <text:p text:style-name="P1953">save_digit:</text:p>
      <text:p text:style-name="P1954"/>
      <text:p text:style-name="P1955">mov [rbx],dl</text:p>
      <text:p text:style-name="P1956">cmp rax,0</text:p>
      <text:p text:style-name="P1957">jz intstr_end</text:p>
      <text:p text:style-name="P1958">dec rbx</text:p>
      <text:p text:style-name="P1959">inc rcx</text:p>
      <text:p text:style-name="P1960">jmp digits_start</text:p>
      <text:p text:style-name="P1961"/>
      <text:p text:style-name="P1962">intstr_end:</text:p>
      <text:p text:style-name="P1963"/>
      <text:p text:style-name="P1964">prefix_zeros:</text:p>
      <text:p text:style-name="P1965">cmp rcx,[int_width]</text:p>
      <text:p text:style-name="P1966">jnb end_zeros</text:p>
      <text:p text:style-name="P1967">dec rbx</text:p>
      <text:p text:style-name="P1968">mov [rbx],byte '0'</text:p>
      <text:p text:style-name="P1969">inc rcx</text:p>
      <text:p text:style-name="P1970">jmp prefix_zeros</text:p>
      <text:p text:style-name="P1971">end_zeros:</text:p>
      <text:p text:style-name="P1972"/>
      <text:p text:style-name="P1973">mov rax,rbx ;point eax register to this string for putstring</text:p>
      <text:p text:style-name="P1974"/>
      <text:p text:style-name="P1975">ret</text:p>
      <text:p text:style-name="P1976"/>
      <text:p text:style-name="P1977">;function to print string form of whatever integer is in rax</text:p>
      <text:p text:style-name="P1978">;The radix determines which number base the string form takes.</text:p>
      <text:p text:style-name="P1979">;Anything from 2 to 36 is a valid radix</text:p>
      <text:p text:style-name="P1980">;in practice though, only bases 2,8,10,and 16 will make sense to other programmers</text:p>
      <text:p text:style-name="P1981">;this function does not process anything by itself but calls the combination of my other</text:p>
      <text:p text:style-name="P1982">;functions in the order I intended them to be used.</text:p>
      <text:p text:style-name="P1983"/>
      <text:p text:style-name="P1984">putint: </text:p>
      <text:p text:style-name="P1985"/>
      <text:p text:style-name="P1986">push rax</text:p>
      <text:p text:style-name="P1987">push rbx</text:p>
      <text:p text:style-name="P1988">push rcx</text:p>
      <text:p text:style-name="P1989">push rdx</text:p>
      <text:p text:style-name="P1990"/>
      <text:p text:style-name="P1991">call intstr</text:p>
      <text:p text:style-name="P1992">call putstring</text:p>
      <text:p text:style-name="P1993"/>
      <text:p text:style-name="P1994">pop rdx</text:p>
      <text:p text:style-name="P1995">pop rcx</text:p>
      <text:p text:style-name="P1996">pop rbx</text:p>
      <text:p text:style-name="P1997">pop rax</text:p>
      <text:p text:style-name="P1998"/>
      <text:p text:style-name="P1999">ret</text:p>
      <text:p text:style-name="P2000"/>
      <text:p text:style-name="P2001">;this function converts a string pointed to by rax into an integer returned in rax instead</text:p>
      <text:p text:style-name="P2002">;it is a little complicated because it has to account for whether the character in</text:p>
      <text:p text:style-name="P2003">;a string is a decimal digit 0 to 9, or an alphabet character for bases higher than ten</text:p>
      <text:p text:style-name="P2004">;it also checks for both uppercase and lowercase letters for bases 11 to 36</text:p>
      <text:p text:style-name="P2005">;finally, it checks if that letter makes sense for the base.</text:p>
      <text:p text:style-name="P2006">;For example, G to Z cannot be used in hexadecimal, only A to F can</text:p>
      <text:p text:style-name="P2007">;The purpose of writing this function was to be able to accept user input as integers</text:p>
      <text:p text:style-name="P2008">;This function is improved with error checking and uses the new strint_error variable</text:p>
      <text:p text:style-name="P2009">;The program can check this value after the call and see how many errors happened.</text:p>
      <text:p text:style-name="P2010"/>
      <text:p text:style-name="P2011">strint_error db 0 ;declare a byte variable that keeps track of errors</text:p>
      <text:p text:style-name="P2012"/>
      <text:p text:style-name="P2013">strint:</text:p>
      <text:p text:style-name="P2014"/>
      <text:p text:style-name="P2015">mov rbx,rax ;copy string address from rax to rbx because rax will be replaced soon!</text:p>
      <text:p text:style-name="P2016">mov rax,0</text:p>
      <text:p text:style-name="P2017">mov [strint_error],0 ;set errors to 0 at the start of this function</text:p>
      <text:p text:style-name="P2018"/>
      <text:p text:style-name="P2019">read_strint:</text:p>
      <text:p text:style-name="P2020">mov rcx,0 <text:s text:c="2"/>;zero rcx so only lower 8 bits are used</text:p>
      <text:p text:style-name="P2021">mov cl,[rbx]</text:p>
      <text:p text:style-name="P2022">inc rbx</text:p>
      <text:p text:style-name="P2023">cmp cl,0 <text:s text:c="3"/>;compare this byte with 0</text:p>
      <text:p text:style-name="P2024">jz strint_end ; if comparison was zero, this is the end of string</text:p>
      <text:p text:style-name="P2025"/>
      <text:p text:style-name="P2026">;if char is below '0' or above '9', it is outside the range of these and is not a digit</text:p>
      <text:p text:style-name="P2027">cmp cl,'0'</text:p>
      <text:p text:style-name="P2028">jb not_digit</text:p>
      <text:p text:style-name="P2029">cmp cl,'9'</text:p>
      <text:p text:style-name="P2030">ja not_digit</text:p>
      <text:p text:style-name="P2031"/>
      <text:p text:style-name="P2032">;but if it is a digit, then correct and process the character</text:p>
      <text:p text:style-name="P2033">is_digit:</text:p>
      <text:p text:style-name="P2034">sub cl,'0'</text:p>
      <text:p text:style-name="P2035">jmp process_char</text:p>
      <text:p text:style-name="P2036"/>
      <text:p text:style-name="P2037">not_digit:</text:p>
      <text:p text:style-name="P2038">;it isn't a decimal digit, but it could be perhaps an alphabet character</text:p>
      <text:p text:style-name="P2039">;which could be a digit in a higher base like hexadecimal</text:p>
      <text:p text:style-name="P2040">;we will check for that possibility next</text:p>
      <text:p text:style-name="P2041"/>
      <text:p text:style-name="P2042">;if char is below 'A' or above 'Z', it is outside the range of these and is not capital letter</text:p>
      <text:p text:style-name="P2043">cmp cl,'A'</text:p>
      <text:p text:style-name="P2044">jb not_upper</text:p>
      <text:p text:style-name="P2045">cmp cl,'Z'</text:p>
      <text:p text:style-name="P2046">ja not_upper</text:p>
      <text:p text:style-name="P2047"/>
      <text:p text:style-name="P2048">is_upper:</text:p>
      <text:p text:style-name="P2049">sub cl,'A'</text:p>
      <text:p text:style-name="P2050">add cl,10</text:p>
      <text:p text:style-name="P2051">jmp process_char</text:p>
      <text:p text:style-name="P2052"/>
      <text:p text:style-name="P2053">not_upper:</text:p>
      <text:p text:style-name="P2054"/>
      <text:p text:style-name="P2055">;if char is below 'a' or above 'z', it is outside the range of these and is not lowercase letter</text:p>
      <text:p text:style-name="P2056">cmp cl,'a'</text:p>
      <text:p text:style-name="P2057">jb not_lower</text:p>
      <text:p text:style-name="P2058">cmp cl,'z'</text:p>
      <text:p text:style-name="P2059">ja not_lower</text:p>
      <text:p text:style-name="P2060"/>
      <text:p text:style-name="P2061">is_lower:</text:p>
      <text:p text:style-name="P2062">sub cl,'a'</text:p>
      <text:p text:style-name="P2063">add cl,10</text:p>
      <text:p text:style-name="P2064">jmp process_char</text:p>
      <text:p text:style-name="P2065"/>
      <text:p text:style-name="P2066">not_lower:</text:p>
      <text:p text:style-name="P2067"/>
      <text:p text:style-name="P2068">;if we have reached this point, result invalid and end function with error</text:p>
      <text:p text:style-name="P2069">jmp strint_end_error</text:p>
      <text:p text:style-name="P2070"/>
      <text:p text:style-name="P2071">process_char:</text:p>
      <text:p text:style-name="P2072"/>
      <text:p text:style-name="P2073">cmp rcx,[radix] ;compare char with radix</text:p>
      <text:p text:style-name="P2074">jnb strint_end_error ;if this value is above or equal to radix, it is too high despite being a valid digit/alpha</text:p>
      <text:p text:style-name="P2075"/>
      <text:p text:style-name="P2076">mov rdx,0 ;zero rdx because it is used in mul sometimes</text:p>
      <text:p text:style-name="P2077">mul qword [radix] ;mul rax with radix</text:p>
      <text:p text:style-name="P2078">add rax,rcx</text:p>
      <text:p text:style-name="P2079"/>
      <text:p text:style-name="P2080">jmp read_strint ;jump back and continue the loop if nothing has exited it</text:p>
      <text:p text:style-name="P2081"/>
      <text:p text:style-name="P2082">strint_end_error: <text:s text:c="1"/>;we jump here if there was an error with one of the chars</text:p>
      <text:p text:style-name="P2083">inc [strint_error] ;increment error counter because char invalid</text:p>
      <text:p text:style-name="P2084"/>
      <text:p text:style-name="P2085">strint_end: ;we jump here when no errors happened</text:p>
      <text:p text:style-name="P2086"/>
      <text:p text:style-name="P2087">ret</text:p>
      <text:p text:style-name="P2088"/>
      <text:p text:style-name="P2089">;The utility functions below simply print a space or a newline.</text:p>
      <text:p text:style-name="P2090">;these help me save code when printing lots of strings and integers.</text:p>
      <text:p text:style-name="P2091"/>
      <text:p text:style-name="P2092">space db ' ',0 ;a string containing only a space</text:p>
      <text:p text:style-name="P2093"/>
      <text:p text:style-name="P2094">putspace:</text:p>
      <text:p text:style-name="P2095">push rax</text:p>
      <text:p text:style-name="P2096">mov rax,space</text:p>
      <text:p text:style-name="P2097">call putstring</text:p>
      <text:p text:style-name="P2098">pop rax</text:p>
      <text:p text:style-name="P2099">ret</text:p>
      <text:p text:style-name="P2100"/>
      <text:p text:style-name="P2101">line db 0Ah,0 ;a string containing only a newline</text:p>
      <text:p text:style-name="P2102"/>
      <text:p text:style-name="P2103">;the next function which pushes rax to the stack</text:p>
      <text:p text:style-name="P2104">;moves the address of the line string and prints it with putstring</text:p>
      <text:p text:style-name="P2105">;then it pops the original value of rax back from the stack before the function returns</text:p>
      <text:p text:style-name="P2106">;this allows me to print a newline anywhere in the code without a single register changing</text:p>
      <text:p text:style-name="P2107"/>
      <text:p text:style-name="P2108">putline:</text:p>
      <text:p text:style-name="P2109">push rax</text:p>
      <text:p text:style-name="P2110">mov rax,line</text:p>
      <text:p text:style-name="P2111">call putstring</text:p>
      <text:p text:style-name="P2112">pop rax</text:p>
      <text:p text:style-name="P2113">ret</text:p>
      <text:p text:style-name="P2114"/>
      <text:p text:style-name="P2115">;a function for printing a single character that is the value of al</text:p>
      <text:p text:style-name="P2116"/>
      <text:p text:style-name="P2117">char: db 0,0</text:p>
      <text:p text:style-name="P2118"/>
      <text:p text:style-name="P2119">putchar:</text:p>
      <text:p text:style-name="P2120">push rax</text:p>
      <text:p text:style-name="P2121">mov [char],al</text:p>
      <text:p text:style-name="P2122">mov rax,char</text:p>
      <text:p text:style-name="P2123">call putstring</text:p>
      <text:p text:style-name="P2124">pop rax</text:p>
      <text:p text:style-name="P2125">ret</text:p>
      <text:p text:style-name="P2126"/>
      <text:p text:style-name="P2127">;a small function just for the common operation of</text:p>
      <text:p text:style-name="P2128">;printing an integer followed by a space</text:p>
      <text:p text:style-name="P2129">;this saves a few bytes in the assembled code</text:p>
      <text:p text:style-name="P2130">;by reducing the number of function calls in the main program</text:p>
      <text:p text:style-name="P2131"/>
      <text:p text:style-name="P2132">putint_and_space:</text:p>
      <text:p text:style-name="P2133">call putint</text:p>
      <text:p text:style-name="P2134">call putspace</text:p>
      <text:p text:style-name="P2135">ret</text:p>
      <text:p text:style-name="P2136"/>
      <text:p text:style-name="P2137">;a small function just for the common operation of</text:p>
      <text:p text:style-name="P2138">;printing an integer followed by a line feed</text:p>
      <text:p text:style-name="P2139">;this saves a few bytes in the assembled code</text:p>
      <text:p text:style-name="P2140">;by reducing the number of function calls in the main program</text:p>
      <text:p text:style-name="P2141"/>
      <text:p text:style-name="P2142">putint_and_line:</text:p>
      <text:p text:style-name="P2143">call putint</text:p>
      <text:p text:style-name="P2144">call putline</text:p>
      <text:p text:style-name="P2145">ret</text:p>
      <text:p text:style-name="P2146"/>
      <text:p text:style-name="P2147">;a small function just for the common operation of</text:p>
      <text:p text:style-name="P2148">;printing a string followed by a line feed</text:p>
      <text:p text:style-name="P2149">;this saves a few bytes in the assembled code</text:p>
      <text:p text:style-name="P2150">;by reducing the number of function calls in the main program</text:p>
      <text:p text:style-name="P2151">;it also means we don't need to include a newline in every string!</text:p>
      <text:p text:style-name="P2152"/>
      <text:p text:style-name="P2153">putstr_and_line:</text:p>
      <text:p text:style-name="P2154">call putstring</text:p>
      <text:p text:style-name="P2155">call putline</text:p>
      <text:p text:style-name="P2156">ret</text:p>
      <text:h text:style-name="Heading_20_2" text:outline-level="2"><text:bookmark-start text:name="pros-and-cons-of-conversion-to-64-bits"/>Pros and Cons of Conversion to 64 Bits<text:bookmark-end text:name="pros-and-cons-of-conversion-to-64-bits"/></text:h>
      <text:p text:style-name="First_20_paragraph">Of all the programs I have written in Assembly, only chastack actually benefits from having an increased bit size for registers. This means larger numbers can be added, subtracted, multiplied, and divided.</text:p>
      <text:p text:style-name="Text_20_body">On the flip side, I have never converted this program to 16-bit DOS because doing so would reduce the capabilities of it to work with only 16-bit numbers. Since I have to run DOS in an emulator, I also don’t gain any convenience or speed. For the most part the 32 bit edition is more than I need.</text:p>
      <text:p text:style-name="Text_20_body">But this calculator was actually written as a teaching tool to help people learn that there are other ways of building a calculator. Stack based Reverse Polish Notation is the best way based on my experience.</text:p>
      <text:h text:style-name="Heading_20_1" text:outline-level="1"><text:bookmark-start text:name="chapter-12-the-lseek-system-call"/>Chapter 12: The Lseek System Call<text:bookmark-end text:name="chapter-12-the-lseek-system-call"/></text:h>
      <text:p text:style-name="First_20_paragraph">In the last chapter, I showed you tables of my favorite 6 system calls and the arguments that you need to put in which registers. However, of the 6 system calls, there is only one that has not been included in any program in this book so far.</text:p>
      <text:p text:style-name="Text_20_body">The “lseek” call is named as a short form of “long seek”. This is because it was a 32-bit upgrade from “seek” which took a 16 bit number as an offset to seek to.</text:p>
      <text:p text:style-name="Text_20_body">Anyway, the lseek function is the equivalent of a “goto” or “jmp”, except it moves the file pointer associated with a particular file descriptor. Whenever we have used the read or write system calls, the pointer automatically goes to the next position in the file after the data that was read or written.</text:p>
      <text:p text:style-name="Text_20_body">For example, if you were reading a file, you would open it and then the pointer would start at address 0. You would read bytes until the read call returned 0 in the eax register as the number of bytes read. If 0 bytes were read, you are at the end of the file.</text:p>
      <text:p text:style-name="Text_20_body">Similarly, if you were creating and writing to a new file, you would typically write to it starting at the beginning and then close it whenever you were done. The end of the file would be wherever you were when you stopped.</text:p>
      <text:p text:style-name="Text_20_body">For 95 percent of cases for reading or writing files, you go from address 0 to EOF (End Of File). In fact, this is the recommended way for most programs and naturally is the reason the file pointer is updated for you automatically.</text:p>
      <text:p text:style-name="Text_20_body">To understand some basic terminology, the words <text:span text:style-name="T1">pointer</text:span>, <text:span text:style-name="T1">address</text:span>, and <text:span text:style-name="T1">offset</text:span> all mean exactly the same thing. It just means a place in a file instead of memory in this specific context.</text:p>
      <text:p text:style-name="Text_20_body">Although the need for lseek is quite rare, there will be programs later in this book that can’t operate without it. That is why I will help you understand it with a basic example.</text:p>
      <text:p text:style-name="Text_20_body">First, create a small text file named “openthis.txt” by redirecting the output of the echo command, or just use your favorite text editor to write whatever you feel like!</text:p>
      <text:p text:style-name="P2157">echo "This is a normal file. Nothing suspicious at all." &gt; openthis.txt</text:p>
      <text:p text:style-name="First_20_paragraph">Now that we have a file to open, we can write a small program to open this file and change all lowercase letters into uppercase letters.</text:p>
      <text:h text:style-name="Heading_20_2" text:outline-level="2"><text:bookmark-start text:name="fasm-cat-upper"/>FASM cat upper<text:bookmark-end text:name="fasm-cat-upper"/></text:h>
      <text:p text:style-name="P2158">format ELF executable</text:p>
      <text:p text:style-name="P2159"/>
      <text:p text:style-name="P2160">main: <text:s text:c="18"/>;the main function of the assembly program</text:p>
      <text:p text:style-name="P2161"/>
      <text:p text:style-name="P2162">mov dword[radix],16 <text:s text:c="4"/>;I can choose the radix for integer output!</text:p>
      <text:p text:style-name="P2163">mov dword[int_width],1 <text:s text:c="1"/>;and the width of each integer for padded zeros</text:p>
      <text:p text:style-name="P2164"/>
      <text:p text:style-name="P2165">;Linux system call to open a file</text:p>
      <text:p text:style-name="P2166"/>
      <text:p text:style-name="P2167">mov ecx,2 <text:s text:c="10"/>;open file in read and write mode </text:p>
      <text:p text:style-name="P2168">mov ebx,filename <text:s text:c="3"/>;filename should be in eax before this function was called</text:p>
      <text:p text:style-name="P2169">mov eax,5 <text:s text:c="10"/>;invoke SYS_OPEN (kernel opcode 5)</text:p>
      <text:p text:style-name="P2170">int 80h <text:s text:c="12"/>;call the kernel</text:p>
      <text:p text:style-name="P2171"/>
      <text:p text:style-name="P2172">mov dword [fd],eax <text:s text:c="1"/>;save the file descriptor returned in eax</text:p>
      <text:p text:style-name="P2173"/>
      <text:p text:style-name="P2174">cmp eax,0</text:p>
      <text:p text:style-name="P2175">jns cat_upper ;if eax is not negative/signed there was no error</text:p>
      <text:p text:style-name="P2176"/>
      <text:p text:style-name="P2177">;Otherwise, if it was signed/negative, display an error message.</text:p>
      <text:p text:style-name="P2178"/>
      <text:p text:style-name="P2179">neg eax <text:s text:c="16"/>;turn the negative in eax positive</text:p>
      <text:p text:style-name="P2180">call putint_and_space <text:s text:c="2"/>;print the number in eax (error code) and space</text:p>
      <text:p text:style-name="P2181">mov eax,open_error <text:s text:c="5"/>;get the error message I defined</text:p>
      <text:p text:style-name="P2182">call putstr_and_line <text:s text:c="3"/>;print the error message and newline</text:p>
      <text:p text:style-name="P2183"/>
      <text:p text:style-name="P2184">jmp main_end <text:s text:c="7"/>;end the program because we can't open the file</text:p>
      <text:p text:style-name="P2185"/>
      <text:p text:style-name="P2186">cat_upper:</text:p>
      <text:p text:style-name="P2187"/>
      <text:p text:style-name="P2188">;use the read call to read 1 byte from the file</text:p>
      <text:p text:style-name="P2189"/>
      <text:p text:style-name="P2190">mov eax,3 <text:s text:c="10"/>;invoke SYS_READ (kernel opcode 3)</text:p>
      <text:p text:style-name="P2191">mov ebx,[fd] <text:s text:c="7"/>;move the opened file descriptor into ebx</text:p>
      <text:p text:style-name="P2192">mov ecx,buf <text:s text:c="8"/>;address to store the byte</text:p>
      <text:p text:style-name="P2193">mov edx,1 <text:s text:c="10"/>;number of bytes to read</text:p>
      <text:p text:style-name="P2194">int 80h <text:s text:c="12"/>;call the kernel</text:p>
      <text:p text:style-name="P2195"/>
      <text:p text:style-name="P2196">cmp eax,0 <text:s text:c="10"/>;were zero bytes read?</text:p>
      <text:p text:style-name="P2197">jz cat_upper_end <text:s text:c="3"/>;if yes, then end the loop</text:p>
      <text:p text:style-name="P2198"/>
      <text:p text:style-name="P2199">;otherwise we assume 1 byte was read like we requested</text:p>
      <text:p text:style-name="P2200">;we print it to standard output so we can see what was in the file</text:p>
      <text:p text:style-name="P2201">;ecx and edx remain the same as in the read call above</text:p>
      <text:p text:style-name="P2202"/>
      <text:p text:style-name="P2203">mov eax,4 <text:s text:c="10"/>;invoke SYS_WRITE (kernel opcode 4 on 32 bit systems)</text:p>
      <text:p text:style-name="P2204">mov ebx,1 <text:s text:c="10"/>;write to stdout</text:p>
      <text:p text:style-name="P2205">int 80h <text:s text:c="12"/>;call the kernel</text:p>
      <text:p text:style-name="P2206"/>
      <text:p text:style-name="P2207">mov al,[buf] <text:s text:c="7"/>;move the byte we just read and wrote to al register</text:p>
      <text:p text:style-name="P2208"/>
      <text:p text:style-name="P2209">;if char is below 'a' or above 'z', it is not a lowercase letter</text:p>
      <text:p text:style-name="P2210">;if outside this range, we skip to the "al_is_not_lower" label</text:p>
      <text:p text:style-name="P2211"/>
      <text:p text:style-name="P2212">cmp al,'a'</text:p>
      <text:p text:style-name="P2213">jb al_is_not_lower</text:p>
      <text:p text:style-name="P2214">cmp al,'z'</text:p>
      <text:p text:style-name="P2215">ja al_is_not_lower</text:p>
      <text:p text:style-name="P2216"/>
      <text:p text:style-name="P2217">;otherwise, the al register contains a lowercase letter</text:p>
      <text:p text:style-name="P2218">;we will convert it to an uppercase letter with this formula</text:p>
      <text:p text:style-name="P2219">;and send it back to [buf]</text:p>
      <text:p text:style-name="P2220"/>
      <text:p text:style-name="P2221">sub al,'a'</text:p>
      <text:p text:style-name="P2222">add al,'A'</text:p>
      <text:p text:style-name="P2223">mov [buf],al</text:p>
      <text:p text:style-name="P2224"/>
      <text:p text:style-name="P2225">;next, we use an lseek call to go back to the offset we were at</text:p>
      <text:p text:style-name="P2226">;before we read the character in the first place</text:p>
      <text:p text:style-name="P2227"/>
      <text:p text:style-name="P2228">mov eax,19 <text:s text:c="9"/>;invoke SYS_LSEEK (kernel opcode 19)</text:p>
      <text:p text:style-name="P2229">mov ebx,[fd] <text:s text:c="7"/>;move the opened file descriptor into ebx</text:p>
      <text:p text:style-name="P2230">mov ecx,[offset] <text:s text:c="3"/>;move the file cursor to this address</text:p>
      <text:p text:style-name="P2231">mov edx,0 <text:s text:c="10"/>;whence argument (SEEK_SET)</text:p>
      <text:p text:style-name="P2232">int 80h <text:s text:c="12"/>;call the kernel</text:p>
      <text:p text:style-name="P2233"/>
      <text:p text:style-name="P2234">;and then we write the uppercase letter at the same place</text:p>
      <text:p text:style-name="P2235">;where it was a lowercase in the file!</text:p>
      <text:p text:style-name="P2236"/>
      <text:p text:style-name="P2237">mov eax,4 <text:s text:c="10"/>;invoke SYS_WRITE (kernel opcode 4 on 32 bit systems)</text:p>
      <text:p text:style-name="P2238">mov ebx,[fd] <text:s text:c="7"/>;move the opened file descriptor into ebx</text:p>
      <text:p text:style-name="P2239">mov ecx,buf <text:s text:c="8"/>;address to store the byte</text:p>
      <text:p text:style-name="P2240">mov edx,1 <text:s text:c="10"/>;number of bytes to write</text:p>
      <text:p text:style-name="P2241">int 80h <text:s text:c="12"/>;call the kernel</text:p>
      <text:p text:style-name="P2242"/>
      <text:p text:style-name="P2243">al_is_not_lower:</text:p>
      <text:p text:style-name="P2244"/>
      <text:p text:style-name="P2245">inc dword[offset] <text:s text:c="2"/>;increment offset</text:p>
      <text:p text:style-name="P2246"/>
      <text:p text:style-name="P2247">jmp cat_upper</text:p>
      <text:p text:style-name="P2248"/>
      <text:p text:style-name="P2249">cat_upper_end:</text:p>
      <text:p text:style-name="P2250"/>
      <text:p text:style-name="P2251">mov ebx,[fd] <text:s text:c="3"/>;file number to close</text:p>
      <text:p text:style-name="P2252">mov eax,6 <text:s text:c="6"/>;invoke SYS_CLOSE (kernel opcode 6)</text:p>
      <text:p text:style-name="P2253">int 80h <text:s text:c="8"/>;call the kernel</text:p>
      <text:p text:style-name="P2254"/>
      <text:p text:style-name="P2255">main_end:</text:p>
      <text:p text:style-name="P2256"/>
      <text:p text:style-name="P2257">mov eax,1 <text:s text:c="6"/>;exit (kernel opcode 1 on 32 bit systems)</text:p>
      <text:p text:style-name="P2258">mov ebx,0 <text:s text:c="6"/>;return 0 status on exit - 'No Errors'</text:p>
      <text:p text:style-name="P2259">int 80h <text:s text:c="8"/>;system call for 32-bit Linux kernel</text:p>
      <text:p text:style-name="P2260"/>
      <text:p text:style-name="P2261">include 'chastelib32.asm'</text:p>
      <text:p text:style-name="P2262"/>
      <text:p text:style-name="P2263">filename db 'openthis.txt',0 ;name of the file</text:p>
      <text:p text:style-name="P2264">fd dd 0 <text:s text:c="21"/>;a place for the file descriptor</text:p>
      <text:p text:style-name="P2265">buf db 0 <text:s text:c="20"/>;a buffer containing 1 byte</text:p>
      <text:p text:style-name="P2266">offset dd 0 <text:s text:c="17"/>;offset to be used in lseek</text:p>
      <text:p text:style-name="P2267"/>
      <text:p text:style-name="P2268">open_error db 'error opening file',0</text:p>
      <text:p text:style-name="First_20_paragraph">The special thing about this program is that it displays what the file originally contained on the first run before it was changed. Each time after that, the result will be different because it rewrites the file. Here are the result on my machine.</text:p>
      <text:p text:style-name="P2269">$ fasm main.asm</text:p>
      <text:p text:style-name="P2270">flat assembler <text:s text:c="1"/>version 1.73.30 <text:s text:c="1"/>(16384 kilobytes memory)</text:p>
      <text:p text:style-name="P2271">3 passes, 695 bytes.</text:p>
      <text:p text:style-name="P2272">$ chmod +x main</text:p>
      <text:p text:style-name="P2273">$ ./main</text:p>
      <text:p text:style-name="P2274">This is a normal file. Nothing suspicious at all.</text:p>
      <text:p text:style-name="P2275">$ ./main</text:p>
      <text:p text:style-name="P2276">THIS IS A NORMAL FILE. NOTHING SUSPICIOUS AT ALL.</text:p>
      <text:h text:style-name="Heading_20_2" text:outline-level="2"><text:bookmark-start text:name="how-it-works"/>How it works<text:bookmark-end text:name="how-it-works"/></text:h>
      <text:p text:style-name="First_20_paragraph">The open,close,read,write, and exit calls have been used before, but the key element that this program requires as the final piece is the lseek call. Here is that section again:</text:p>
      <text:p text:style-name="P2277">mov eax,19 <text:s text:c="9"/>;invoke SYS_LSEEK (kernel opcode 19)</text:p>
      <text:p text:style-name="P2278">mov ebx,[fd] <text:s text:c="7"/>;move the opened file descriptor into ebx</text:p>
      <text:p text:style-name="P2279">mov ecx,[offset] <text:s text:c="3"/>;move the file cursor to this address</text:p>
      <text:p text:style-name="P2280">mov edx,0 <text:s text:c="10"/>;whence argument (SEEK_SET)</text:p>
      <text:p text:style-name="P2281">int 80h <text:s text:c="12"/>;call the kernel</text:p>
      <text:list text:style-name="L14">
        <text:list-item>
          <text:p text:style-name="P2282">19 is the call number as you can see in the <text:a xlink:type="simple" xlink:href="#bit-intel-system-calls-for-linux" office:name=""><text:span text:style-name="Definition">32-bit system call table</text:span></text:a></text:p>
        </text:list-item>
        <text:list-item>
          <text:p text:style-name="P2282">fd is the file descriptor of the open file</text:p>
        </text:list-item>
        <text:list-item>
          <text:p text:style-name="P2282">offset is a variable we use to keep the address we will read next</text:p>
        </text:list-item>
        <text:list-item>
          <text:p text:style-name="P2282">0 is the whence argument, which means that we will go to offset bytes from the beginning of the file</text:p>
        </text:list-item>
      </text:list>
      <text:p text:style-name="First_20_paragraph">I always used 0 as the whence argument because I like absolute addresses rather than relative. The offset variable is always incremented during this loop.</text:p>
      <text:p text:style-name="P2283">inc dword[offset] <text:s text:c="2"/>;increment offset</text:p>
      <text:p text:style-name="First_20_paragraph">However, the offset is not used until the program detects that a character is in the lowercase range from ‘a’ to ‘z’. Only then does the lseek call happen so we can go backwards to the address where the byte came from in the file. Otherwise, it is skipped but the file pointer is automatically incremented when the read call reads exactly 1 byte.</text:p>
      <text:h text:style-name="Heading_20_2" text:outline-level="2"><text:bookmark-start text:name="file-open-modes-and-security"/>File Open Modes and Security<text:bookmark-end text:name="file-open-modes-and-security"/></text:h>
      <text:p text:style-name="First_20_paragraph">But another thing that matters is that we passed 2 as the flags for the open call. This mode means that we opened the file to allow for reading and writing. The simple fact is that you can open all files this way if you wish. However, it might be recommended to use 0 instead for programs that only read files. There are two main reasons for this.</text:p>
      <text:list text:style-name="L15">
        <text:list-item>
          <text:p text:style-name="P2284">To prevent accidentally writing to files that you did not mean to change.</text:p>
        </text:list-item>
        <text:list-item>
          <text:p text:style-name="P2284">The open call will complete fail if you have read permission but not write permission yet try to open it for both reading and writing.</text:p>
        </text:list-item>
      </text:list>
      <text:p text:style-name="First_20_paragraph">There are two more programs that will use the lseek call in this book. Starting in the next chapter, I will show you a program that only reads a file and yet still requires the lseek call because it needs to go backwards sometimes. This chapter was meant to introduce lseek so you won’t be as confused when you see it used in a larger program.</text:p>
      <text:h text:style-name="Heading_20_1" text:outline-level="1"><text:bookmark-start text:name="chapter-13-chastext"/>Chapter 13 chastext<text:bookmark-end text:name="chapter-13-chastext"/></text:h>
      <text:p text:style-name="First_20_paragraph">The chastext program is a basic find and replace program. Nearly every text editor has the ability to find a string and replace all occurrences of it. This feature is so useful that most of us take it for granted and don’t appreciate how this works from a programming perspective.</text:p>
      <text:h text:style-name="Heading_20_2" text:outline-level="2"><text:bookmark-start text:name="fasm-chastext"/>FASM chastext<text:bookmark-end text:name="fasm-chastext"/></text:h>
      <text:p text:style-name="P2285">;Linux 32-bit Assembly Source for chastext</text:p>
      <text:p text:style-name="P2286">;a basic text search and replace program</text:p>
      <text:p text:style-name="P2287">format ELF executable</text:p>
      <text:p text:style-name="P2288">entry main</text:p>
      <text:p text:style-name="P2289"/>
      <text:p text:style-name="P2290">include 'chastelib32.asm'</text:p>
      <text:p text:style-name="P2291"/>
      <text:p text:style-name="P2292">main:</text:p>
      <text:p text:style-name="P2293"/>
      <text:p text:style-name="P2294">pop eax</text:p>
      <text:p text:style-name="P2295">mov [argc],eax <text:s text:c="1"/>;save the argument count for later</text:p>
      <text:p text:style-name="P2296"/>
      <text:p text:style-name="P2297">cmp dword [argc],1</text:p>
      <text:p text:style-name="P2298">ja help_skip <text:s text:c="3"/>;if more than 1 argument is given, skip the help message and process the other arguments</text:p>
      <text:p text:style-name="P2299"/>
      <text:p text:style-name="P2300">help:</text:p>
      <text:p text:style-name="P2301">mov eax,help_message</text:p>
      <text:p text:style-name="P2302">call putstring</text:p>
      <text:p text:style-name="P2303">jmp main_end</text:p>
      <text:p text:style-name="P2304">help_skip:</text:p>
      <text:p text:style-name="P2305"/>
      <text:p text:style-name="P2306">pop eax <text:s text:c="8"/>;pop the next arg which is the name of the program we are running</text:p>
      <text:p text:style-name="P2307"/>
      <text:p text:style-name="P2308">get_filename:</text:p>
      <text:p text:style-name="P2309">pop eax <text:s text:c="8"/>;pop the next arg which is the name of the file we will open</text:p>
      <text:p text:style-name="P2310"/>
      <text:p text:style-name="P2311">mov [filename],eax <text:s text:c="1"/>; save the name of the file we will open to read</text:p>
      <text:p text:style-name="P2312"/>
      <text:p text:style-name="P2313">arg_open_file:</text:p>
      <text:p text:style-name="P2314"/>
      <text:p text:style-name="P2315">;Linux system call to open a file</text:p>
      <text:p text:style-name="P2316"/>
      <text:p text:style-name="P2317">mov ecx,0 <text:s text:c="6"/>;open file in read only mode</text:p>
      <text:p text:style-name="P2318">mov ebx,eax <text:s text:c="4"/>;filename should be in eax before this function was called</text:p>
      <text:p text:style-name="P2319">mov eax,5 <text:s text:c="6"/>;invoke SYS_OPEN (kernel opcode 5)</text:p>
      <text:p text:style-name="P2320">int 80h <text:s text:c="8"/>;call the kernel</text:p>
      <text:p text:style-name="P2321"/>
      <text:p text:style-name="P2322">cmp eax,0</text:p>
      <text:p text:style-name="P2323">jns file_open_no_errors ;if eax is not negative/signed there was no error</text:p>
      <text:p text:style-name="P2324"/>
      <text:p text:style-name="P2325">;Otherwise, if it was signed, then this code will display an error message.</text:p>
      <text:p text:style-name="P2326"/>
      <text:p text:style-name="P2327">mov eax,open_error_message</text:p>
      <text:p text:style-name="P2328">call putstr_and_line</text:p>
      <text:p text:style-name="P2329"/>
      <text:p text:style-name="P2330">jmp main_end ;end the program because we failed at opening the file</text:p>
      <text:p text:style-name="P2331"/>
      <text:p text:style-name="P2332">file_open_no_errors:</text:p>
      <text:p text:style-name="P2333"/>
      <text:p text:style-name="P2334">mov [fd],eax <text:s text:c="3"/>;save the file descriptor number for later use</text:p>
      <text:p text:style-name="P2335"/>
      <text:p text:style-name="P2336">;before we just textdump or "cat" the file, we need to check for the existence of more arguments which will modify the output</text:p>
      <text:p text:style-name="P2337"/>
      <text:p text:style-name="P2338">cmp dword[argc],3</text:p>
      <text:p text:style-name="P2339">jb search_skip</text:p>
      <text:p text:style-name="P2340"/>
      <text:p text:style-name="P2341">pop eax ;pop the next arg which is the string we are searching for</text:p>
      <text:p text:style-name="P2342">mov [string_search],eax</text:p>
      <text:p text:style-name="P2343"/>
      <text:p text:style-name="P2344">search_skip:</text:p>
      <text:p text:style-name="P2345"/>
      <text:p text:style-name="P2346">cmp dword[argc],4</text:p>
      <text:p text:style-name="P2347">jb replace_skip</text:p>
      <text:p text:style-name="P2348"/>
      <text:p text:style-name="P2349">pop eax ;pop the next arg which is the string we are searching for</text:p>
      <text:p text:style-name="P2350">mov [string_replace],eax</text:p>
      <text:p text:style-name="P2351"/>
      <text:p text:style-name="P2352">replace_skip:</text:p>
      <text:p text:style-name="P2353"/>
      <text:p text:style-name="P2354">;now we begin displaying the file but also searching for the search string if it exists. We will check for these based on the number of arguments like we did earlier</text:p>
      <text:p text:style-name="P2355"/>
      <text:p text:style-name="P2356">textdump:</text:p>
      <text:p text:style-name="P2357"/>
      <text:p text:style-name="P2358">;if only there are only 2 arguments (name of program plus input file)</text:p>
      <text:p text:style-name="P2359">;then we do a loop that ignores searching and replacing</text:p>
      <text:p text:style-name="P2360">;this loop will read one character from the file and then send it to stdout</text:p>
      <text:p text:style-name="P2361">;until there are no more bytes to display</text:p>
      <text:p text:style-name="P2362">;but if there are above 2 arguments, we skip this loop and go to search mode</text:p>
      <text:p text:style-name="P2363"/>
      <text:p text:style-name="P2364">cmp dword[argc],2 ;test arguments 2=only filename given</text:p>
      <text:p text:style-name="P2365">ja search_mode <text:s text:c="3"/>;but if above 2, then go to search mode because a search string was given</text:p>
      <text:p text:style-name="P2366"/>
      <text:p text:style-name="P2367">;This loop is the same as the Linux 'cat' command</text:p>
      <text:p text:style-name="P2368">;or the DOS 'type' command for a single file</text:p>
      <text:p text:style-name="P2369">;it will read one byte and echo it to standard output until EOF</text:p>
      <text:p text:style-name="P2370"/>
      <text:p text:style-name="P2371">cat:</text:p>
      <text:p text:style-name="P2372"/>
      <text:p text:style-name="P2373">mov edx,1 <text:s text:c="10"/>;number of bytes to read</text:p>
      <text:p text:style-name="P2374">mov ecx,buf <text:s text:c="8"/>;address to store the bytes</text:p>
      <text:p text:style-name="P2375">mov ebx,[fd] <text:s text:c="7"/>;move the opened file descriptor into EBX</text:p>
      <text:p text:style-name="P2376">mov eax,3 <text:s text:c="10"/>;invoke SYS_READ (kernel opcode 3 on 32 bit systems)</text:p>
      <text:p text:style-name="P2377">int 80h <text:s text:c="12"/>;call the kernel</text:p>
      <text:p text:style-name="P2378"/>
      <text:p text:style-name="P2379">mov [count],eax</text:p>
      <text:p text:style-name="P2380"/>
      <text:p text:style-name="P2381">cmp eax,0</text:p>
      <text:p text:style-name="P2382">jnz file_success <text:s text:c="3"/>;if more than zero bytes read, proceed to display</text:p>
      <text:p text:style-name="P2383"/>
      <text:p text:style-name="P2384">jmp main_end ;otherwise, end the program</text:p>
      <text:p text:style-name="P2385"/>
      <text:p text:style-name="P2386">; this point is reached if file was read from successfully</text:p>
      <text:p text:style-name="P2387"/>
      <text:p text:style-name="P2388">file_success:</text:p>
      <text:p text:style-name="P2389"/>
      <text:p text:style-name="P2390">;print the last read character to stdout by switching to write call</text:p>
      <text:p text:style-name="P2391">mov ebx,1 <text:s text:c="10"/>;write to the STDOUT file</text:p>
      <text:p text:style-name="P2392">mov eax,4 <text:s text:c="10"/>;invoke SYS_WRITE (kernel opcode 4 on 32 bit systems)</text:p>
      <text:p text:style-name="P2393">int 80h <text:s text:c="12"/>;call the kernel</text:p>
      <text:p text:style-name="P2394"/>
      <text:p text:style-name="P2395">jmp cat</text:p>
      <text:p text:style-name="P2396"/>
      <text:p text:style-name="P2397">search_mode:</text:p>
      <text:p text:style-name="P2398"/>
      <text:p text:style-name="P2399">;this is the beginning of search mode</text:p>
      <text:p text:style-name="P2400">;it handles the file by seeking and reading to search every position for the search string</text:p>
      <text:p text:style-name="P2401"/>
      <text:p text:style-name="P2402">;first, seek to the offset we initialized to zero</text:p>
      <text:p text:style-name="P2403">;this variable will be added to depending on actions taken</text:p>
      <text:p text:style-name="P2404"/>
      <text:p text:style-name="P2405">mov edx,0 <text:s text:c="10"/>;whence argument (SEEK_SET)</text:p>
      <text:p text:style-name="P2406">mov ecx,[offset] <text:s text:c="3"/>;move the file cursor to this address</text:p>
      <text:p text:style-name="P2407">mov ebx,[fd] <text:s text:c="7"/>;move the opened file descriptor into EBX</text:p>
      <text:p text:style-name="P2408">mov eax,19 <text:s text:c="9"/>;invoke SYS_LSEEK (kernel opcode 19)</text:p>
      <text:p text:style-name="P2409">int 80h <text:s text:c="12"/>;call the kernel</text:p>
      <text:p text:style-name="P2410"/>
      <text:p text:style-name="P2411">;obtain the length of the search string using my strlen function</text:p>
      <text:p text:style-name="P2412">mov eax,[string_search]</text:p>
      <text:p text:style-name="P2413">call strlen <text:s text:c="8"/>;get the length of the search string</text:p>
      <text:p text:style-name="P2414"/>
      <text:p text:style-name="P2415">;use the length of the string we are searching for as the number of bytes to read at this location</text:p>
      <text:p text:style-name="P2416"/>
      <text:p text:style-name="P2417">mov edx,eax <text:s text:c="8"/>;number of bytes to read</text:p>
      <text:p text:style-name="P2418">mov ecx,buf <text:s text:c="8"/>;address to store the bytes</text:p>
      <text:p text:style-name="P2419">mov ebx,[fd] <text:s text:c="7"/>;move the opened file descriptor into EBX</text:p>
      <text:p text:style-name="P2420">mov eax,3 <text:s text:c="10"/>;invoke SYS_READ (kernel opcode 3)</text:p>
      <text:p text:style-name="P2421">int 80h <text:s text:c="12"/>;call the kernel</text:p>
      <text:p text:style-name="P2422"/>
      <text:p text:style-name="P2423">mov [count],eax <text:s text:c="4"/>;store how many bytes were read with that last read operation</text:p>
      <text:p text:style-name="P2424"/>
      <text:p text:style-name="P2425">mov ebx,buf <text:s text:c="8"/>;move the address of bytes read into ebx</text:p>
      <text:p text:style-name="P2426">add ebx,eax <text:s text:c="8"/>;add number of bytes read (return value of read function in eax)</text:p>
      <text:p text:style-name="P2427">mov byte[ebx],0 <text:s text:c="4"/>;terminate the string with zero</text:p>
      <text:p text:style-name="P2428"/>
      <text:p text:style-name="P2429">cmp eax,edx ;if the number of bytes is not what we expected to read, end this loop</text:p>
      <text:p text:style-name="P2430">jnz textdump_end</text:p>
      <text:p text:style-name="P2431"/>
      <text:p text:style-name="P2432">;move our two strings into the esi and edi registers for comparison</text:p>
      <text:p text:style-name="P2433">;with my custom written strcmp function</text:p>
      <text:p text:style-name="P2434"/>
      <text:p text:style-name="P2435">mov esi,[string_search]</text:p>
      <text:p text:style-name="P2436">mov edi,buf</text:p>
      <text:p text:style-name="P2437">call strcmp ;compare these two strings</text:p>
      <text:p text:style-name="P2438"/>
      <text:p text:style-name="P2439">cmp eax,0 <text:s text:c="6"/>;test if they are the same (if eax returned zero)</text:p>
      <text:p text:style-name="P2440">jnz not_match <text:s text:c="2"/>;if they are not a match go to that section for printing a character</text:p>
      <text:p text:style-name="P2441"/>
      <text:p text:style-name="P2442">;but if they are a match, then we either quote them</text:p>
      <text:p text:style-name="P2443">;or replace them if a replacement string is available</text:p>
      <text:p text:style-name="P2444"/>
      <text:p text:style-name="P2445">;but regardless of which action we do, since a match was found, let us add this count to the offset</text:p>
      <text:p text:style-name="P2446">;so that we read from beyond this point next time the textdump loop starts</text:p>
      <text:p text:style-name="P2447">mov eax,[count]</text:p>
      <text:p text:style-name="P2448">add [offset],eax</text:p>
      <text:p text:style-name="P2449"/>
      <text:p text:style-name="P2450">cmp dword[argc],4 <text:s text:c="2"/>;if less than 4 args, no replacement exists, so we quote the strings</text:p>
      <text:p text:style-name="P2451">jb print_quotes</text:p>
      <text:p text:style-name="P2452"/>
      <text:p text:style-name="P2453">;otherwise, we will print the replacement string instead of the original!</text:p>
      <text:p text:style-name="P2454"/>
      <text:p text:style-name="P2455">mov eax,[string_replace]</text:p>
      <text:p text:style-name="P2456">call putstring <text:s text:c="1"/>;print the string</text:p>
      <text:p text:style-name="P2457"/>
      <text:p text:style-name="P2458">jmp textdump <text:s text:c="3"/>;restart the main loop</text:p>
      <text:p text:style-name="P2459"/>
      <text:p text:style-name="P2460">print_quotes:</text:p>
      <text:p text:style-name="P2461"/>
      <text:p text:style-name="P2462">;print quotes around matched string</text:p>
      <text:p text:style-name="P2463">mov al,'"'</text:p>
      <text:p text:style-name="P2464">call putchar</text:p>
      <text:p text:style-name="P2465"/>
      <text:p text:style-name="P2466">mov eax,buf</text:p>
      <text:p text:style-name="P2467">call putstring ;print the string</text:p>
      <text:p text:style-name="P2468"/>
      <text:p text:style-name="P2469">mov al,'"'</text:p>
      <text:p text:style-name="P2470">call putchar</text:p>
      <text:p text:style-name="P2471"/>
      <text:p text:style-name="P2472">jmp textdump ;restart the main loop</text:p>
      <text:p text:style-name="P2473"/>
      <text:p text:style-name="P2474">not_match: </text:p>
      <text:p text:style-name="P2475"/>
      <text:p text:style-name="P2476">;Instead of calling the putchar function in the case of no match,</text:p>
      <text:p text:style-name="P2477">;I do a system call to print 1 byte to standard output</text:p>
      <text:p text:style-name="P2478">;This is simple and also compatible with binary files we want to replace text in.</text:p>
      <text:p text:style-name="P2479">;But it only works if the search and replace strings are of the same length</text:p>
      <text:p text:style-name="P2480"/>
      <text:p text:style-name="P2481">mov eax,4 <text:s text:c="10"/>;invoke SYS_WRITE (kernel opcode 4 on 32 bit systems)</text:p>
      <text:p text:style-name="P2482">mov ebx,1 <text:s text:c="10"/>;write to the STDOUT file</text:p>
      <text:p text:style-name="P2483">mov ecx,buf <text:s text:c="8"/>;pointer/address of string to write</text:p>
      <text:p text:style-name="P2484">mov edx,1 <text:s text:c="10"/>;number of bytes to write == 1</text:p>
      <text:p text:style-name="P2485">int 80h <text:s text:c="12"/>;system call to write the message</text:p>
      <text:p text:style-name="P2486"/>
      <text:p text:style-name="P2487">add [offset],1 ;add 1 to the file address so we don't read this same position again</text:p>
      <text:p text:style-name="P2488"/>
      <text:p text:style-name="P2489">jmp textdump</text:p>
      <text:p text:style-name="P2490"/>
      <text:p text:style-name="P2491">textdump_end:</text:p>
      <text:p text:style-name="P2492"/>
      <text:p text:style-name="P2493">;print the remaining bytes, if any, left after the main loop ended</text:p>
      <text:p text:style-name="P2494">;mov eax,buf</text:p>
      <text:p text:style-name="P2495">;call putstring</text:p>
      <text:p text:style-name="P2496"/>
      <text:p text:style-name="P2497">mov eax,4 <text:s text:c="6"/>;invoke SYS_WRITE (kernel opcode 4 on 32 bit systems)</text:p>
      <text:p text:style-name="P2498">mov ebx,1 <text:s text:c="6"/>;write to the STDOUT file</text:p>
      <text:p text:style-name="P2499">mov ecx,buf <text:s text:c="4"/>;pointer/address of string to write</text:p>
      <text:p text:style-name="P2500">mov edx,[count] ;number of bytes to write == last read call result</text:p>
      <text:p text:style-name="P2501">int 80h <text:s text:c="8"/>;system call to write the message</text:p>
      <text:p text:style-name="P2502"/>
      <text:p text:style-name="P2503">main_end:</text:p>
      <text:p text:style-name="P2504"/>
      <text:p text:style-name="P2505">;this is the end of the program</text:p>
      <text:p text:style-name="P2506">;we close the open file and then use the exit call</text:p>
      <text:p text:style-name="P2507"/>
      <text:p text:style-name="P2508">;Linux system call to close a file</text:p>
      <text:p text:style-name="P2509"/>
      <text:p text:style-name="P2510">mov ebx,[fd] <text:s text:c="3"/>;file number to close</text:p>
      <text:p text:style-name="P2511">mov eax,6 <text:s text:c="6"/>;invoke SYS_CLOSE (kernel opcode 6)</text:p>
      <text:p text:style-name="P2512">int 80h <text:s text:c="8"/>;call the kernel</text:p>
      <text:p text:style-name="P2513"/>
      <text:p text:style-name="P2514">mov eax, 1 <text:s text:c="5"/>;invoke SYS_EXIT (kernel opcode 1)</text:p>
      <text:p text:style-name="P2515">mov ebx, 0 <text:s text:c="5"/>;return 0 status on exit - 'No Errors'</text:p>
      <text:p text:style-name="P2516">int 80h</text:p>
      <text:p text:style-name="P2517"/>
      <text:p text:style-name="P2518">;the strlen and strcmp are named after the equivalent C functions</text:p>
      <text:p text:style-name="P2519">;but are written from scratch by me based on their expected behavior</text:p>
      <text:p text:style-name="P2520"/>
      <text:p text:style-name="P2521">;The strlen function gets the length of string in eax and returns it in eax</text:p>
      <text:p text:style-name="P2522">;This is the same algorithm used in my putstring function</text:p>
      <text:p text:style-name="P2523"/>
      <text:p text:style-name="P2524">strlen:</text:p>
      <text:p text:style-name="P2525"/>
      <text:p text:style-name="P2526">push ebx</text:p>
      <text:p text:style-name="P2527">mov ebx,eax <text:s text:c="4"/>;copy eax to ebx. ebx will be used as index to the string</text:p>
      <text:p text:style-name="P2528"/>
      <text:p text:style-name="P2529">strlen_start: <text:s text:c="2"/>;this loop finds the length of the string</text:p>
      <text:p text:style-name="P2530"/>
      <text:p text:style-name="P2531">cmp byte[ebx],0 ;compare byte at address ebx with 0</text:p>
      <text:p text:style-name="P2532">jz strlen_end <text:s text:c="2"/>;if comparison was zero, jump to loop end</text:p>
      <text:p text:style-name="P2533">inc ebx</text:p>
      <text:p text:style-name="P2534">jmp strlen_start</text:p>
      <text:p text:style-name="P2535"/>
      <text:p text:style-name="P2536">strlen_end:</text:p>
      <text:p text:style-name="P2537">sub ebx,eax <text:s text:c="4"/>;subtract start pointer from current pointer to get length of string</text:p>
      <text:p text:style-name="P2538">mov eax,ebx <text:s text:c="4"/>;copy the string length back to eax</text:p>
      <text:p text:style-name="P2539">pop ebx</text:p>
      <text:p text:style-name="P2540"/>
      <text:p text:style-name="P2541">ret</text:p>
      <text:p text:style-name="P2542"/>
      <text:p text:style-name="P2543">;strcmp compares the string at esi to the one at edi</text:p>
      <text:p text:style-name="P2544">;eax returns 0 if the strings are the same and 1 if different</text:p>
      <text:p text:style-name="P2545">;the algorithm is simple but I will explain it for those who are confused</text:p>
      <text:p text:style-name="P2546"/>
      <text:p text:style-name="P2547">;eax is initialized to zero</text:p>
      <text:p text:style-name="P2548">;a byte from each string is loaded into the al and bl registers</text:p>
      <text:p text:style-name="P2549">;the bytes are compared. if they are different, then we jump to the end</text:p>
      <text:p text:style-name="P2550">;However, if they are the same, then we check if one of them is zero</text:p>
      <text:p text:style-name="P2551">;for this purpose it doesn't matter whether we compare al or bl with zero</text:p>
      <text:p text:style-name="P2552">;because it is known that they are the same if the jnz did not take place</text:p>
      <text:p text:style-name="P2553">;if it is zero, this also jumps to the end of the function</text:p>
      <text:p text:style-name="P2554">;If neither jump took place, then we jump to the start of the loop</text:p>
      <text:p text:style-name="P2555">;but when the function finally ends bl will be subtracted from al</text:p>
      <text:p text:style-name="P2556">;this ensures that the function returns zero if the final characters are the same</text:p>
      <text:p text:style-name="P2557">;ebx,esi,and edi are preserved but eax is the return value</text:p>
      <text:p text:style-name="P2558">;also, the sub instruction at the end of the function also updates the flags</text:p>
      <text:p text:style-name="P2559">;so you can "jz" or "jnz" to a label after calling this function based on results</text:p>
      <text:p text:style-name="P2560"/>
      <text:p text:style-name="P2561">strcmp:</text:p>
      <text:p text:style-name="P2562"/>
      <text:p text:style-name="P2563">push ebx</text:p>
      <text:p text:style-name="P2564">push esi</text:p>
      <text:p text:style-name="P2565">push edi</text:p>
      <text:p text:style-name="P2566"/>
      <text:p text:style-name="P2567">mov eax,0</text:p>
      <text:p text:style-name="P2568"/>
      <text:p text:style-name="P2569">strcmp_start:</text:p>
      <text:p text:style-name="P2570"/>
      <text:p text:style-name="P2571">;read a byte from each string</text:p>
      <text:p text:style-name="P2572">mov al,[edi]</text:p>
      <text:p text:style-name="P2573">mov bl,[esi]</text:p>
      <text:p text:style-name="P2574">cmp al,bl</text:p>
      <text:p text:style-name="P2575">jnz strcmp_end</text:p>
      <text:p text:style-name="P2576"/>
      <text:p text:style-name="P2577">cmp al,0</text:p>
      <text:p text:style-name="P2578">jz strcmp_end</text:p>
      <text:p text:style-name="P2579"/>
      <text:p text:style-name="P2580">inc edi</text:p>
      <text:p text:style-name="P2581">inc esi</text:p>
      <text:p text:style-name="P2582"/>
      <text:p text:style-name="P2583">jmp strcmp_start</text:p>
      <text:p text:style-name="P2584"/>
      <text:p text:style-name="P2585">strcmp_end:</text:p>
      <text:p text:style-name="P2586">sub al,bl</text:p>
      <text:p text:style-name="P2587"/>
      <text:p text:style-name="P2588">pop edi</text:p>
      <text:p text:style-name="P2589">pop esi</text:p>
      <text:p text:style-name="P2590">pop ebx</text:p>
      <text:p text:style-name="P2591"/>
      <text:p text:style-name="P2592">ret</text:p>
      <text:p text:style-name="P2593"/>
      <text:p text:style-name="P2594">help_message db 'chastext by Chastity White Rose',0Ah,0Ah</text:p>
      <text:p text:style-name="P2595">db '"cat" a file:',0Ah,0Ah,9,'chastext file',0Ah,0Ah</text:p>
      <text:p text:style-name="P2596">db 'search for a string:',0Ah,0Ah,9,'chastext file search',0Ah,0Ah</text:p>
      <text:p text:style-name="P2597">db 'replace string:',0Ah,0Ah,9,'chastext file search replace',0Ah,0Ah</text:p>
      <text:p text:style-name="P2598">db 'Find or replace any string!',0Ah,0</text:p>
      <text:p text:style-name="P2599"/>
      <text:p text:style-name="P2600">open_error_message db 'error while opening file',0</text:p>
      <text:p text:style-name="P2601"/>
      <text:p text:style-name="P2602">offset dd 0 ;file address defaults to zero AKA beginning of file</text:p>
      <text:p text:style-name="P2603"/>
      <text:p text:style-name="P2604">;variables for managing arguments and files</text:p>
      <text:p text:style-name="P2605">argc rd 1</text:p>
      <text:p text:style-name="P2606">filename rd 1 ; name of the file to be opened</text:p>
      <text:p text:style-name="P2607">fd rd 1 ; file descriptor</text:p>
      <text:p text:style-name="P2608">count rd 1</text:p>
      <text:p text:style-name="P2609"/>
      <text:p text:style-name="P2610">string_search rd 1 ; place to hold the search string pointer</text:p>
      <text:p text:style-name="P2611">string_replace rd 1 ; place to hold the replacement string pointer</text:p>
      <text:p text:style-name="P2612"/>
      <text:p text:style-name="P2613">;where we will store data from the file</text:p>
      <text:p text:style-name="P2614">buf db 0xA4 dup 0</text:p>
      <text:p text:style-name="First_20_paragraph">To understand exactly how powerful this program is, I have prepared a text file and a script which can transform it into something quite different! Here is the text file of a famous tongue twister about someone who sells seashells on the seashore!</text:p>
      <text:h text:style-name="Heading_20_2" text:outline-level="2"><text:bookmark-start text:name="seashell.txt"/>seashell.txt<text:bookmark-end text:name="seashell.txt"/></text:h>
      <text:p text:style-name="P2615">She sells seashells by the seashore,</text:p>
      <text:p text:style-name="P2616">The shells she sells are seashells, I'm sure.</text:p>
      <text:p text:style-name="P2617">So if she sells seashells on the seashore,</text:p>
      <text:p text:style-name="P2618">Then I'm sure she sells seashore shells.</text:p>
      <text:p text:style-name="First_20_paragraph">And here is a script that runs the chastext program multiple times and changes the text in several stages.</text:p>
      <text:h text:style-name="Heading_20_2" text:outline-level="2"><text:bookmark-start text:name="chastext-test-script"/>chastext test script<text:bookmark-end text:name="chastext-test-script"/></text:h>
      <text:p text:style-name="P2619">#!/bin/sh</text:p>
      <text:p text:style-name="P2620">./main seashell.txt</text:p>
      <text:p text:style-name="P2621">echo</text:p>
      <text:p text:style-name="P2622">./main seashell.txt 'She' 'Chastity' &gt; 0.txt</text:p>
      <text:p text:style-name="P2623">./main 0.txt 'sells' 'writes' &gt; 1.txt</text:p>
      <text:p text:style-name="P2624">./main 1.txt 'seashells' 'assembly books' &gt; 2.txt</text:p>
      <text:p text:style-name="P2625">./main 2.txt 'seashore' 'computer' &gt; 3.txt</text:p>
      <text:p text:style-name="P2626">./main 3.txt 'shells' 'books' &gt; 4.txt</text:p>
      <text:p text:style-name="P2627">./main 4.txt 'by the' 'on her' &gt; 5.txt</text:p>
      <text:p text:style-name="P2628">./main 5.txt</text:p>
      <text:p text:style-name="First_20_paragraph">If you assembled the program under the name “main” and then run this script like:</text:p>
      <text:p text:style-name="P2629">sh textdemo.sh</text:p>
      <text:p text:style-name="First_20_paragraph">The output will be as follows:</text:p>
      <text:p text:style-name="P2630">She sells seashells by the seashore,</text:p>
      <text:p text:style-name="P2631">The shells she sells are seashells, I'm sure.</text:p>
      <text:p text:style-name="P2632">So if she sells seashells on the seashore,</text:p>
      <text:p text:style-name="P2633">Then I'm sure she sells seashore shells.</text:p>
      <text:p text:style-name="P2634"/>
      <text:p text:style-name="P2635">Chastity writes assembly books on her computer,</text:p>
      <text:p text:style-name="P2636">The books she writes are assembly books, I'm sure.</text:p>
      <text:p text:style-name="P2637">So if she writes assembly books on the computer,</text:p>
      <text:p text:style-name="P2638">Then I'm sure she writes computer books.</text:p>
      <text:p text:style-name="First_20_paragraph">The idea behind the way I have written chastext is that it makes use of file redirection so that we can make changes in stages one command and file at a time. If anything were to go wrong, we still have the original file unmodified.</text:p>
      <text:p text:style-name="Text_20_body">The seashell poem is just one example, but I suppose this could also be used to change lyrics for song parodies. This program is as capable of transforming text as your average text editor with a find and replace feature.</text:p>
      <text:p text:style-name="Text_20_body">There is a program named “sed” on Linux that can also do find and replace on text files, but I just found it to be a fun exercise to write my own. Also, my program is faster and smaller because it has less work to do than the same thing written in C. But if you are curious, here is the same thing done using sed.</text:p>
      <text:p text:style-name="P2639">#!/bin/sh</text:p>
      <text:p text:style-name="P2640">cat seashell.txt</text:p>
      <text:p text:style-name="P2641">cp seashell.txt 0.txt</text:p>
      <text:p text:style-name="P2642">echo</text:p>
      <text:p text:style-name="P2643">sed 's/She/Chastity/g' -i 0.txt</text:p>
      <text:p text:style-name="P2644">sed 's/sells/writes/g' -i 0.txt</text:p>
      <text:p text:style-name="P2645">sed 's/seashells/assembly books/g' -i 0.txt</text:p>
      <text:p text:style-name="P2646">sed 's/seashore/computer/g' -i 0.txt</text:p>
      <text:p text:style-name="P2647">sed 's/shells/books/g' -i 0.txt</text:p>
      <text:p text:style-name="P2648">sed 's/by the/on her/g' -i 0.txt</text:p>
      <text:p text:style-name="P2649">cat 0.txt</text:p>
      <text:h text:style-name="Heading_20_2" text:outline-level="2"><text:bookmark-start text:name="how-does-chastext-work"/>How does chastext work?<text:bookmark-end text:name="how-does-chastext-work"/></text:h>
      <text:p text:style-name="First_20_paragraph">chastext uses almost every concept I have taught in this book so far. It uses all 6 system calls in my tables and it accepts user input from command line arguments to control which file is opened and what changes are made.</text:p>
      <text:p text:style-name="Text_20_body">It will display a help message if you don’t add any arguments.</text:p>
      <text:p text:style-name="Text_20_body">If you provide one argument, it uses that string as a filename to open and then displays all of it using the “cat” loop.</text:p>
      <text:p text:style-name="Text_20_body">If you provide a second argument after it, then it will search the file for this string and will display the whole file with the string you gave in quotes wherever it is found.</text:p>
      <text:p text:style-name="Text_20_body">But the real magic is when you give it a third argument and it will replace the search string with whatever your third argument is.</text:p>
      <text:p text:style-name="Text_20_body">Although it does not write any data back to the original file, it still requires lseek because it has to increment the address 1 byte at a time. If I were to search for my name: “chastity”, it would read 8 bytes from the file and then see if all of those bytes are equal to “chastity”. Regardless of whether there is a match or not, the act of performing the read call would still increment the file pointer by 8 bytes.</text:p>
      <text:p text:style-name="Text_20_body">But in the case where we don’t have a match, we then need to go backwards to read the next position 1 byte after the last address. Without lseek, we would be permanently stuck beyond this point.</text:p>
      <text:p text:style-name="Text_20_body">I tried writing this program without lseek several times but then it kept missing strings that I intended to replace. It turns out that the only other way to do it would be to load the entire file into memory because that would also allow random access moving forward or backward. Seeking in a file allows us to process information larger than the available RAM. If I had a 16 gigabyte file and wanted to replace all occurrences of one string with another, I am confident my program could do it.</text:p>
      <text:h text:style-name="Heading_20_2" text:outline-level="2"><text:bookmark-start text:name="fun-fact-about-chastext"/>Fun Fact About Chastext<text:bookmark-end text:name="fun-fact-about-chastext"/></text:h>
      <text:p text:style-name="First_20_paragraph">The strlen and strcmp functions were written in Assembly specifically for this program. While writing chastext, it was the first time I needed to obtain the length of the search string first and then I needed to read that many bytes from the input file for comparison with strcmp.</text:p>
      <text:p text:style-name="Text_20_body">I could have named these functions anything I wanted, but because functions of these same names are part of the C standard library, my readers with a background in C programming would have no trouble understanding what they were meant to do.</text:p>
      <text:h text:style-name="Heading_20_1" text:outline-level="1"><text:bookmark-start text:name="chapter-14-customizing-the-linux-path"/>Chapter 14: Customizing the Linux PATH<text:bookmark-end text:name="chapter-14-customizing-the-linux-path"/></text:h>
      <text:p text:style-name="First_20_paragraph">I have covered a lot of Assembly tricks and because I have been using Linux for so long, I sometimes forget that not everybody is as familiar with the command line as I am. I hope that I am not going too fast and assuming too much about the capabilities of my readers.</text:p>
      <text:p text:style-name="Text_20_body">Yes, this book is not exactly for beginners to Linux. I can’t answer questions about the Linux Kernel. Not even Linus Torvalds himself could explain it all because the project has grown far beyond him with many contributors.</text:p>
      <text:p text:style-name="Text_20_body">But what is accessible to users like you and I is that around the Linux kernel, huge operating systems are built using hundreds of command line utilities. Some of the more common tools are:</text:p>
      <text:list text:style-name="L16">
        <text:list-item>
          <text:p text:style-name="P2650">ls: list files in a directory</text:p>
        </text:list-item>
        <text:list-item>
          <text:p text:style-name="P2650">cp: copy files</text:p>
        </text:list-item>
        <text:list-item>
          <text:p text:style-name="P2650">mv move files</text:p>
        </text:list-item>
        <text:list-item>
          <text:p text:style-name="P2650">cat: display text files</text:p>
        </text:list-item>
        <text:list-item>
          <text:p text:style-name="P2650">sed: transform text such as search and replace</text:p>
        </text:list-item>
        <text:list-item>
          <text:p text:style-name="P2650">rm: delete files</text:p>
        </text:list-item>
      </text:list>
      <text:p text:style-name="First_20_paragraph">There are better books and free online resources for explaining these commands to Linux beginners. But the good news is that most of us don’t require memorizing all the commands. Most people can learn them as they go and Google search what they don’t know.</text:p>
      <text:p text:style-name="Text_20_body">For example, in chapter 6, I described the ten basic Intel instructions (counting all jumps as one category of instructions). However, Intel CPUs have over 1500 instructions.</text:p>
      <text:p text:style-name="Text_20_body">Similarly, there are over 460 Linux system calls but I have only ever used 6 of them for every program I needed to write.</text:p>
      <text:p text:style-name="Text_20_body">I have purposefully limited using any more Intel instructions or system calls than strictly necessary to avoid any confusion.</text:p>
      <text:p text:style-name="Text_20_body">I bring this up to show you that even if you find the information a bit hard to follow, I have been trying to make it easy.</text:p>
      <text:p text:style-name="Text_20_body">There is on key piece of advice that I do want to share in this chapter that is not about Assembly programming specifically but is about Linux usage in general. This is also something that not everyone will tell you but is a lesson I have learned from experience.</text:p>
      <text:p text:style-name="Text_20_body">To have a consistent development environment, or even a gaming environment on Linux, it is often helpful to know where your executables are located and also to install your own programs to a common location.</text:p>
      <text:p text:style-name="Text_20_body">Sometimes, Linux users forget what software they have installed because of the convenience of package managers that install them to places already part of the PATH variable. However, you will need to know what the PATH is and how to change it for whatever you need at the time.</text:p>
      <text:h text:style-name="Heading_20_2" text:outline-level="2"><text:bookmark-start text:name="what-is-the-path"/>What is the PATH?<text:bookmark-end text:name="what-is-the-path"/></text:h>
      <text:p text:style-name="First_20_paragraph">The PATH is the name of an environment variable that is a list of directories (or folders to use terminology from Windows). Directories that are in this list are searched whenever you type a command.</text:p>
      <text:p text:style-name="Text_20_body">But the good news is that your can create your own directory and add programs to it. I will teach you how with an example of my own.</text:p>
      <text:p text:style-name="Text_20_body">The “~” directory is a shortcut to the home directory of the user currently logged in. For example, on my system, the command</text:p>
      <text:p text:style-name="P2651">echo ~</text:p>
      <text:p text:style-name="First_20_paragraph">Will return</text:p>
      <text:p text:style-name="P2652">/home/chastity</text:p>
      <text:p text:style-name="First_20_paragraph">With this information, here is what I chose to use as my executable directory. I created a directory named “.bin” in my home like this:</text:p>
      <text:p text:style-name="P2653">mkdir ~/.bin</text:p>
      <text:p text:style-name="First_20_paragraph">And then I set the path to it like this:</text:p>
      <text:p text:style-name="P2654">PATH=~/.bin/</text:p>
      <text:p text:style-name="First_20_paragraph">What this does is set my PATH to only this directory. All other commands on the system are unavailable when I do this. This works great for Assembly programs from this book because they depend on the Linux kernel but don’t depend on shared libraries.</text:p>
      <text:p text:style-name="Text_20_body">However, if you want to keep access to all other commands but you want to also have a special .bin directory, then you need to edit the “~/.bashrc” in your home directory.</text:p>
      <text:p text:style-name="Text_20_body">If you have a text editor like nano for example, you can edit it with:</text:p>
      <text:p text:style-name="P2655">nano ~/.bashrc</text:p>
      <text:p text:style-name="First_20_paragraph">And add this line to it.</text:p>
      <text:p text:style-name="P2656">export PATH=$PATH:~/.bin/</text:p>
      <text:p text:style-name="First_20_paragraph">What this command does is cause the “~/.bin” directory to be added to whatever PATH was already defined by your system. The “.bashrc” file is a config file for the bash shell, which is the most popular but there are other shells that some distros use as the default. If you use a different shell, see the documentation for it. In any case, you should still set a custom directory for programs you write to keep them separate from your distribution’s package manager.</text:p>
      <text:h text:style-name="Heading_20_2" text:outline-level="2"><text:bookmark-start text:name="why-did-you-choose-.bin-instead-of-bin"/>Why did you choose .bin instead of bin?<text:bookmark-end text:name="why-did-you-choose-.bin-instead-of-bin"/></text:h>
      <text:p text:style-name="First_20_paragraph">Files and directories starting with a dot on Linux are hidden files. I don’t always want certain things to show in the file managers when I am looking through hundreds of directories on my system, which has become quite complex BTW. I have just about every compiler and assembler for languages I haven’t learned but might someday.</text:p>
      <text:p text:style-name="Text_20_body">But the important thing is that you can choose any name for your directory. When you write programs, you should remember where your directory is and then choose a suitable name for it.</text:p>
      <text:p text:style-name="Text_20_body">For example, if you assembled the chastext program from chapter 12 and the executable was currently named “main”, you would copy and rename it with the “cp” command like this:</text:p>
      <text:p text:style-name="P2657">cp main ~/.bin/chastext</text:p>
      <text:p text:style-name="First_20_paragraph">Once you have an executable file in a directory that is part of your path, you can run it from anywhere in the system. Naturally, the FASM and NASM assemblers are part of my path on Debian Linux because the “apt” package manager put them in the system wide “/usr/bin” directory. However, my own programs I keep in the “~/.bin” directory I have described. This prevents the need for entering my root password and accidentally making a mistake that makes my system unbootable. I always keep my stuff separate from the locations chosen by the package maintainers for my own safety and because I don’t want to brick the machine I use for all my writing.</text:p>
      <text:h text:style-name="Heading_20_2" text:outline-level="2"><text:bookmark-start text:name="a-note-to-windows-users"/>A Note to Windows Users<text:bookmark-end text:name="a-note-to-windows-users"/></text:h>
      <text:p text:style-name="First_20_paragraph">If you are a current or former Windows user, you may remember that Windows also has a PATH variable deep in the control panel settings. Personally I have forgotten how to access it because it has been awhile since I used Windows. However, it gives you a warning that you can cause problems if you carelessly mess with the PATH.</text:p>
      <text:p text:style-name="Text_20_body">But the method I have described in this chapter is completely safe because it does not mess with your system directories and is completely reversible. Either your temporary path goes away when you exit out of your terminal or you can change it to automatically be what you want in the “.bashrc” file.</text:p>
      <text:h text:style-name="Heading_20_2" text:outline-level="2"><text:bookmark-start text:name="why-is-the-path-so-important"/>Why is the PATH so important?<text:bookmark-end text:name="why-is-the-path-so-important"/></text:h>
      <text:p text:style-name="First_20_paragraph">The reason I dedicated a chapter to explaining the PATH variable is precisely because Linux commands need to be accessible from wherever you are. When I am moving around in my repositories and compiling C programs or assembling programs with FASM or NASM, I can trust them all to be in my path.</text:p>
      <text:p text:style-name="Text_20_body">Trust me, this will become more obvious as this book continues because I will be including all 4 of my core programs. Two of these you have already seen and two are still yet to come.</text:p>
      <text:h text:style-name="Heading_20_2" text:outline-level="2"><text:bookmark-start text:name="the-core-four-assembly-programs"/>The Core Four Assembly Programs<text:bookmark-end text:name="the-core-four-assembly-programs"/></text:h>
      <table:table table:name="Table9" table:style-name="Table9">
        <table:table-column table:style-name="Table9.A"/>
        <table:table-column table:style-name="Table9.B"/>
        <table:table-header-rows>
          <table:table-row>
            <table:table-cell table:style-name="TableHeaderRowCell" office:value-type="string">
              <text:p text:style-name="Table_20_Heading">Name</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chastack</text:p>
          </table:table-cell>
          <table:table-cell table:style-name="TableRowCell" office:value-type="string">
            <text:p text:style-name="Table_20_Contents">RPN calculator with software stack</text:p>
          </table:table-cell>
        </table:table-row>
        <table:table-row>
          <table:table-cell table:style-name="TableRowCell" office:value-type="string">
            <text:p text:style-name="Table_20_Contents">chastext</text:p>
          </table:table-cell>
          <table:table-cell table:style-name="TableRowCell" office:value-type="string">
            <text:p text:style-name="Table_20_Contents">search and replace for text files</text:p>
          </table:table-cell>
        </table:table-row>
        <table:table-row>
          <table:table-cell table:style-name="TableRowCell" office:value-type="string">
            <text:p text:style-name="Table_20_Contents">chastecmp</text:p>
          </table:table-cell>
          <table:table-cell table:style-name="TableRowCell" office:value-type="string">
            <text:p text:style-name="Table_20_Contents">compare two files in hexadecimal</text:p>
          </table:table-cell>
        </table:table-row>
        <table:table-row>
          <table:table-cell table:style-name="TableRowCell" office:value-type="string">
            <text:p text:style-name="Table_20_Contents">chastehex</text:p>
          </table:table-cell>
          <table:table-cell table:style-name="TableRowCell" office:value-type="string">
            <text:p text:style-name="Table_20_Contents">seek and edit files in hexadecimal</text:p>
          </table:table-cell>
        </table:table-row>
      </table:table>
      <text:h text:style-name="Heading_20_1" text:outline-level="1"><text:bookmark-start text:name="chapter-15-chastecmp"/>Chapter 15: chastecmp<text:bookmark-end text:name="chapter-15-chastecmp"/></text:h>
      <text:p text:style-name="First_20_paragraph">In this chapter, I will show you the source code of a file comparison program. This program is meant to find which bytes are different between two files that are similar but contain a few differences.</text:p>
      <text:p text:style-name="Text_20_body">I will use text files for my examples in this chapter, but the program actually does a binary file comparison and displays the different bytes in hexadecimal because it is a universally understood shorthand for binary that most C and Assembly programmers are already familiar with.</text:p>
      <text:p text:style-name="Text_20_body">First, here is the source code of chastecmp, which is the short name for “Chastity’s Comparison tool”. The name is also meant to refer to the “cmp” instruction, which is used a lot more in this program because it is essential.</text:p>
      <text:h text:style-name="Heading_20_2" text:outline-level="2"><text:bookmark-start text:name="fasm-chastecmp-source"/>FASM chastecmp source<text:bookmark-end text:name="fasm-chastecmp-source"/></text:h>
      <text:p text:style-name="P2658">;Linux 32-bit Assembly Source for chastecmp</text:p>
      <text:p text:style-name="P2659">format ELF executable</text:p>
      <text:p text:style-name="P2660"/>
      <text:p text:style-name="P2661">main:</text:p>
      <text:p text:style-name="P2662"/>
      <text:p text:style-name="P2663">;radix will be 16 because this whole program is about hexadecimal</text:p>
      <text:p text:style-name="P2664">mov dword[radix],16 ; can choose radix for integer input/output!</text:p>
      <text:p text:style-name="P2665">mov dword[int_width],1</text:p>
      <text:p text:style-name="P2666"/>
      <text:p text:style-name="P2667">pop eax ;get the number of arguments</text:p>
      <text:p text:style-name="P2668">dec eax ;subtract 1 because we will ignore the name of the program</text:p>
      <text:p text:style-name="P2669">pop ebx ;pop program name into a register to delete it from stack</text:p>
      <text:p text:style-name="P2670"/>
      <text:p text:style-name="P2671">cmp eax,2 ;do we have two arguments to be used as filenames?</text:p>
      <text:p text:style-name="P2672">jb help</text:p>
      <text:p text:style-name="P2673">mov dword[offset],0 ;assume the offset is 0,beginning of file</text:p>
      <text:p text:style-name="P2674">jmp arg_open_file_1</text:p>
      <text:p text:style-name="P2675"/>
      <text:p text:style-name="P2676">help:</text:p>
      <text:p text:style-name="P2677">mov eax,help_message</text:p>
      <text:p text:style-name="P2678">call putstring</text:p>
      <text:p text:style-name="P2679">jmp main_end</text:p>
      <text:p text:style-name="P2680"/>
      <text:p text:style-name="P2681">arg_open_file_1:</text:p>
      <text:p text:style-name="P2682">pop eax</text:p>
      <text:p text:style-name="P2683">mov [filename1],eax ; save the name of the file we will open to read</text:p>
      <text:p text:style-name="P2684">call putstring ;print the name of the file we will try opening</text:p>
      <text:p text:style-name="P2685"/>
      <text:p text:style-name="P2686">mov ecx,0 <text:s text:c="2"/>;open file in read mode </text:p>
      <text:p text:style-name="P2687">mov ebx,eax ;move filename for system call</text:p>
      <text:p text:style-name="P2688">mov eax,5 <text:s text:c="2"/>;invoke SYS_OPEN (kernel opcode 5)</text:p>
      <text:p text:style-name="P2689">int 80h <text:s text:c="4"/>;call the kernel</text:p>
      <text:p text:style-name="P2690"/>
      <text:p text:style-name="P2691">cmp eax,0</text:p>
      <text:p text:style-name="P2692">js file_error_display ;end program if the file can't be opened</text:p>
      <text:p text:style-name="P2693">mov [fd1],eax ; save the file descriptor number for later use</text:p>
      <text:p text:style-name="P2694">mov eax,file_open</text:p>
      <text:p text:style-name="P2695">call putstr_and_line</text:p>
      <text:p text:style-name="P2696"/>
      <text:p text:style-name="P2697">arg_open_file_2:</text:p>
      <text:p text:style-name="P2698">pop eax</text:p>
      <text:p text:style-name="P2699">mov [filename2],eax ; save the name of the file we will open to read</text:p>
      <text:p text:style-name="P2700"/>
      <text:p text:style-name="P2701">call putstring ;print the name of the file we will try opening</text:p>
      <text:p text:style-name="P2702"/>
      <text:p text:style-name="P2703">mov ecx,0 <text:s text:c="2"/>;open file in read mode </text:p>
      <text:p text:style-name="P2704">mov ebx,eax ;move filename for system call</text:p>
      <text:p text:style-name="P2705">mov eax,5 <text:s text:c="2"/>;invoke SYS_OPEN (kernel opcode 5)</text:p>
      <text:p text:style-name="P2706">int 80h <text:s text:c="4"/>;call the kernel</text:p>
      <text:p text:style-name="P2707"/>
      <text:p text:style-name="P2708">cmp eax,0</text:p>
      <text:p text:style-name="P2709">js file_error_display ;end program if the file can't be opened</text:p>
      <text:p text:style-name="P2710">mov [fd2],eax ; save the file descriptor number for later use</text:p>
      <text:p text:style-name="P2711">mov eax,file_open</text:p>
      <text:p text:style-name="P2712">call putstr_and_line</text:p>
      <text:p text:style-name="P2713"/>
      <text:p text:style-name="P2714">files_compare:</text:p>
      <text:p text:style-name="P2715"/>
      <text:p text:style-name="P2716">file_1_read_one_byte:</text:p>
      <text:p text:style-name="P2717">mov edx,1 <text:s text:c="6"/>;number of bytes to read</text:p>
      <text:p text:style-name="P2718">mov ecx,buf1 <text:s text:c="3"/>;address to store the bytes</text:p>
      <text:p text:style-name="P2719">mov ebx,[fd1] <text:s text:c="2"/>;move the opened file descriptor into EBX</text:p>
      <text:p text:style-name="P2720">mov eax,3 <text:s text:c="6"/>;invoke SYS_READ (kernel opcode 3)</text:p>
      <text:p text:style-name="P2721">int 80h <text:s text:c="8"/>;call the kernel</text:p>
      <text:p text:style-name="P2722"/>
      <text:p text:style-name="P2723">;eax will have the number of byte read after system call</text:p>
      <text:p text:style-name="P2724">mov [count1],eax ;we save the number of byte read for later</text:p>
      <text:p text:style-name="P2725">cmp eax,0</text:p>
      <text:p text:style-name="P2726">jnz file_2_read_one_byte ;unless zero bytes were read, proceed to read from next file</text:p>
      <text:p text:style-name="P2727"/>
      <text:p text:style-name="P2728">mov eax,[filename1]</text:p>
      <text:p text:style-name="P2729">call putstring</text:p>
      <text:p text:style-name="P2730">mov eax,end_of_file_string</text:p>
      <text:p text:style-name="P2731">call putstr_and_line</text:p>
      <text:p text:style-name="P2732"/>
      <text:p text:style-name="P2733">;Even if we have reached the end of the first file,</text:p>
      <text:p text:style-name="P2734">;we still proceed to read a byte from the second file</text:p>
      <text:p text:style-name="P2735">;to see if it also ends at the same address</text:p>
      <text:p text:style-name="P2736"/>
      <text:p text:style-name="P2737">file_2_read_one_byte:</text:p>
      <text:p text:style-name="P2738">mov edx,1 <text:s text:c="6"/>;number of byte to read</text:p>
      <text:p text:style-name="P2739">mov ecx,buf2 <text:s text:c="3"/>;address to store the bytes</text:p>
      <text:p text:style-name="P2740">mov ebx,[fd2] <text:s text:c="2"/>;move the opened file descriptor into EBX</text:p>
      <text:p text:style-name="P2741">mov eax,3 <text:s text:c="6"/>;invoke SYS_READ (kernel opcode 3)</text:p>
      <text:p text:style-name="P2742">int 80h <text:s text:c="8"/>;call the kernel</text:p>
      <text:p text:style-name="P2743"/>
      <text:p text:style-name="P2744">;eax will have the number of bytes read after system call</text:p>
      <text:p text:style-name="P2745">mov [count2],eax ;we save the number of bytes read for later</text:p>
      <text:p text:style-name="P2746">cmp eax,0</text:p>
      <text:p text:style-name="P2747">jnz check_both_bytes ;unless zero bytes were read, proceed to compare bytes from both files</text:p>
      <text:p text:style-name="P2748"/>
      <text:p text:style-name="P2749">mov eax,[filename2]</text:p>
      <text:p text:style-name="P2750">call putstring</text:p>
      <text:p text:style-name="P2751">mov eax,end_of_file_string</text:p>
      <text:p text:style-name="P2752">call putstr_and_line</text:p>
      <text:p text:style-name="P2753"/>
      <text:p text:style-name="P2754">jmp main_end ;we have reach end of one file and should end program</text:p>
      <text:p text:style-name="P2755"/>
      <text:p text:style-name="P2756">check_both_bytes:</text:p>
      <text:p text:style-name="P2757"/>
      <text:p text:style-name="P2758">;we add the number of bytes read from both files</text:p>
      <text:p text:style-name="P2759">mov eax,[count1]</text:p>
      <text:p text:style-name="P2760">add eax,[count2]</text:p>
      <text:p text:style-name="P2761">cmp eax,2</text:p>
      <text:p text:style-name="P2762">jnz main_end</text:p>
      <text:p text:style-name="P2763"/>
      <text:p text:style-name="P2764">compare_bytes:</text:p>
      <text:p text:style-name="P2765"/>
      <text:p text:style-name="P2766">mov al,[buf1]</text:p>
      <text:p text:style-name="P2767">mov bl,[buf2]</text:p>
      <text:p text:style-name="P2768"/>
      <text:p text:style-name="P2769">;compare the two bytes and skip printing them if they are the same</text:p>
      <text:p text:style-name="P2770">cmp al,bl</text:p>
      <text:p text:style-name="P2771">jz bytes_are_same</text:p>
      <text:p text:style-name="P2772"/>
      <text:p text:style-name="P2773">;print the address and the bytes at that address</text:p>
      <text:p text:style-name="P2774">mov eax,[offset]</text:p>
      <text:p text:style-name="P2775">mov dword[int_width],8</text:p>
      <text:p text:style-name="P2776">call putint_and_space</text:p>
      <text:p text:style-name="P2777">mov dword[int_width],2</text:p>
      <text:p text:style-name="P2778">mov eax,0</text:p>
      <text:p text:style-name="P2779">mov al,[buf1]</text:p>
      <text:p text:style-name="P2780">call putint_and_space</text:p>
      <text:p text:style-name="P2781">mov al,[buf2]</text:p>
      <text:p text:style-name="P2782">call putint_and_line</text:p>
      <text:p text:style-name="P2783"/>
      <text:p text:style-name="P2784">bytes_are_same:</text:p>
      <text:p text:style-name="P2785"/>
      <text:p text:style-name="P2786">inc dword[offset]</text:p>
      <text:p text:style-name="P2787"/>
      <text:p text:style-name="P2788">jmp files_compare</text:p>
      <text:p text:style-name="P2789"/>
      <text:p text:style-name="P2790">file_error_display:</text:p>
      <text:p text:style-name="P2791"/>
      <text:p text:style-name="P2792">mov eax,file_error</text:p>
      <text:p text:style-name="P2793">call putstr_and_line</text:p>
      <text:p text:style-name="P2794"/>
      <text:p text:style-name="P2795">main_end:</text:p>
      <text:p text:style-name="P2796"/>
      <text:p text:style-name="P2797">;this is the end of the program</text:p>
      <text:p text:style-name="P2798">;we close the open files and then use the exit call</text:p>
      <text:p text:style-name="P2799"/>
      <text:p text:style-name="P2800">mov ebx,[fd1] ;file number to close</text:p>
      <text:p text:style-name="P2801">mov eax,6 <text:s text:c="2"/>;invoke SYS_CLOSE (kernel opcode 6)</text:p>
      <text:p text:style-name="P2802">int 80h <text:s text:c="4"/>;call the kernel</text:p>
      <text:p text:style-name="P2803"/>
      <text:p text:style-name="P2804">mov ebx,[fd2] ;file number to close</text:p>
      <text:p text:style-name="P2805">mov eax,6 <text:s text:c="2"/>;invoke SYS_CLOSE (kernel opcode 6)</text:p>
      <text:p text:style-name="P2806">int 80h <text:s text:c="4"/>;call the kernel</text:p>
      <text:p text:style-name="P2807"/>
      <text:p text:style-name="P2808">mov eax, 1 <text:s text:c="1"/>; invoke SYS_EXIT (kernel opcode 1)</text:p>
      <text:p text:style-name="P2809">mov ebx, 0 <text:s text:c="1"/>; return 0 status on exit - 'No Errors'</text:p>
      <text:p text:style-name="P2810">int 80h</text:p>
      <text:p text:style-name="P2811"/>
      <text:p text:style-name="P2812">include 'chastelib32.asm'</text:p>
      <text:p text:style-name="P2813"/>
      <text:p text:style-name="P2814">;variables for displaying information</text:p>
      <text:p text:style-name="P2815">help_message db 'chastecmp by Chastity White Rose',0Ah,0Ah</text:p>
      <text:p text:style-name="P2816">db 9,'chastecmp file1 file2',0Ah,0Ah</text:p>
      <text:p text:style-name="P2817">db 'Differing bytes are shown in hexadecimal',0Ah</text:p>
      <text:p text:style-name="P2818">db 'until the EOF has been reached.',0Ah,0</text:p>
      <text:p text:style-name="P2819"/>
      <text:p text:style-name="P2820">file_open db ' opened',0</text:p>
      <text:p text:style-name="P2821">file_error db ' error',0</text:p>
      <text:p text:style-name="P2822">end_of_file_string db ' EOF',0</text:p>
      <text:p text:style-name="P2823"/>
      <text:p text:style-name="P2824">db 23 dup 0 ;fill with extra space to match 1024 executable size</text:p>
      <text:p text:style-name="P2825"/>
      <text:p text:style-name="P2826">;variables for managing files</text:p>
      <text:p text:style-name="P2827">filename1 dd ? ;name of the file to be opened</text:p>
      <text:p text:style-name="P2828">filename2 dd ? ;name of the file to be opened</text:p>
      <text:p text:style-name="P2829">fd1 dd ? <text:s text:c="6"/>;file descriptor 1</text:p>
      <text:p text:style-name="P2830">fd2 dd ? <text:s text:c="6"/>;file descriptor 2</text:p>
      <text:p text:style-name="P2831">buf1 db ? <text:s text:c="5"/>;store byte from file 1 here</text:p>
      <text:p text:style-name="P2832">buf2 db ? <text:s text:c="5"/>;store byte from file 2 here</text:p>
      <text:p text:style-name="P2833">count1 dd ? <text:s text:c="3"/></text:p>
      <text:p text:style-name="P2834">count2 dd ?</text:p>
      <text:p text:style-name="P2835">offset dd ?</text:p>
      <text:h text:style-name="Heading_20_2" text:outline-level="2"><text:bookmark-start text:name="how-to-use-chastecmp"/>How to use chastecmp<text:bookmark-end text:name="how-to-use-chastecmp"/></text:h>
      <text:p text:style-name="First_20_paragraph">Using the chastecmp program requires two filenames to be passed as command-line arguments. Although you can use any files you have, it makes sense to use a simple example with text files because they are so easy to create with the echo command.</text:p>
      <text:p text:style-name="Text_20_body">Run these commands to create the two files.</text:p>
      <text:p text:style-name="P2836">echo "chandler is my birth name" &gt; file1.txt</text:p>
      <text:p text:style-name="P2837">echo "chastity is my trans name" &gt; file2.txt</text:p>
      <text:p text:style-name="First_20_paragraph">Now that the files exist</text:p>
      <text:p text:style-name="P2838">./main file1.txt file2.txt</text:p>
      <text:p text:style-name="First_20_paragraph">If you have created these files and run the chastecmp program on them, you will see this result:</text:p>
      <text:p text:style-name="P2839">file1.txt opened</text:p>
      <text:p text:style-name="P2840">file2.txt opened</text:p>
      <text:p text:style-name="P2841">00000003 6E 73</text:p>
      <text:p text:style-name="P2842">00000004 64 74</text:p>
      <text:p text:style-name="P2843">00000005 6C 69</text:p>
      <text:p text:style-name="P2844">00000006 65 74</text:p>
      <text:p text:style-name="P2845">00000007 72 79</text:p>
      <text:p text:style-name="P2846">0000000F 62 74</text:p>
      <text:p text:style-name="P2847">00000010 69 72</text:p>
      <text:p text:style-name="P2848">00000011 72 61</text:p>
      <text:p text:style-name="P2849">00000012 74 6E</text:p>
      <text:p text:style-name="P2850">00000013 68 73</text:p>
      <text:p text:style-name="P2851">file1.txt EOF</text:p>
      <text:p text:style-name="P2852">file2.txt EOF</text:p>
      <text:h text:style-name="Heading_20_2" text:outline-level="2"><text:bookmark-start text:name="how-does-chastecmp-work"/>How does chastecmp work?<text:bookmark-end text:name="how-does-chastecmp-work"/></text:h>
      <text:p text:style-name="First_20_paragraph">This program is much simpler than chastack or chastext, but it is close to 180 lines and still has some logic to follow. First thing it does is check to see how many command-line arguments were passed to the program. Since the name of the program always counts as 1, we subtract from this number and also pop the next argument into ebx just to get rid of it. The actual register used doesn’t matter in this case as long as it is not eax, which holds the number of arguments.</text:p>
      <text:p text:style-name="Text_20_body">The eax register is compared with 2. If this number is below 2, then there are not enough arguments to continue the program, and it will end. Otherwise, it will proceed to use the open call with both filenames and assume these files exist. If they do not exist, it will print the filename and then say error.</text:p>
      <text:p text:style-name="Text_20_body">If both files are opened, it will keep reading 1 byte from each file descriptor and store each in its own buffer of 1 byte. If the two bytes are the same, they will be ignored. However, if they are different, the address and the values of both bytes at that address will be displayed.</text:p>
      <text:p text:style-name="Text_20_body">The variable “offset” is used to keep track of which address we are at in both files, but it isn’t used to lseek in this program because we are going from beginning to end.</text:p>
      <text:p text:style-name="Text_20_body">If at any time the read system call returns 0, a message is displayed with the filename and EOF to tell the user that the end of that file has been reached.</text:p>
      <text:p text:style-name="Text_20_body">In the example I just used, both files are the same length of 26 bytes and will reach the end at the same time.</text:p>
      <text:h text:style-name="Heading_20_2" text:outline-level="2"><text:bookmark-start text:name="but-why-should-i-care"/>But why should I care?<text:bookmark-end text:name="but-why-should-i-care"/></text:h>
      <text:p text:style-name="First_20_paragraph">The average person probably does not know why it matters to see the hexadecimal differences between two files. I know it seems silly, especially for small text files as I used in this chapter’s examples. However, I can give two examples of times I have used this information.</text:p>
      <text:p text:style-name="Text_20_body">The first example is relevant to Chapter 2, where I presented the header file “chaste-elf-32.nasm” which can be included to make a loadable program using the NASM assembler.</text:p>
      <text:p text:style-name="Text_20_body">I read the specification document for ELF files to describe what the fields were named and what the values meant. However, this informational alone was not enough for me to successfully create the custom ELF header. I had to create ELF executable files with FASM because it has this feature built in. By creating slightly different programs, I was able to compare the binary differences in the different source files fed to FASM. The chastecmp program was extremely helpful to me as I used it hundreds of times in reverse engineering the ELF format.</text:p>
      <text:p text:style-name="Text_20_body">One of my discoveries was that when the size of a program increased, either by adding more code or adding more data statements, there was a number in the header that also increased. As it turns out, the memory size of the file increased even when data reservation keywords (such as rb,rw,rd, and rq) were used, even when the size of the file itself didn’t.</text:p>
      <text:p text:style-name="Text_20_body">The specification could tell me a lot, but without the example ELF headers FASM was already creating, I would not have been able to create dynamic headers to match programs written in FASM. I probably spent 12 hours on that project, but at least I can assembler any of my programs with NASM if I make the necessary syntax changes.</text:p>
      <text:p text:style-name="Text_20_body">But perhaps a more fun example, and also the reason I got started with programming, was that I used a file comparison tool to cheat at a Norse mythology game years ago. The game was called Castle of the Winds, and it ran on Windows 3.1, 98, and even XP.</text:p>
      <text:p text:style-name="Text_20_body">One of the features of that specific game was that it let you save the game at any time. I remember that I had 5 mana points. I saved the first file and then cast the magic arrow spell to spend one point. I then saved a second file and ran the Windows “fc” command to compare the two files in binary mode.</text:p>
      <text:p text:style-name="P2853">fc /b 1.cwg 2.cwg</text:p>
      <text:p text:style-name="First_20_paragraph">It told me the address of the byte that had changed from 5 to 4. I then opened this in a hex editor named XVI32 and changed this byte to different values.</text:p>
      <text:p text:style-name="Text_20_body">In time, I was able to not only change my mana points but also hit points and experience points to make myself invincible in that game.</text:p>
      <text:p text:style-name="Text_20_body">I didn’t really know much about hexadecimal at this point, but by trial and error, I accidentally started understanding it. It was this experience of cheating in a video game that led me to learn about binary and hexadecimal number systems originally.</text:p>
      <text:p text:style-name="Text_20_body">I had seen for the first time that an understanding of computer arithmetic could allow me to break the rules and do things in a video game that the developer could not predict or prevent me from doing. In those days, I learned to do the same with many video games and had many fun adventures.</text:p>
      <text:p text:style-name="Text_20_body">In modern times, developers have gotten smarter and have put measures in place to prevent this form of cheating. Most notably, more games are multiplayer and read data from a server that stores the game data, where no user can hack it.</text:p>
      <text:p text:style-name="Text_20_body">But you have to understand that back in the 90s, nearly every single player game could be hacked that stored its data locally and didn’t connect to the internet. I have had people criticize my habit of cheating in single-player games and say that it ruins the experience of the game.</text:p>
      <text:p text:style-name="Text_20_body">But what they don’t understand is that I didn’t care about the video game I was hacking, because Arithmetic had become my favorite game. My love of math was so great that I learned computer programming and had more fun writing programs in BASIC, C, and Assembly than I did playing video games in the first place.</text:p>
      <text:p text:style-name="Text_20_body">I can’t hack most modern games with these tricks, but I have found the art of computer programming, which is much more satisfying than any video game I have played in my life.</text:p>
      <text:p text:style-name="Text_20_body">In summary, the chastecmp program does the same thing as the “fc /b” command from DOS and Windows did. When I switched to Linux as my primary operating system, I wrote my own file comparison tool to always keep the fond memories of my childhood with me.</text:p>
      <text:h text:style-name="Heading_20_1" text:outline-level="1"><text:bookmark-start text:name="chapter-16-chastehex"/>Chapter 16: chastehex<text:bookmark-end text:name="chapter-16-chastehex"/></text:h>
      <text:p text:style-name="First_20_paragraph">In this chapter, I will finally show you the Linux version of chastehex! If you read my DOS edition of Assembly Arithmetic Algorithms, you will already be familiar with it. But make no mistake in thinking the program is written the same as it was in DOS. There are some differences in how it achieves the same behavior with less code.</text:p>
      <text:p text:style-name="Text_20_body">First, command line arguments are just popped directly from the stack in Linux. You have already seen this from the other programs in this book. In DOS it was not so simple because they were at a special address and I had to process them manually which made the code harder to read. For this reason, the Linux version you are about to read is cleaner and less confusing.</text:p>
      <text:p text:style-name="Text_20_body">The second thing that makes the Linux version easier to use is that the strint function is the same one you have already seen used in chapter 10 of this book. The DOS version had to have a special version of strint because the DOS system call for lseek had the lower and upper 16 bits split into different registers.</text:p>
      <text:p text:style-name="Text_20_body">Aside from these technical details caused by the limitations that DOS has, I have also spent time cleaning up and commenting the code for the Linux chastehex program. Despite its optimizations, it is still the largest of all the programs in this book because it has 3 modes of operation. I shall refer to these modes as “dump”,“peek”,and “poke”.</text:p>
      <text:p text:style-name="Text_20_body">For now, glance over the source code and see if you are clever enough to guess what it does. Either way, I will explain the 3 modes and when each of them are useful!</text:p>
      <text:h text:style-name="Heading_20_2" text:outline-level="2"><text:bookmark-start text:name="fasm-chastehex"/>FASM chastehex<text:bookmark-end text:name="fasm-chastehex"/></text:h>
      <text:p text:style-name="P2854">;Linux 32-bit Assembly Source for chastehex</text:p>
      <text:p text:style-name="P2855">;a special tool originally written in C</text:p>
      <text:p text:style-name="P2856">format ELF executable</text:p>
      <text:p text:style-name="P2857"/>
      <text:p text:style-name="P2858">main:</text:p>
      <text:p text:style-name="P2859"/>
      <text:p text:style-name="P2860">;radix will be 16 because this whole program is about hexadecimal</text:p>
      <text:p text:style-name="P2861">mov dword [radix],16 ; can choose radix for integer input/output!</text:p>
      <text:p text:style-name="P2862"/>
      <text:p text:style-name="P2863">pop eax ;get the number of arguments</text:p>
      <text:p text:style-name="P2864">dec eax ;subtract 1 because we will ignore the name of the program</text:p>
      <text:p text:style-name="P2865">pop ebx ;pop program name into a register to delete it from stack</text:p>
      <text:p text:style-name="P2866">mov [argc],eax ;save the argument count for later</text:p>
      <text:p text:style-name="P2867"/>
      <text:p text:style-name="P2868">;before we try to get the first argument as a filename, we must check if it exists</text:p>
      <text:p text:style-name="P2869">cmp dword [argc],0</text:p>
      <text:p text:style-name="P2870">jnz arg_open_file</text:p>
      <text:p text:style-name="P2871"/>
      <text:p text:style-name="P2872">help:</text:p>
      <text:p text:style-name="P2873">mov eax,help_message</text:p>
      <text:p text:style-name="P2874">call putstring</text:p>
      <text:p text:style-name="P2875">jmp main_end</text:p>
      <text:p text:style-name="P2876"/>
      <text:p text:style-name="P2877">arg_open_file:</text:p>
      <text:p text:style-name="P2878"/>
      <text:p text:style-name="P2879">pop eax</text:p>
      <text:p text:style-name="P2880">dec dword [argc]</text:p>
      <text:p text:style-name="P2881">mov [filename],eax ; save the name of the file we will open to read</text:p>
      <text:p text:style-name="P2882">call putstr_and_line</text:p>
      <text:p text:style-name="P2883"/>
      <text:p text:style-name="P2884">;Linux system call to open a file</text:p>
      <text:p text:style-name="P2885">mov ecx,2 <text:s text:c="2"/>;open file in read and write mode </text:p>
      <text:p text:style-name="P2886">mov ebx,eax ;filename should be in eax before this function was called</text:p>
      <text:p text:style-name="P2887">mov eax,5 <text:s text:c="2"/>;invoke SYS_OPEN (kernel opcode 5)</text:p>
      <text:p text:style-name="P2888">int 80h <text:s text:c="4"/>;call the kernel</text:p>
      <text:p text:style-name="P2889"/>
      <text:p text:style-name="P2890">cmp eax,0</text:p>
      <text:p text:style-name="P2891">jns file_open_no_errors ;if eax is not negative/signed there was no error</text:p>
      <text:p text:style-name="P2892"/>
      <text:p text:style-name="P2893">;Otherwise, if it was signed, then this code will display an error message.</text:p>
      <text:p text:style-name="P2894">neg eax</text:p>
      <text:p text:style-name="P2895">call putint_and_space</text:p>
      <text:p text:style-name="P2896">mov eax,open_error_message</text:p>
      <text:p text:style-name="P2897">call putstr_and_line</text:p>
      <text:p text:style-name="P2898"/>
      <text:p text:style-name="P2899">jmp main_end ;end the program because we failed at opening the file</text:p>
      <text:p text:style-name="P2900"/>
      <text:p text:style-name="P2901">file_open_no_errors:</text:p>
      <text:p text:style-name="P2902"/>
      <text:p text:style-name="P2903">mov [fd],eax ; save the file descriptor number for later use</text:p>
      <text:p text:style-name="P2904">mov dword [offset],0 ;assume the offset is 0,beginning of file</text:p>
      <text:p text:style-name="P2905"/>
      <text:p text:style-name="P2906">;check next arg</text:p>
      <text:p text:style-name="P2907">cmp dword [argc],0 ;if there are no more args after filename, just hexdump it</text:p>
      <text:p text:style-name="P2908">jnz seek_offset <text:s text:c="3"/>;otherwise use next argument as an offset for lseek</text:p>
      <text:p text:style-name="P2909"/>
      <text:p text:style-name="P2910">hexdump:</text:p>
      <text:p text:style-name="P2911"/>
      <text:p text:style-name="P2912">mov edx,0x10 <text:s text:c="3"/>;number of bytes to read</text:p>
      <text:p text:style-name="P2913">mov ecx,buf <text:s text:c="4"/>;address to store the bytes</text:p>
      <text:p text:style-name="P2914">mov ebx,[fd] <text:s text:c="3"/>;move the opened file descriptor into EBX</text:p>
      <text:p text:style-name="P2915">mov eax,3 <text:s text:c="6"/>;invoke SYS_READ (kernel opcode 3)</text:p>
      <text:p text:style-name="P2916">int 80h <text:s text:c="8"/>;call the kernel</text:p>
      <text:p text:style-name="P2917"/>
      <text:p text:style-name="P2918">mov [count],eax</text:p>
      <text:p text:style-name="P2919"/>
      <text:p text:style-name="P2920">cmp eax,0</text:p>
      <text:p text:style-name="P2921">jnz file_success ;if more than zero bytes read, proceed to display</text:p>
      <text:p text:style-name="P2922"/>
      <text:p text:style-name="P2923">;otherwise, display EOF to indicate we have reached the end of file</text:p>
      <text:p text:style-name="P2924">mov eax,end_of_file_string</text:p>
      <text:p text:style-name="P2925">call putstr_and_line</text:p>
      <text:p text:style-name="P2926"/>
      <text:p text:style-name="P2927">jmp main_end</text:p>
      <text:p text:style-name="P2928"/>
      <text:p text:style-name="P2929">;this point is reached if file was read from successfully</text:p>
      <text:p text:style-name="P2930">file_success:</text:p>
      <text:p text:style-name="P2931">call print_bytes_row</text:p>
      <text:p text:style-name="P2932">jmp hexdump</text:p>
      <text:p text:style-name="P2933"/>
      <text:p text:style-name="P2934">;convert argument with strint and lseek to that offset</text:p>
      <text:p text:style-name="P2935">seek_offset:</text:p>
      <text:p text:style-name="P2936"/>
      <text:p text:style-name="P2937">pop eax ;pop the argument into eax and process it as a hex number</text:p>
      <text:p text:style-name="P2938">dec dword [argc]</text:p>
      <text:p text:style-name="P2939">call strint</text:p>
      <text:p text:style-name="P2940"/>
      <text:p text:style-name="P2941">;use the hex number as an address to seek to in the file</text:p>
      <text:p text:style-name="P2942">mov edx,0 <text:s text:c="7"/>;whence argument (SEEK_SET)</text:p>
      <text:p text:style-name="P2943">mov ecx,eax <text:s text:c="5"/>;move the file cursor to this address</text:p>
      <text:p text:style-name="P2944">mov ebx,[fd] <text:s text:c="4"/>;move the opened file descriptor into EBX</text:p>
      <text:p text:style-name="P2945">mov eax,19 <text:s text:c="6"/>;invoke SYS_LSEEK (kernel opcode 19)</text:p>
      <text:p text:style-name="P2946">int 80h <text:s text:c="9"/>;call the kernel</text:p>
      <text:p text:style-name="P2947"/>
      <text:p text:style-name="P2948">mov [offset],eax ;move the new offset</text:p>
      <text:p text:style-name="P2949"/>
      <text:p text:style-name="P2950">;check the number of args still remaining</text:p>
      <text:p text:style-name="P2951">cmp dword [argc],0</text:p>
      <text:p text:style-name="P2952">jnz next_arg_write ; if there are still arguments, skip this read section and enter writing mode</text:p>
      <text:p text:style-name="P2953"/>
      <text:p text:style-name="P2954">read_one_byte:</text:p>
      <text:p text:style-name="P2955">mov edx,1 <text:s text:c="3"/>;number of bytes to read</text:p>
      <text:p text:style-name="P2956">mov ecx,buf <text:s text:c="1"/>;address to store the bytes</text:p>
      <text:p text:style-name="P2957">mov ebx,[fd] ;move the opened file descriptor into EBX</text:p>
      <text:p text:style-name="P2958">mov eax,3 <text:s text:c="3"/>;invoke SYS_READ (kernel opcode 3)</text:p>
      <text:p text:style-name="P2959">int 80h <text:s text:c="5"/>;call the kernel</text:p>
      <text:p text:style-name="P2960"/>
      <text:p text:style-name="P2961">;eax will have the number of bytes read after system call</text:p>
      <text:p text:style-name="P2962">cmp eax,1</text:p>
      <text:p text:style-name="P2963">jz print_byte_read ;if exactly 1 byte was read, proceed to print info</text:p>
      <text:p text:style-name="P2964"/>
      <text:p text:style-name="P2965">call show_eof</text:p>
      <text:p text:style-name="P2966"/>
      <text:p text:style-name="P2967">jmp main_end ;go to end of program</text:p>
      <text:p text:style-name="P2968"/>
      <text:p text:style-name="P2969">;print the address and the byte at that address</text:p>
      <text:p text:style-name="P2970">print_byte_read:</text:p>
      <text:p text:style-name="P2971">call print_byte_info</text:p>
      <text:p text:style-name="P2972"/>
      <text:p text:style-name="P2973">;this section interprets the rest of the args as bytes to write</text:p>
      <text:p text:style-name="P2974">next_arg_write:</text:p>
      <text:p text:style-name="P2975">cmp dword [argc],0</text:p>
      <text:p text:style-name="P2976">jz main_end</text:p>
      <text:p text:style-name="P2977"/>
      <text:p text:style-name="P2978">pop eax</text:p>
      <text:p text:style-name="P2979">dec dword [argc]</text:p>
      <text:p text:style-name="P2980">call strint ;try to convert string to a hex number</text:p>
      <text:p text:style-name="P2981"/>
      <text:p text:style-name="P2982">;write that number as a byte value to the file</text:p>
      <text:p text:style-name="P2983"/>
      <text:p text:style-name="P2984">mov [buf],al</text:p>
      <text:p text:style-name="P2985"/>
      <text:p text:style-name="P2986">mov edx,1 <text:s text:c="3"/>;write 1 byte</text:p>
      <text:p text:style-name="P2987">mov ecx,buf <text:s text:c="1"/>;pointer/address of byte to write</text:p>
      <text:p text:style-name="P2988">mov ebx,[fd] ;write to this file descriptor</text:p>
      <text:p text:style-name="P2989">mov eax,4 <text:s text:c="3"/>;invoke SYS_WRITE (kernel opcode 4 on 32 bit systems)</text:p>
      <text:p text:style-name="P2990">int 80h <text:s text:c="5"/>;system call to write the message</text:p>
      <text:p text:style-name="P2991"/>
      <text:p text:style-name="P2992">call print_byte_info</text:p>
      <text:p text:style-name="P2993">inc dword [offset]</text:p>
      <text:p text:style-name="P2994"/>
      <text:p text:style-name="P2995">jmp next_arg_write</text:p>
      <text:p text:style-name="P2996"/>
      <text:p text:style-name="P2997">main_end:</text:p>
      <text:p text:style-name="P2998"/>
      <text:p text:style-name="P2999">;this is the end of the program</text:p>
      <text:p text:style-name="P3000">;we close the open file and then use the exit call</text:p>
      <text:p text:style-name="P3001"/>
      <text:p text:style-name="P3002">;Linux system call to close a file</text:p>
      <text:p text:style-name="P3003"/>
      <text:p text:style-name="P3004">mov ebx,[fd] ;file number to close</text:p>
      <text:p text:style-name="P3005">mov eax,6 <text:s text:c="3"/>;invoke SYS_CLOSE (kernel opcode 6)</text:p>
      <text:p text:style-name="P3006">int 80h <text:s text:c="5"/>;call the kernel</text:p>
      <text:p text:style-name="P3007"/>
      <text:p text:style-name="P3008">mov eax, 1 <text:s text:c="2"/>;invoke SYS_EXIT (kernel opcode 1)</text:p>
      <text:p text:style-name="P3009">mov ebx, 0 <text:s text:c="2"/>;return 0 status on exit - 'No Errors'</text:p>
      <text:p text:style-name="P3010">int 80h</text:p>
      <text:p text:style-name="P3011"/>
      <text:p text:style-name="P3012">include 'chastelib32.asm'</text:p>
      <text:p text:style-name="P3013"/>
      <text:p text:style-name="P3014">;a function just for printing the address</text:p>
      <text:p text:style-name="P3015">;this saves space because all 3 modes use this</text:p>
      <text:p text:style-name="P3016">print_offset:</text:p>
      <text:p text:style-name="P3017">mov eax,[offset]</text:p>
      <text:p text:style-name="P3018">mov dword [int_width],8</text:p>
      <text:p text:style-name="P3019">call putint_and_space</text:p>
      <text:p text:style-name="P3020">ret</text:p>
      <text:p text:style-name="P3021"/>
      <text:p text:style-name="P3022">;this function prints a row of hex bytes</text:p>
      <text:p text:style-name="P3023">;each row is 16 bytes</text:p>
      <text:p text:style-name="P3024">print_bytes_row:</text:p>
      <text:p text:style-name="P3025">call print_offset</text:p>
      <text:p text:style-name="P3026"/>
      <text:p text:style-name="P3027">mov ebx,buf</text:p>
      <text:p text:style-name="P3028">mov ecx,[count]</text:p>
      <text:p text:style-name="P3029">add [offset],ecx</text:p>
      <text:p text:style-name="P3030">next_byte:</text:p>
      <text:p text:style-name="P3031">mov eax,0</text:p>
      <text:p text:style-name="P3032">mov al,[ebx]</text:p>
      <text:p text:style-name="P3033">mov dword [int_width],2</text:p>
      <text:p text:style-name="P3034">call putint_and_space</text:p>
      <text:p text:style-name="P3035"/>
      <text:p text:style-name="P3036">inc ebx</text:p>
      <text:p text:style-name="P3037">dec ecx</text:p>
      <text:p text:style-name="P3038">cmp ecx,0</text:p>
      <text:p text:style-name="P3039">jnz next_byte</text:p>
      <text:p text:style-name="P3040"/>
      <text:p text:style-name="P3041">mov ecx,[count]</text:p>
      <text:p text:style-name="P3042">pad_spaces:</text:p>
      <text:p text:style-name="P3043">cmp ecx,0x10</text:p>
      <text:p text:style-name="P3044">jz pad_spaces_end</text:p>
      <text:p text:style-name="P3045">mov eax,space_three</text:p>
      <text:p text:style-name="P3046">call putstring</text:p>
      <text:p text:style-name="P3047">inc ecx</text:p>
      <text:p text:style-name="P3048">jmp pad_spaces</text:p>
      <text:p text:style-name="P3049">pad_spaces_end:</text:p>
      <text:p text:style-name="P3050"/>
      <text:p text:style-name="P3051">;optionally, print chars after hex bytes</text:p>
      <text:p text:style-name="P3052">call print_bytes_row_text</text:p>
      <text:p text:style-name="P3053">call putline</text:p>
      <text:p text:style-name="P3054"/>
      <text:p text:style-name="P3055">ret</text:p>
      <text:p text:style-name="P3056"/>
      <text:p text:style-name="P3057">;I define a string of 3 spaces as filler when less than 16 bytes are read</text:p>
      <text:p text:style-name="P3058">;This makes the text section on the right properly lined up.</text:p>
      <text:p text:style-name="P3059">space_three db ' <text:s text:c="2"/>',0</text:p>
      <text:p text:style-name="P3060"/>
      <text:p text:style-name="P3061">;This function prints the text equivalent of the bytes on the last row printed.</text:p>
      <text:p text:style-name="P3062">;It reads how many bytes were read in the last read operation.</text:p>
      <text:p text:style-name="P3063">;If less than 16 bytes were read, it prints spaces as filler so that</text:p>
      <text:p text:style-name="P3064">;text can still be printed lined up with all the other rows</text:p>
      <text:p text:style-name="P3065">;even if less than 16 bytes exist in the current row.</text:p>
      <text:p text:style-name="P3066">;This situation sometimes happens when we get near the end of the file.</text:p>
      <text:p text:style-name="P3067">;It also replaces characters that can't be printed with periods -&gt; .</text:p>
      <text:p text:style-name="P3068"/>
      <text:p text:style-name="P3069">print_bytes_row_text:</text:p>
      <text:p text:style-name="P3070">mov ebx,buf</text:p>
      <text:p text:style-name="P3071">mov ecx,[count]</text:p>
      <text:p text:style-name="P3072">next_char:</text:p>
      <text:p text:style-name="P3073">mov eax,0</text:p>
      <text:p text:style-name="P3074">mov al,[ebx]</text:p>
      <text:p text:style-name="P3075"/>
      <text:p text:style-name="P3076">;if char is below '0' or above '9', it is outside the range of these and is not a digit</text:p>
      <text:p text:style-name="P3077">cmp al,0x20</text:p>
      <text:p text:style-name="P3078">jb not_printable</text:p>
      <text:p text:style-name="P3079">cmp al,0x7E</text:p>
      <text:p text:style-name="P3080">ja not_printable</text:p>
      <text:p text:style-name="P3081"/>
      <text:p text:style-name="P3082">printable:</text:p>
      <text:p text:style-name="P3083">;if char is in printable range,keep as is and proceed to next index</text:p>
      <text:p text:style-name="P3084">jmp next_index</text:p>
      <text:p text:style-name="P3085"/>
      <text:p text:style-name="P3086">not_printable:</text:p>
      <text:p text:style-name="P3087">mov al,'.' ;otherwise replace with placeholder value</text:p>
      <text:p text:style-name="P3088"/>
      <text:p text:style-name="P3089">next_index:</text:p>
      <text:p text:style-name="P3090">mov [ebx],al</text:p>
      <text:p text:style-name="P3091">inc ebx</text:p>
      <text:p text:style-name="P3092">dec ecx</text:p>
      <text:p text:style-name="P3093">cmp ecx,0</text:p>
      <text:p text:style-name="P3094">jnz next_char</text:p>
      <text:p text:style-name="P3095">mov [ebx],byte 0 ;make sure string is zero terminated</text:p>
      <text:p text:style-name="P3096"/>
      <text:p text:style-name="P3097">mov eax,buf</text:p>
      <text:p text:style-name="P3098">call putstring</text:p>
      <text:p text:style-name="P3099">ret</text:p>
      <text:p text:style-name="P3100"/>
      <text:p text:style-name="P3101">;function to display EOF with address</text:p>
      <text:p text:style-name="P3102">show_eof:</text:p>
      <text:p text:style-name="P3103"/>
      <text:p text:style-name="P3104">call print_offset</text:p>
      <text:p text:style-name="P3105">mov eax,end_of_file_string</text:p>
      <text:p text:style-name="P3106">call putstr_and_line</text:p>
      <text:p text:style-name="P3107"/>
      <text:p text:style-name="P3108">ret</text:p>
      <text:p text:style-name="P3109"/>
      <text:p text:style-name="P3110">;print the address and the byte at that address</text:p>
      <text:p text:style-name="P3111">print_byte_info:</text:p>
      <text:p text:style-name="P3112">call print_offset</text:p>
      <text:p text:style-name="P3113">mov eax,0</text:p>
      <text:p text:style-name="P3114">mov al,[buf]</text:p>
      <text:p text:style-name="P3115">mov dword [int_width],2</text:p>
      <text:p text:style-name="P3116">call putint_and_line</text:p>
      <text:p text:style-name="P3117"/>
      <text:p text:style-name="P3118">ret</text:p>
      <text:p text:style-name="P3119"/>
      <text:p text:style-name="P3120">end_of_file_string db 'EOF',0</text:p>
      <text:p text:style-name="P3121"/>
      <text:p text:style-name="P3122">help_message db 'chastehex by Chastity White Rose',0Ah</text:p>
      <text:p text:style-name="P3123">db 'hexdump a file:',0Ah,9,'chastehex file',0Ah</text:p>
      <text:p text:style-name="P3124">db 'read a byte:',0Ah,9,'chastehex file offset',0Ah</text:p>
      <text:p text:style-name="P3125">db 'write a byte:',0Ah,9,'chastehex file offset value',0Ah</text:p>
      <text:p text:style-name="P3126">db 'The file must exist',0Ah,0</text:p>
      <text:p text:style-name="P3127"/>
      <text:p text:style-name="P3128">;variables for managing arguments and files</text:p>
      <text:p text:style-name="P3129">argc dd 0</text:p>
      <text:p text:style-name="P3130">filename dd 0 ; name of the file to be opened</text:p>
      <text:p text:style-name="P3131">fd dd 0 ; file descriptor</text:p>
      <text:p text:style-name="P3132">count dd 0</text:p>
      <text:p text:style-name="P3133">offset dd 0</text:p>
      <text:p text:style-name="P3134">open_error_message db 'error opening file',0</text:p>
      <text:p text:style-name="P3135"/>
      <text:p text:style-name="P3136">;where we will store data from the file</text:p>
      <text:p text:style-name="P3137">;17 bytes because 16 bytes read per row plus the terminating 0</text:p>
      <text:p text:style-name="P3138">;used for the text printing function</text:p>
      <text:p text:style-name="P3139">buf db 17 dup '?'</text:p>
      <text:p text:style-name="P3140"/>
      <text:p text:style-name="P3141">db 0x31 dup 0 ;fill with extra space to match 1280 executable size</text:p>
      <text:h text:style-name="Heading_20_2" text:outline-level="2"><text:bookmark-start text:name="dump-mode"/>dump mode<text:bookmark-end text:name="dump-mode"/></text:h>
      <text:p text:style-name="First_20_paragraph">To describe the 3 modes of chastehex, it is good to use a familiar example. Therefore, I will be using the seashell.txt file from chapter 13.</text:p>
      <text:p text:style-name="Text_20_body">Assemble the chastehex program from the source and place it in your path as I described in chapter 14.</text:p>
      <text:p text:style-name="Text_20_body">Run the chastehex program while passing the name of the file as the first argument.</text:p>
      <text:p text:style-name="P3142">chastehex seashell.txt</text:p>
      <text:p text:style-name="First_20_paragraph">Doing so will execute chastehex in dump mode where it dumps the whole file to the terminal like this:</text:p>
      <text:p text:style-name="P3143">seashell.txt</text:p>
      <text:p text:style-name="P3144">00000000 53 68 65 20 73 65 6C 6C 73 20 73 65 61 73 68 65 She sells seashe</text:p>
      <text:p text:style-name="P3145">00000010 6C 6C 73 20 62 79 20 74 68 65 20 73 65 61 73 68 lls by the seash</text:p>
      <text:p text:style-name="P3146">00000020 6F 72 65 2C 0A 54 68 65 20 73 68 65 6C 6C 73 20 ore,.The shells </text:p>
      <text:p text:style-name="P3147">00000030 73 68 65 20 73 65 6C 6C 73 20 61 72 65 20 73 65 she sells are se</text:p>
      <text:p text:style-name="P3148">00000040 61 73 68 65 6C 6C 73 2C 20 49 27 6D 20 73 75 72 ashells, I'm sur</text:p>
      <text:p text:style-name="P3149">00000050 65 2E 0A 53 6F 20 69 66 20 73 68 65 20 73 65 6C e..So if she sel</text:p>
      <text:p text:style-name="P3150">00000060 6C 73 20 73 65 61 73 68 65 6C 6C 73 20 6F 6E 20 ls seashells on </text:p>
      <text:p text:style-name="P3151">00000070 74 68 65 20 73 65 61 73 68 6F 72 65 2C 0A 54 68 the seashore,.Th</text:p>
      <text:p text:style-name="P3152">00000080 65 6E 20 49 27 6D 20 73 75 72 65 20 73 68 65 20 en I'm sure she </text:p>
      <text:p text:style-name="P3153">00000090 73 65 6C 6C 73 20 73 65 61 73 68 6F 72 65 20 73 sells seashore s</text:p>
      <text:p text:style-name="P3154">000000A0 68 65 6C 6C 73 2E 0A <text:s text:c="27"/>hells..</text:p>
      <text:p text:style-name="P3155">EOF</text:p>
      <text:p text:style-name="First_20_paragraph">Notice that the addresses are displayed on the left side, hex view is in the center, and the text approximation is on the right side. This is because I wrote chastehex to follow the convention of other hex editors that do things this way.</text:p>
      <text:h text:style-name="Heading_20_2" text:outline-level="2"><text:bookmark-start text:name="peek-mode"/>peek mode<text:bookmark-end text:name="peek-mode"/></text:h>
      <text:p text:style-name="First_20_paragraph">Using peek mode is very easy. We simply add an address in hexadecimal of the byte we want to read.</text:p>
      <text:p text:style-name="Text_20_body">For example, if we want to read the address of the first newline character, we can see from the previous output that it is four bytes after the beginning of the line at 00000020. In that case, we know it is address 24 and can run this command.</text:p>
      <text:p text:style-name="P3156">chastehex seashell.txt 24</text:p>
      <text:p text:style-name="First_20_paragraph">Then chastehex will output the address we chose and the value there.</text:p>
      <text:p text:style-name="P3157">seashell.txt</text:p>
      <text:p text:style-name="P3158">00000024 0A</text:p>
      <text:p text:style-name="First_20_paragraph">But if we tried to use an address past the end of the file</text:p>
      <text:p text:style-name="P3159">chastehex seashell.txt BAD</text:p>
      <text:p text:style-name="First_20_paragraph">It would show EOF, which means End Of File.</text:p>
      <text:p text:style-name="P3160">seashell.txt</text:p>
      <text:p text:style-name="P3161">00000BAD EOF</text:p>
      <text:h text:style-name="Heading_20_2" text:outline-level="2"><text:bookmark-start text:name="poke-mode"/>poke mode<text:bookmark-end text:name="poke-mode"/></text:h>
      <text:p text:style-name="First_20_paragraph">But chastehex can do a lot more than just read bytes. We can also edit them anywhere we like, including after the EOF. For example, we will write some bytes starting at address 80, which does not currently exist in the file.</text:p>
      <text:p text:style-name="P3162">chastehex seashell.txt C0 48 65 6C 6C 6F 20 57 6F 72 6C 64 21 0A</text:p>
      <text:p text:style-name="First_20_paragraph">When you run the above command, you will see this output:</text:p>
      <text:p text:style-name="P3163">seashell.txt</text:p>
      <text:p text:style-name="P3164">000000C0 48</text:p>
      <text:p text:style-name="P3165">000000C1 65</text:p>
      <text:p text:style-name="P3166">000000C2 6C</text:p>
      <text:p text:style-name="P3167">000000C3 6C</text:p>
      <text:p text:style-name="P3168">000000C4 6F</text:p>
      <text:p text:style-name="P3169">000000C5 20</text:p>
      <text:p text:style-name="P3170">000000C6 57</text:p>
      <text:p text:style-name="P3171">000000C7 6F</text:p>
      <text:p text:style-name="P3172">000000C8 72</text:p>
      <text:p text:style-name="P3173">000000C9 6C</text:p>
      <text:p text:style-name="P3174">000000CA 64</text:p>
      <text:p text:style-name="P3175">000000CB 21</text:p>
      <text:p text:style-name="P3176">000000CC 0A</text:p>
      <text:p text:style-name="First_20_paragraph">Now you know which bytes were written to exactly which addresses starting at address 80 hex.</text:p>
      <text:h text:style-name="Heading_20_2" text:outline-level="2"><text:bookmark-start text:name="but-what-does-it-all-mean"/>But what does it all mean?<text:bookmark-end text:name="but-what-does-it-all-mean"/></text:h>
      <text:p text:style-name="First_20_paragraph">Just run the chastehex program on the file one more time using only the filename as you did with dump mode before.</text:p>
      <text:p text:style-name="P3177">chastehex seashell.txt</text:p>
      <text:p text:style-name="First_20_paragraph">And you will see what has changed in the file!</text:p>
      <text:p text:style-name="P3178">seashell.txt</text:p>
      <text:p text:style-name="P3179">00000000 53 68 65 20 73 65 6C 6C 73 20 73 65 61 73 68 65 She sells seashe</text:p>
      <text:p text:style-name="P3180">00000010 6C 6C 73 20 62 79 20 74 68 65 20 73 65 61 73 68 lls by the seash</text:p>
      <text:p text:style-name="P3181">00000020 6F 72 65 2C 0A 54 68 65 20 73 68 65 6C 6C 73 20 ore,.The shells </text:p>
      <text:p text:style-name="P3182">00000030 73 68 65 20 73 65 6C 6C 73 20 61 72 65 20 73 65 she sells are se</text:p>
      <text:p text:style-name="P3183">00000040 61 73 68 65 6C 6C 73 2C 20 49 27 6D 20 73 75 72 ashells, I'm sur</text:p>
      <text:p text:style-name="P3184">00000050 65 2E 0A 53 6F 20 69 66 20 73 68 65 20 73 65 6C e..So if she sel</text:p>
      <text:p text:style-name="P3185">00000060 6C 73 20 73 65 61 73 68 65 6C 6C 73 20 6F 6E 20 ls seashells on </text:p>
      <text:p text:style-name="P3186">00000070 74 68 65 20 73 65 61 73 68 6F 72 65 2C 0A 54 68 the seashore,.Th</text:p>
      <text:p text:style-name="P3187">00000080 65 6E 20 49 27 6D 20 73 75 72 65 20 73 68 65 20 en I'm sure she </text:p>
      <text:p text:style-name="P3188">00000090 73 65 6C 6C 73 20 73 65 61 73 68 6F 72 65 20 73 sells seashore s</text:p>
      <text:p text:style-name="P3189">000000A0 68 65 6C 6C 73 2E 0A 00 00 00 00 00 00 00 00 00 hells...........</text:p>
      <text:p text:style-name="P3190">000000B0 00 00 00 00 00 00 00 00 00 00 00 00 00 00 00 00 ................</text:p>
      <text:p text:style-name="P3191">000000C0 48 65 6C 6C 6F 20 57 6F 72 6C 64 21 0A <text:s text:c="9"/>Hello World!.</text:p>
      <text:p text:style-name="P3192">EOF</text:p>
      <text:p text:style-name="First_20_paragraph">As you can see, that command actually wrote “Hello World!” to a location in the file that didn’t exist before.</text:p>
      <text:p text:style-name="Text_20_body">Chastehex is a magnificent program because it read or write to any file at any location. Of course the example used in this chapter was only a basic introduction. Making more advanced usage of this requires knowing which addresses you want to modify and the purposes of those bytes. You would normally use chastehex on an executable or save file of a game to modify what you like.</text:p>
      <text:p text:style-name="Text_20_body">In any case, the example I used of modifying a text file shows you exactly what this program does. It uses all the 6 system calls I described in this book. It is also the only program that does entirely different operations depending on how many arguments there are.</text:p>
      <text:p text:style-name="Text_20_body">But even a tool like this is only as useful as your understanding of arithmetic and how numbers are actually represented in a specific file format.</text:p>
      <text:p text:style-name="Text_20_body">Now that all of the large programs have been described in these first 16 chapters, I will use the next chapters to describe some more advanced knowledge on how computers really process numbers. At this point, you have all the information on what the instructions and system calls mean. I have also provided you with many functions which can display numbers and text.</text:p>
      <text:p text:style-name="Text_20_body">Be sure to look at the <text:a xlink:type="simple" xlink:href="#chastelib32.asm" office:name=""><text:span text:style-name="Definition">chastelib32.asm</text:span></text:a> file from chapter 10 whenever you forget the way these functions work. From this point, I will be describing the Arithmetic of the Algorithms more than the Assembly language. Assembly is just the programming language we use, but the reason we use it, is the Arithmeti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7in" fo:page-height="10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6-07-02T12:57:25Z</meta:creation-date>
    <dc:date>2026-07-02T12:57:25Z</dc:date>
  </office:meta>
</office:document-meta>
</file>